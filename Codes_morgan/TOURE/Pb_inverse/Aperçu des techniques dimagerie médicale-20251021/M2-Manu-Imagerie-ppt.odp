
<file path=META-INF/manifest.xml><?xml version="1.0" encoding="utf-8"?>
<manifest:manifest xmlns:manifest="urn:oasis:names:tc:opendocument:xmlns:manifest:1.0">
  <manifest:file-entry manifest:full-path="Object 2/" manifest:media-type="application/vnd.oasis.opendocument.formula"/>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jpg" manifest:media-type="image/jpeg"/>
  <manifest:file-entry manifest:full-path="media/image8.png" manifest:media-type="image/png"/>
  <manifest:file-entry manifest:full-path="media/image9.jpg" manifest:media-type="image/jpeg"/>
  <manifest:file-entry manifest:full-path="media/image10.png" manifest:media-type="image/png"/>
  <manifest:file-entry manifest:full-path="media/image11.png" manifest:media-type="image/png"/>
  <manifest:file-entry manifest:full-path="media/image12.jpg" manifest:media-type="image/jpeg"/>
  <manifest:file-entry manifest:full-path="media/image13.jpg" manifest:media-type="image/jpeg"/>
  <manifest:file-entry manifest:full-path="media/image14.png" manifest:media-type="image/png"/>
  <manifest:file-entry manifest:full-path="media/image15.png" manifest:media-type="image/png"/>
  <manifest:file-entry manifest:full-path="media/image16.jp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jpg" manifest:media-type="image/jpe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478">
      <style:graphic-properties fo:wrap-option="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1479" style:parent-style-name="Graphics">
      <style:graphic-properties draw:fill="none" fo:clip="rect(0in, 0in, 0in, 0in)" draw:stroke="none" draw:luminance="0%" draw:contrast="0%" draw:image-opacity="100%"/>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100%" fo:text-align="left" style:tab-stop-distance="1in" fo:margin-left="0.3748in" fo:margin-right="0in" fo:text-indent="-0.3748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no-wrap" fo:padding-top="0.05118in" fo:padding-bottom="0.05118in" fo:padding-left="0.09843in" fo:padding-right="0.09843in" draw:textarea-vertical-align="middle" draw:textarea-horizontal-align="left" draw:fill="none" draw:stroke="solid" svg:stroke-width="0.04173in" svg:stroke-color="#00ccff" svg:stroke-opacity="100%" draw:stroke-linejoin="miter" svg:stroke-linecap="square" draw:auto-grow-width="false" draw:auto-grow-height="false"/>
      <style:paragraph-properties style:font-independent-line-spacing="true" style:writing-mode="lr-tb"/>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3748in" fo:margin-right="0in" fo:text-indent="-0.3748in" fo:margin-top="0.0965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00%" fo:text-align="left" style:tab-stop-distance="1in" fo:margin-left="0.3748in" fo:margin-right="0in" fo:text-indent="-0.3748in" fo:margin-top="0.0965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216">
      <style:graphic-properties fo:wrap-option="no-wrap" fo:padding-top="0.05118in" fo:padding-bottom="0.05118in" fo:padding-left="0.09843in" fo:padding-right="0.09843in" draw:textarea-vertical-align="middle" draw:textarea-horizontal-align="left" draw:fill="none" draw:stroke="dash" draw:stroke-dash="a1213" svg:stroke-width="0.02795in" svg:stroke-color="#00ff00" draw:marker-start="a1214" draw:marker-end="a1215" svg:stroke-opacity="100%" draw:stroke-linejoin="miter" svg:stroke-linecap="square" draw:auto-grow-width="false" draw:auto-grow-height="false"/>
      <style:paragraph-properties style:font-independent-line-spacing="true" style:writing-mode="lr-tb"/>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no-wrap" fo:padding-top="0.05118in" fo:padding-bottom="0.05118in" fo:padding-left="0.09843in" fo:padding-right="0.09843in" draw:textarea-vertical-align="middle" draw:textarea-horizontal-align="left" draw:fill="none" draw:stroke="solid" svg:stroke-width="0.04173in" svg:stroke-color="#ff0000" svg:stroke-opacity="100%" draw:stroke-linejoin="miter" svg:stroke-linecap="square" draw:auto-grow-width="false" draw:auto-grow-height="false"/>
      <style:paragraph-properties style:font-independent-line-spacing="true" style:writing-mode="lr-tb"/>
    </style:style>
    <style:style style:family="graphic" style:name="a983" style:parent-style-name="Graphics">
      <style:graphic-properties draw:fill="none" draw:stroke="none"/>
    </style:style>
    <style:style style:family="text" style:name="a984">
      <style:text-properties fo:font-variant="normal" fo:text-transform="none" fo:color="#c0c0c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c0c0c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c0c0c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fo:font-variant="normal" fo:text-transform="none" fo:color="#c0c0c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8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89">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text" style:name="a1484">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5">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87">
      <style:paragraph-properties fo:line-height="90%" fo:text-align="center" style:tab-stop-distance="1in" fo:margin-left="0in" fo:margin-right="0in" fo:text-indent="0in" fo:margin-top="0.0833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9">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20" style:parent-style-name="Graphics">
      <style:graphic-properties draw:fill="none" fo:clip="rect(0in, 0in, 0in, 0in)" draw:stroke="none" draw:luminance="0%" draw:contrast="0%" draw:image-opacity="100%"/>
    </style:style>
    <style:style style:family="text" style:name="a721">
      <style:text-properties fo:font-variant="normal" fo:text-transform="none" fo:color="#ff990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graphic" style:name="a1222">
      <style:graphic-properties fo:wrap-option="no-wrap" fo:padding-top="0.05118in" fo:padding-bottom="0.05118in" fo:padding-left="0.09843in" fo:padding-right="0.09843in" draw:textarea-vertical-align="middle" draw:textarea-horizontal-align="left" draw:fill="none" draw:stroke="dash" draw:stroke-dash="a1219" svg:stroke-width="0.02795in" svg:stroke-color="#00ff00" draw:marker-start="a1220" draw:marker-end="a1221" svg:stroke-opacity="100%" draw:stroke-linejoin="miter" svg:stroke-linecap="square" draw:auto-grow-width="false" draw:auto-grow-height="false"/>
      <style:paragraph-properties style:font-independent-line-spacing="true" style:writing-mode="lr-tb"/>
    </style:style>
    <style:style style:family="presentation" style:name="a727">
      <style:graphic-properties draw:fill="solid" draw:fill-color="#729fcf" draw:opacity="100%" draw:stroke="solid" svg:stroke-width="0.02778in" svg:stroke-color="#3465af" svg:stroke-opacity="100%"/>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no-wrap" fo:padding-top="0.05118in" fo:padding-bottom="0.05118in" fo:padding-left="0.09843in" fo:padding-right="0.09843in" draw:textarea-vertical-align="middle" draw:textarea-horizontal-align="left" draw:fill="none" draw:stroke="dash" draw:stroke-dash="a1225" svg:stroke-width="0.02795in" svg:stroke-color="#00ffff" svg:stroke-opacity="100%" draw:stroke-linejoin="miter" svg:stroke-linecap="square"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90%" fo:text-align="center" style:tab-stop-distance="1in" fo:margin-left="0in" fo:margin-right="0in" fo:text-indent="0in" fo:margin-top="0.0833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1">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ff9900" style:text-line-through-type="none" style:text-line-through-style="none" style:text-line-through-width="auto" style:text-line-through-color="font-color" style:text-position="0% 100%" fo:font-family="Symbol" style:font-family-asian="Symbol" style:font-family-complex="Symbol" style:font-family-generic="roman" style:font-family-generic-asian="roman" style:font-family-generic-complex="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2">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draw:fill="solid" draw:fill-color="#729fcf" draw:opacity="100%" draw:stroke="solid" svg:stroke-width="0.02778in" svg:stroke-color="#3465af" svg:stroke-opacity="100%"/>
    </style:style>
    <style:style style:family="graphic" style:name="a1503">
      <style:graphic-properties fo:wrap-option="wrap" fo:padding-top="0.05118in" fo:padding-bottom="0.05118in" fo:padding-left="0.09843in" fo:padding-right="0.09843in" draw:textarea-vertical-align="top" draw:textarea-horizontal-align="center" draw:fill="none" draw:stroke="none" draw:auto-grow-width="false" draw:auto-grow-height="true"/>
      <style:paragraph-properties style:font-independent-line-spacing="true" style:writing-mode="lr-tb"/>
    </style:style>
    <style:style style:family="presentation" style:name="a9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05">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91">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06">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7">
      <style:drawing-page-properties draw:fill="gradient" draw:fill-gradient-name="a99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07">
      <style:graphic-properties draw:fill="solid" draw:fill-color="#729fcf" draw:opacity="100%" draw:stroke="solid" svg:stroke-width="0.02778in" svg:stroke-color="#3465af" svg:stroke-opacity="100%"/>
    </style:style>
    <style:style style:family="text" style:name="a1492">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98" style:parent-style-name="Graphics">
      <style:graphic-properties draw:fill="none" fo:clip="rect(0in, 0in, 0in, 0in)" draw:stroke="none" draw:luminance="0%" draw:contrast="0%" draw:image-opacity="100%"/>
    </style:style>
    <style:style style:family="presentation" style:name="a1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3">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4">
      <style:text-properties fo:font-variant="normal" fo:text-transform="none" fo:color="#f4b183" style:text-line-through-type="none" style:text-line-through-style="none" style:text-line-through-width="auto" style:text-line-through-color="font-color" style:text-position="0% 100%" fo:font-family="Symbo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6">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7">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9">
      <style:text-properties fo:font-variant="normal" fo:text-transform="none" fo:color="#ff9900" style:text-line-through-type="none" style:text-line-through-style="none" style:text-line-through-width="auto" style:text-line-through-color="font-color" style:text-position="0% 100%" fo:font-family="Calibri" style:font-family-asian="Symbol" style:font-family-complex="Symbol" style:font-family-generic-asian="roman" style:font-family-generic-complex="roman"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0">
      <style:graphic-properties fo:wrap-option="wrap" fo:padding-top="0.05118in" fo:padding-bottom="0.05118in" fo:padding-left="0.09843in" fo:padding-right="0.09843in" draw:textarea-vertical-align="top" draw:textarea-horizontal-align="left" draw:fill="solid" draw:fill-color="#ffffff" draw:opacity="100%" draw:stroke="solid" svg:stroke-width="0.01024in" svg:stroke-color="#000000" svg:stroke-opacity="100%" draw:stroke-linejoin="miter" svg:stroke-linecap="square" draw:auto-grow-width="false" draw:auto-grow-height="false"/>
      <style:paragraph-properties style:font-independent-line-spacing="true" style:writing-mode="lr-tb"/>
    </style:style>
    <style:style style:family="drawing-page" style:name="a7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3">
      <style:drawing-page-properties draw:fill="gradient" draw:fill-gradient-name="a73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4" style:parent-style-name="Graphics">
      <style:graphic-properties draw:fill="none" fo:clip="rect(0in, 0in, 0in, 0in)" draw:stroke="none" draw:luminance="0%" draw:contrast="0%" draw:image-opacity="100%"/>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2">
      <style:graphic-properties fo:wrap-option="no-wrap" fo:padding-top="0.05118in" fo:padding-bottom="0.05118in" fo:padding-left="0.09843in" fo:padding-right="0.09843in" draw:textarea-vertical-align="middle" draw:textarea-horizontal-align="left" draw:fill="none" draw:stroke="dash" draw:stroke-dash="a1229" svg:stroke-width="0.02795in" svg:stroke-color="#00ff00" draw:marker-start="a1230" draw:marker-end="a1231" svg:stroke-opacity="100%" draw:stroke-linejoin="miter" svg:stroke-linecap="square" draw:auto-grow-width="false" draw:auto-grow-height="false"/>
      <style:paragraph-properties style:font-independent-line-spacing="true" style:writing-mode="lr-tb"/>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5">
      <style:graphic-properties fo:wrap-option="no-wrap" fo:padding-top="0.05118in" fo:padding-bottom="0.05118in" fo:padding-left="0.09843in" fo:padding-right="0.09843in" draw:textarea-vertical-align="middle" draw:textarea-horizontal-align="left" draw:fill="none" draw:stroke="solid" svg:stroke-width="0.01378in" svg:stroke-color="#ffffff" svg:stroke-opacity="100%" draw:stroke-linejoin="miter" svg:stroke-linecap="square" draw:auto-grow-width="false" draw:auto-grow-height="false"/>
      <style:paragraph-properties style:font-independent-line-spacing="true" style:writing-mode="lr-tb"/>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no-wrap" fo:padding-top="0.05118in" fo:padding-bottom="0.05118in" fo:padding-left="0.09843in" fo:padding-right="0.09843in" draw:textarea-vertical-align="middle" draw:textarea-horizontal-align="left" draw:fill="none" draw:stroke="solid" svg:stroke-width="0.01378in" svg:stroke-color="#ffffff" svg:stroke-opacity="100%" draw:stroke-linejoin="miter" svg:stroke-linecap="square" draw:auto-grow-width="false" draw:auto-grow-height="false"/>
      <style:paragraph-properties style:font-independent-line-spacing="true" style:writing-mode="lr-tb"/>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1241">
      <style:graphic-properties fo:wrap-option="no-wrap" fo:padding-top="0.05118in" fo:padding-bottom="0.05118in" fo:padding-left="0.09843in" fo:padding-right="0.09843in" draw:textarea-vertical-align="middle" draw:textarea-horizontal-align="left" draw:fill="none" draw:stroke="solid" svg:stroke-width="0.01378in" svg:stroke-color="#ffffff" svg:stroke-opacity="100%" draw:stroke-linejoin="miter" svg:stroke-linecap="square" draw:auto-grow-width="false" draw:auto-grow-height="fals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graphic" style:name="a1244">
      <style:graphic-properties fo:wrap-option="no-wrap" fo:padding-top="0.05118in" fo:padding-bottom="0.05118in" fo:padding-left="0.09843in" fo:padding-right="0.09843in" draw:textarea-vertical-align="middle" draw:textarea-horizontal-align="left" draw:fill="none" draw:stroke="solid" svg:stroke-width="0.01378in" svg:stroke-color="#ffffff" svg:stroke-opacity="100%" draw:stroke-linejoin="miter" svg:stroke-linecap="square" draw:auto-grow-width="false" draw:auto-grow-height="false"/>
      <style:paragraph-properties style:font-independent-line-spacing="true" style:writing-mode="lr-tb"/>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no-wrap" fo:padding-top="0.05118in" fo:padding-bottom="0.05118in" fo:padding-left="0.09843in" fo:padding-right="0.09843in" draw:textarea-vertical-align="middle" draw:textarea-horizontal-align="left" draw:fill="none" draw:stroke="solid" svg:stroke-width="0.01378in" svg:stroke-color="#ffffff" svg:stroke-opacity="100%" draw:stroke-linejoin="miter" svg:stroke-linecap="square" draw:auto-grow-width="false" draw:auto-grow-height="false"/>
      <style:paragraph-properties style:font-independent-line-spacing="true" style:writing-mode="lr-tb"/>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draw:fill="solid" draw:fill-color="#729fcf" draw:opacity="100%" draw:stroke="solid" svg:stroke-width="0.02778in" svg:stroke-color="#3465af" svg:stroke-opacity="100%"/>
    </style:style>
    <style:style style:family="presentation" style:name="a7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4">
      <style:drawing-page-properties draw:fill="gradient" draw:fill-gradient-name="a75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5" style:parent-style-name="Graphics">
      <style:graphic-properties draw:fill="none" fo:clip="rect(0in, 0in, 0in, 0in)" draw:stroke="none" draw:luminance="0%" draw:contrast="0%" draw:image-opacity="100%"/>
    </style:style>
    <style:style style:family="graphic" style:name="a1250">
      <style:graphic-properties fo:wrap-option="no-wrap" fo:padding-top="0.05118in" fo:padding-bottom="0.05118in" fo:padding-left="0.09843in" fo:padding-right="0.09843in" draw:textarea-vertical-align="middle" draw:textarea-horizontal-align="left" draw:fill="none" draw:stroke="solid" svg:stroke-width="0.01378in" svg:stroke-color="#ffffff" svg:stroke-opacity="100%" draw:stroke-linejoin="miter" svg:stroke-linecap="square" draw:auto-grow-width="false" draw:auto-grow-height="fals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parent-style-name="Graphics">
      <style:graphic-properties draw:fill="none" fo:clip="rect(0in, 0in, 0in, 0in)" draw:stroke="none" draw:luminance="0%" draw:contrast="0%" draw:image-opacity="100%"/>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parent-style-name="Graphics">
      <style:graphic-properties draw:fill="none" fo:clip="rect(0in, 0in, 0in, 0in)" draw:stroke="none" draw:luminance="0%" draw:contrast="0%" draw:image-opacity="100%"/>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parent-style-name="Graphics">
      <style:graphic-properties draw:fill="none" draw:stroke="non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parent-style-name="Graphics">
      <style:graphic-properties draw:fill="none" draw:stroke="none"/>
    </style:style>
    <style:style style:family="graphic" style:name="a1255" style:parent-style-name="Graphics">
      <style:graphic-properties draw:fill="none" draw:stroke="non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9">
      <style:graphic-properties draw:fill="solid" draw:fill-color="#729fcf" draw:opacity="100%" draw:stroke="solid" svg:stroke-width="0.02778in" svg:stroke-color="#3465af" svg:stroke-opacity="100%"/>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3">
      <style:drawing-page-properties draw:fill="gradient" draw:fill-gradient-name="a12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6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graphic" style:name="a1267" style:parent-style-name="Graphics">
      <style:graphic-properties draw:fill="none" fo:clip="rect(0in, 0in, 0in, 0in)" draw:stroke="none" draw:luminance="0%" draw:contrast="0%" draw:image-opacity="100%"/>
    </style:style>
    <style:style style:family="graphic" style:name="a1268" style:parent-style-name="Graphics">
      <style:graphic-properties draw:fill="none" fo:clip="rect(0in, 0in, 0in, 0in)" draw:stroke="none" draw:luminance="0%" draw:contrast="0%" draw:image-opacity="100%"/>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ff990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ff990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118in" fo:padding-bottom="0.05118in" fo:padding-left="0.09843in" fo:padding-right="0.09843in" draw:textarea-vertical-align="top" draw:textarea-horizontal-align="center" draw:fill="none" draw:stroke="none" draw:auto-grow-width="false" draw:auto-grow-height="tru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5">
      <style:graphic-properties draw:fill="solid" draw:fill-color="#729fcf" draw:opacity="100%" draw:stroke="solid" svg:stroke-width="0.02778in" svg:stroke-color="#3465af" svg:stroke-opacity="100%"/>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71">
      <style:graphic-properties fo:wrap-option="no-wrap" fo:padding-top="0.05118in" fo:padding-bottom="0.05118in" fo:padding-left="0.09843in" fo:padding-right="0.09843in" draw:textarea-vertical-align="middle" draw:textarea-horizontal-align="left" draw:fill="none" draw:stroke="solid" svg:stroke-width="0.06929in" svg:stroke-color="#ffffff" svg:stroke-opacity="100%" draw:stroke-linejoin="miter" svg:stroke-linecap="square"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9">
      <style:drawing-page-properties draw:fill="gradient" draw:fill-gradient-name="a7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74">
      <style:graphic-properties fo:wrap-option="wrap" fo:padding-top="0.05118in" fo:padding-bottom="0.05118in" fo:padding-left="0.09843in" fo:padding-right="0.09843in" draw:textarea-vertical-align="top" draw:textarea-horizontal-align="left" draw:fill="none" draw:stroke="solid" svg:stroke-width="0.0626in" svg:stroke-color="#ffffff" svg:stroke-opacity="100%" draw:stroke-linejoin="miter" svg:stroke-linecap="squar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118in" fo:padding-bottom="0.05118in" fo:padding-left="0.09843in" fo:padding-right="0.09843in" draw:textarea-vertical-align="top" draw:textarea-horizontal-align="left" draw:fill="none" draw:stroke="solid" svg:stroke-width="0.0626in" svg:stroke-color="#ffffff" draw:marker-end="a1277" svg:stroke-opacity="100%" draw:stroke-linejoin="miter" svg:stroke-linecap="square" draw:auto-grow-width="false" draw:auto-grow-height="false"/>
      <style:paragraph-properties style:font-independent-line-spacing="true" style:writing-mode="lr-tb"/>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990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990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118in" fo:padding-bottom="0.05118in" fo:padding-left="0.09843in" fo:padding-right="0.09843in" draw:textarea-vertical-align="top" draw:textarea-horizontal-align="center" draw:fill="none" draw:stroke="none" draw:auto-grow-width="false" draw:auto-grow-height="tru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8">
      <style:graphic-properties draw:fill="solid" draw:fill-color="#729fcf" draw:opacity="100%" draw:stroke="solid" svg:stroke-width="0.02778in" svg:stroke-color="#3465af" svg:stroke-opacity="100%"/>
    </style:style>
    <style:style style:family="presentation" style:name="a10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100%" fo:text-align="left" style:tab-stop-distance="1in" fo:margin-left="0.3748in" fo:margin-right="0in" fo:text-indent="-0.3748in" fo:margin-top="0.0965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left" style:tab-stop-distance="1in" fo:margin-left="0in" fo:margin-right="0in" fo:text-indent="0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3748in" fo:margin-right="0in" fo:text-indent="-0.3748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82">
      <style:graphic-properties fo:wrap-option="wrap" fo:padding-top="0.05118in" fo:padding-bottom="0.05118in" fo:padding-left="0.09843in" fo:padding-right="0.09843in" draw:textarea-vertical-align="top" draw:textarea-horizontal-align="left" draw:fill="none" draw:stroke="solid" svg:stroke-width="0.0626in" svg:stroke-color="#ff9900" draw:marker-end="a1281" svg:stroke-opacity="100%" draw:stroke-linejoin="miter" svg:stroke-linecap="square" draw:auto-grow-width="false" draw:auto-grow-height="false"/>
      <style:paragraph-properties style:font-independent-line-spacing="true" style:writing-mode="lr-tb"/>
    </style:style>
    <style:style style:family="paragraph" style:name="a788">
      <style:paragraph-properties fo:line-height="100%" fo:text-align="left" style:tab-stop-distance="1in" fo:margin-left="0.3748in" fo:margin-right="0in" fo:text-indent="-0.3748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05118in" fo:padding-bottom="0.05118in" fo:padding-left="0.09843in" fo:padding-right="0.09843in" draw:textarea-vertical-align="top" draw:textarea-horizontal-align="left" draw:fill="none" draw:stroke="solid" svg:stroke-width="0.0626in" svg:stroke-color="#ff9900" draw:marker-end="a1285" svg:stroke-opacity="100%" draw:stroke-linejoin="miter" svg:stroke-linecap="square" draw:auto-grow-width="false" draw:auto-grow-height="false"/>
      <style:paragraph-properties style:font-independent-line-spacing="true" style:writing-mode="lr-tb"/>
    </style:style>
    <style:style style:family="text" style:name="a1287">
      <style:text-properties fo:font-variant="normal" fo:text-transform="none" fo:color="#ff9900" style:text-line-through-type="none" style:text-line-through-style="none" style:text-line-through-width="auto" style:text-line-through-color="font-color" style:text-position="0% 100%" fo:font-family="Garamond"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8">
      <style:paragraph-properties fo:line-height="100%" fo:text-align="center" style:tab-stop-distance="1in" fo:margin-left="0in" fo:margin-right="0in" fo:text-indent="0in" fo:margin-top="0.17292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118in" fo:padding-bottom="0.05118in" fo:padding-left="0.09843in" fo:padding-right="0.09843in" draw:textarea-vertical-align="top" draw:textarea-horizontal-align="center" draw:fill="none" draw:stroke="none" draw:auto-grow-width="false" draw:auto-grow-height="true"/>
      <style:paragraph-properties style:font-independent-line-spacing="true" style:writing-mode="lr-tb"/>
    </style:style>
    <style:style style:family="drawing-page" style:name="a10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2">
      <style:drawing-page-properties draw:fill="gradient" draw:fill-gradient-name="a10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left" style:tab-stop-distance="1in" fo:margin-left="0.3748in" fo:margin-right="0in" fo:text-indent="-0.3748in" fo:margin-top="0.0965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100%" fo:text-align="center" style:tab-stop-distance="1in" fo:margin-left="0in" fo:margin-right="0in" fo:text-indent="0in" fo:margin-top="0.17292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0" style:parent-style-name="Graphics">
      <style:graphic-properties draw:fill="none" fo:clip="rect(0in, 0in, 0in, 0in)" draw:stroke="none" draw:luminance="0%" draw:contrast="0%" draw:image-opacity="100%"/>
    </style:style>
    <style:style style:family="presentation" style:name="a1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5">
      <style:paragraph-properties fo:line-height="100%" fo:text-align="center" style:tab-stop-distance="1in" fo:margin-left="0in" fo:margin-right="0in" fo:text-indent="0in" fo:margin-top="0.17292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in" fo:margin-left="0in" fo:margin-right="0in" fo:text-indent="0in" fo:margin-top="0.17292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3">
      <style:drawing-page-properties draw:fill="gradient" draw:fill-gradient-name="a13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ffff00" style:text-line-through-type="none" style:text-line-through-style="none" style:text-line-through-width="auto" style:text-line-through-color="font-color" style:text-position="0% 100%" fo:font-family="Century Gothic" style:font-family-asian="Arial Unicode MS" style:font-family-complex="Arial Unicode MS" style:font-family-generic="swiss" style:font-pitch="variable" style:font-pitch-asian="variable" style:font-pitch-complex="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00%" fo:text-align="center" style:tab-stop-distance="1in" fo:margin-left="0in" fo:margin-right="0in" fo:text-indent="0in" fo:margin-top="0.17292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ff9900" style:text-line-through-type="none" style:text-line-through-style="none" style:text-line-through-width="auto" style:text-line-through-color="font-color" style:text-position="0% 100%" fo:font-family="Garamond"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6">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91">
      <style:paragraph-properties fo:line-height="100%" fo:text-align="center" style:tab-stop-distance="1in" fo:margin-left="0in" fo:margin-right="0in" fo:text-indent="0in" fo:margin-top="0.17292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2">
      <style:graphic-properties fo:wrap-option="wrap" fo:padding-top="0.05118in" fo:padding-bottom="0.05118in" fo:padding-left="0.09843in" fo:padding-right="0.09843in" draw:textarea-vertical-align="top" draw:textarea-horizontal-align="center" draw:fill="none" draw:stroke="none" draw:auto-grow-width="false" draw:auto-grow-height="true"/>
      <style:paragraph-properties style:font-independent-line-spacing="true" style:writing-mode="lr-tb"/>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ff9900" style:text-line-through-type="none" style:text-line-through-style="none" style:text-line-through-width="auto" style:text-line-through-color="font-color" style:text-position="0% 100%" fo:font-family="Garamond"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799">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paragraph" style:name="a1294">
      <style:paragraph-properties fo:line-height="100%" fo:text-align="center" style:tab-stop-distance="1in" fo:margin-left="0in" fo:margin-right="0in" fo:text-indent="0in" fo:margin-top="0.2083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05118in" fo:padding-bottom="0.05118in" fo:padding-left="0.09843in" fo:padding-right="0.09843in" draw:textarea-vertical-align="top" draw:textarea-horizontal-align="center" draw:fill="none" draw:stroke="none" draw:auto-grow-width="false" draw:auto-grow-height="true"/>
      <style:paragraph-properties style:font-independent-line-spacing="true" style:writing-mode="lr-tb"/>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9">
      <style:graphic-properties draw:fill="solid" draw:fill-color="#729fcf" draw:opacity="100%" draw:stroke="solid" svg:stroke-width="0.02778in" svg:stroke-color="#3465af" svg:stroke-opacity="100%"/>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style:font-family-asian="Symbol" style:font-family-complex="Symbol" style:font-family-generic-asian="roman" style:font-family-generic-complex="roman"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1">
      <style:paragraph-properties fo:line-height="100%" fo:text-align="left" style:tab-stop-distance="1in" fo:margin-left="0.3748in" fo:margin-right="0in" fo:text-indent="-0.3748in" fo:margin-top="0.0965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3748in" fo:margin-right="0in" fo:text-indent="-0.3748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ffff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center" style:tab-stop-distance="1in" fo:margin-left="0in" fo:margin-right="0in" fo:text-indent="0in" fo:margin-top="0.0833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ffff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05118in" fo:padding-bottom="0.05118in" fo:padding-left="0.09843in" fo:padding-right="0.09843in" draw:textarea-vertical-align="top" draw:textarea-horizontal-align="center" draw:fill="none" draw:stroke="none" draw:auto-grow-width="false" draw:auto-grow-height="true"/>
      <style:paragraph-properties style:font-independent-line-spacing="true" style:writing-mode="lr-tb"/>
    </style:style>
    <style:style style:family="paragraph" style:name="a1038">
      <style:paragraph-properties fo:line-height="100%" fo:text-align="center" style:tab-stop-distance="1in" fo:margin-left="0in" fo:margin-right="0in" fo:text-indent="0in" fo:margin-top="0.0833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9">
      <style:graphic-properties fo:wrap-option="wrap" fo:padding-top="0.05118in" fo:padding-bottom="0.05118in" fo:padding-left="0.09843in" fo:padding-right="0.09843in" draw:textarea-vertical-align="top" draw:textarea-horizontal-align="center" draw:fill="none" draw:stroke="none" draw:auto-grow-width="false" draw:auto-grow-height="true"/>
      <style:paragraph-properties style:font-independent-line-spacing="true" style:writing-mode="lr-tb"/>
    </style:style>
    <style:style style:family="paragraph" style:name="a812">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4">
      <style:graphic-properties draw:fill="solid" draw:fill-color="#729fcf" draw:opacity="100%" draw:stroke="solid" svg:stroke-width="0.02778in" svg:stroke-color="#3465af" svg:stroke-opacity="100%"/>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no-wrap" fo:padding-top="0.05118in" fo:padding-bottom="0.05118in" fo:padding-left="0.09843in" fo:padding-right="0.09843in" draw:textarea-vertical-align="middle" draw:textarea-horizontal-align="left" draw:fill="solid" draw:fill-color="#008080" draw:opacity="100%" draw:stroke="dash" draw:stroke-dash="a1309" svg:stroke-width="0.02795in" svg:stroke-color="#ff0000" svg:stroke-opacity="100%" draw:stroke-linejoin="miter" svg:stroke-linecap="square" draw:auto-grow-width="false" draw:auto-grow-height="false"/>
      <style:paragraph-properties style:font-independent-line-spacing="true" style:writing-mode="lr-tb"/>
    </style:style>
    <style:style style:family="paragraph" style:name="a816">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7">
      <style:graphic-properties fo:wrap-option="wrap" fo:padding-top="0.05118in" fo:padding-bottom="0.05118in" fo:padding-left="0.09843in" fo:padding-right="0.09843in" draw:textarea-vertical-align="top" draw:textarea-horizontal-align="left" draw:fill="solid" draw:fill-color="#ffffff" draw:opacity="100%" draw:stroke="solid" svg:stroke-width="0.01024in" svg:stroke-color="#000000" svg:stroke-opacity="100%" draw:stroke-linejoin="miter" svg:stroke-linecap="square" draw:auto-grow-width="false" draw:auto-grow-height="false"/>
      <style:paragraph-properties style:font-independent-line-spacing="true" style:writing-mode="lr-tb"/>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3">
      <style:graphic-properties fo:wrap-option="no-wrap" fo:padding-top="0.05118in" fo:padding-bottom="0.05118in" fo:padding-left="0.09843in" fo:padding-right="0.09843in" draw:textarea-vertical-align="middle" draw:textarea-horizontal-align="left" draw:fill="solid" draw:fill-color="#ffffff" draw:opacity="100%" draw:stroke="solid" svg:stroke-width="0.02795in" svg:stroke-color="#4d4d4d" svg:stroke-opacity="100%" draw:stroke-linejoin="miter" svg:stroke-linecap="square" draw:auto-grow-width="false" draw:auto-grow-height="false"/>
      <style:paragraph-properties style:font-independent-line-spacing="true" style:writing-mode="lr-tb"/>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no-wrap" fo:padding-top="0.05118in" fo:padding-bottom="0.05118in" fo:padding-left="0.09843in" fo:padding-right="0.09843in" draw:textarea-vertical-align="middle" draw:textarea-horizontal-align="left" draw:fill="none" draw:stroke="solid" svg:stroke-width="0.02087in" svg:stroke-color="#ffffff" svg:stroke-opacity="100%" draw:stroke-linejoin="miter" svg:stroke-linecap="square" draw:auto-grow-width="false" draw:auto-grow-height="false"/>
      <style:paragraph-properties style:font-independent-line-spacing="true" style:writing-mode="lr-tb"/>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no-wrap" fo:padding-top="0.05118in" fo:padding-bottom="0.05118in" fo:padding-left="0.09843in" fo:padding-right="0.09843in" draw:textarea-vertical-align="middle" draw:textarea-horizontal-align="left" draw:fill="none" draw:stroke="solid" svg:stroke-width="0.02087in" svg:stroke-color="#ffffff" svg:stroke-opacity="100%" draw:stroke-linejoin="miter" svg:stroke-linecap="square" draw:auto-grow-width="false" draw:auto-grow-height="false"/>
      <style:paragraph-properties style:font-independent-line-spacing="true" style:writing-mode="lr-tb"/>
    </style:style>
    <style:style style:family="text" style:name="a1040">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1">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2">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100%" fo:text-align="center" style:tab-stop-distance="1in" fo:margin-left="0in" fo:margin-right="0in" fo:text-indent="0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5">
      <style:paragraph-properties fo:line-height="100%" fo:text-align="center" style:tab-stop-distance="1in" fo:margin-left="0in" fo:margin-right="0in" fo:text-indent="0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1047" style:parent-style-name="Graphics">
      <style:graphic-properties draw:fill="none" fo:clip="rect(0in, 0in, 0in, 0in)" draw:stroke="none" draw:luminance="0%" draw:contrast="0%" draw:image-opacity="100%"/>
    </style:style>
    <style:style style:family="drawing-page" style:name="a820">
      <style:drawing-page-properties draw:fill="gradient" draw:fill-gradient-name="a8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00" style:text-line-through-type="none" style:text-line-through-style="none" style:text-line-through-width="auto" style:text-line-through-color="font-color" style:text-position="0% 100%" fo:font-family="Century Gothic" style:font-family-asian="Arial Unicode MS" style:font-family-complex="Arial Unicode MS" style:font-family-generic="swiss"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100%" fo:text-align="left" style:tab-stop-distance="1in" fo:margin-left="0in" fo:margin-right="0in" fo:text-indent="0in" fo:margin-top="0.0965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22">
      <style:graphic-properties fo:wrap-option="no-wrap" fo:padding-top="0.05118in" fo:padding-bottom="0.05118in" fo:padding-left="0.09843in" fo:padding-right="0.09843in" draw:textarea-vertical-align="middle" draw:textarea-horizontal-align="left" draw:fill="none" draw:stroke="solid" svg:stroke-width="0.02087in" svg:stroke-color="#ffffff" svg:stroke-opacity="100%" draw:stroke-linejoin="miter" svg:stroke-linecap="square" draw:auto-grow-width="false" draw:auto-grow-height="false"/>
      <style:paragraph-properties style:font-independent-line-spacing="true" style:writing-mode="lr-tb"/>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0833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no-wrap" fo:padding-top="0.05118in" fo:padding-bottom="0.05118in" fo:padding-left="0.09843in" fo:padding-right="0.09843in" draw:textarea-vertical-align="middle" draw:textarea-horizontal-align="left" draw:fill="none" draw:stroke="solid" svg:stroke-width="0.02087in" svg:stroke-color="#ffffff" svg:stroke-opacity="100%" draw:stroke-linejoin="miter" svg:stroke-linecap="square" draw:auto-grow-width="false" draw:auto-grow-height="false"/>
      <style:paragraph-properties style:font-independent-line-spacing="true" style:writing-mode="lr-tb"/>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no-wrap" fo:padding-top="0.05118in" fo:padding-bottom="0.05118in" fo:padding-left="0.09843in" fo:padding-right="0.09843in" draw:textarea-vertical-align="middle" draw:textarea-horizontal-align="left" draw:fill="none" draw:stroke="solid" svg:stroke-width="0.0311in" svg:stroke-color="#ffffff" svg:stroke-opacity="100%" draw:stroke-linejoin="miter" svg:stroke-linecap="square" draw:auto-grow-width="false" draw:auto-grow-height="false"/>
      <style:paragraph-properties style:font-independent-line-spacing="true" style:writing-mode="lr-tb"/>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1054" style:parent-style-name="Graphics">
      <style:graphic-properties draw:fill="none" fo:clip="rect(0in, 0in, 0in, 0in)" draw:stroke="none" draw:luminance="0%" draw:contrast="0%" draw:image-opacity="100%"/>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0833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left" style:tab-stop-distance="1in" fo:margin-left="0in" fo:margin-right="0in" fo:text-indent="0in" fo:margin-top="0.0833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graphic" style:name="a1331">
      <style:graphic-properties fo:wrap-option="no-wrap" fo:padding-top="0.05118in" fo:padding-bottom="0.05118in" fo:padding-left="0.09843in" fo:padding-right="0.09843in" draw:textarea-vertical-align="middle" draw:textarea-horizontal-align="left" draw:fill="none" draw:stroke="solid" svg:stroke-width="0.0311in" svg:stroke-color="#ffffff" svg:stroke-opacity="100%" draw:stroke-linejoin="miter" svg:stroke-linecap="square" draw:auto-grow-width="false" draw:auto-grow-height="false"/>
      <style:paragraph-properties style:font-independent-line-spacing="true" style:writing-mode="lr-tb"/>
    </style:style>
    <style:style style:family="text" style:name="a837">
      <style:text-properties fo:font-variant="normal" fo:text-transform="none" fo:color="#ff0066"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left" style:tab-stop-distance="1in" fo:margin-left="0.3748in" fo:margin-right="0in" fo:text-indent="-0.3748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no-wrap" fo:padding-top="0.05118in" fo:padding-bottom="0.05118in" fo:padding-left="0.09843in" fo:padding-right="0.09843in" draw:textarea-vertical-align="middle" draw:textarea-horizontal-align="left" draw:fill="none" draw:stroke="solid" svg:stroke-width="0.0311in" svg:stroke-color="#ffffff" svg:stroke-opacity="100%" draw:stroke-linejoin="miter" svg:stroke-linecap="square" draw:auto-grow-width="false" draw:auto-grow-height="false"/>
      <style:paragraph-properties style:font-independent-line-spacing="true" style:writing-mode="lr-tb"/>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no-wrap" fo:padding-top="0.05118in" fo:padding-bottom="0.05118in" fo:padding-left="0.09843in" fo:padding-right="0.09843in" draw:textarea-vertical-align="middle" draw:textarea-horizontal-align="left" draw:fill="none" draw:stroke="solid" svg:stroke-width="0.02087in" svg:stroke-color="#ffffff" svg:stroke-opacity="100%" draw:stroke-linejoin="miter" svg:stroke-linecap="square" draw:auto-grow-width="false" draw:auto-grow-height="false"/>
      <style:paragraph-properties style:font-independent-line-spacing="true" style:writing-mode="lr-tb"/>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1">
      <style:graphic-properties draw:fill="solid" draw:fill-color="#729fcf" draw:opacity="100%" draw:stroke="solid" svg:stroke-width="0.02778in" svg:stroke-color="#3465af" svg:stroke-opacity="100%"/>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5">
      <style:drawing-page-properties draw:fill="gradient" draw:fill-gradient-name="a106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6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840">
      <style:text-properties fo:font-variant="normal" fo:text-transform="none" fo:color="#ff9900"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3748in" fo:margin-right="0in" fo:text-indent="-0.3748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843" style:parent-style-name="Graphics">
      <style:graphic-properties draw:fill="none" fo:clip="rect(0in, 0in, 0in, 0in)" draw:stroke="none" draw:luminance="0%" draw:contrast="0%" draw:image-opacity="100%"/>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40">
      <style:graphic-properties fo:wrap-option="no-wrap" fo:padding-top="0.05118in" fo:padding-bottom="0.05118in" fo:padding-left="0.09843in" fo:padding-right="0.09843in" draw:textarea-vertical-align="middle" draw:textarea-horizontal-align="left" draw:fill="none" draw:stroke="solid" svg:stroke-width="0.08346in" svg:stroke-color="#000080" svg:stroke-opacity="100%" draw:stroke-linejoin="miter" svg:stroke-linecap="square" draw:auto-grow-width="false" draw:auto-grow-height="false"/>
      <style:paragraph-properties style:font-independent-line-spacing="true" style:writing-mode="lr-tb"/>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center" style:tab-stop-distance="1in" fo:margin-left="0in" fo:margin-right="0in" fo:text-indent="0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43">
      <style:graphic-properties fo:wrap-option="wrap" fo:padding-top="0.05118in" fo:padding-bottom="0.05118in" fo:padding-left="0.09843in" fo:padding-right="0.09843in" draw:textarea-vertical-align="top" draw:textarea-horizontal-align="left" draw:fill="none" draw:stroke="solid" svg:stroke-width="0.01024in" svg:stroke-color="#ffffff" svg:stroke-opacity="100%" draw:stroke-linejoin="round" svg:stroke-linecap="square" draw:auto-grow-width="false" draw:auto-grow-height="false"/>
      <style:paragraph-properties style:font-independent-line-spacing="true" style:writing-mode="lr-tb"/>
    </style:style>
    <style:style style:family="paragraph" style:name="a849">
      <style:paragraph-properties fo:line-height="100%" fo:text-align="center" style:tab-stop-distance="1in" fo:margin-left="0in" fo:margin-right="0in" fo:text-indent="0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2083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05118in" fo:padding-bottom="0.05118in" fo:padding-left="0.09843in" fo:padding-right="0.09843in" draw:textarea-vertical-align="top" draw:textarea-horizontal-align="left" draw:fill="solid" draw:fill-color="#4d4d4d" draw:opacity="100%" draw:stroke="solid" svg:stroke-width="0.01024in" svg:stroke-color="#ffffff" svg:stroke-opacity="100%" draw:stroke-linejoin="miter" svg:stroke-linecap="square" draw:auto-grow-width="false" draw:auto-grow-height="true"/>
      <style:paragraph-properties style:font-independent-line-spacing="true" style:writing-mode="lr-tb"/>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no-wrap" fo:padding-top="0.05118in" fo:padding-bottom="0.05118in" fo:padding-left="0.09843in" fo:padding-right="0.09843in" draw:textarea-vertical-align="middle" draw:textarea-horizontal-align="left" draw:fill="solid" draw:fill-color="#ff9900" draw:opacity="100%" draw:stroke="solid" svg:stroke-width="0.01024in" svg:stroke-color="#ffffff" svg:stroke-opacity="100%" draw:stroke-linejoin="miter" svg:stroke-linecap="square" draw:auto-grow-width="false" draw:auto-grow-height="false"/>
      <style:paragraph-properties style:font-independent-line-spacing="true" style:writing-mode="lr-tb"/>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4">
      <style:paragraph-properties fo:line-height="100%" fo:text-align="center" style:tab-stop-distance="1in" fo:margin-left="0in" fo:margin-right="0in" fo:text-indent="0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3">
      <style:graphic-properties fo:wrap-option="wrap" fo:padding-top="0.05118in" fo:padding-bottom="0.05118in" fo:padding-left="0.09843in" fo:padding-right="0.09843in" draw:textarea-vertical-align="top" draw:textarea-horizontal-align="left" draw:fill="none" draw:stroke="solid" svg:stroke-width="0.01024in" svg:stroke-color="#ff0000" draw:marker-end="a1352" svg:stroke-opacity="100%" draw:stroke-linejoin="miter" svg:stroke-linecap="square" draw:auto-grow-width="false" draw:auto-grow-height="false"/>
      <style:paragraph-properties style:font-independent-line-spacing="true" style:writing-mode="lr-tb"/>
    </style:style>
    <style:style style:family="paragraph" style:name="a859">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118in" fo:padding-bottom="0.05118in" fo:padding-left="0.09843in" fo:padding-right="0.09843in" draw:textarea-vertical-align="top" draw:textarea-horizontal-align="left" draw:fill="none" draw:stroke="solid" svg:stroke-width="0.01024in" svg:stroke-color="#ff0000" draw:marker-end="a1356" svg:stroke-opacity="100%" draw:stroke-linejoin="miter" svg:stroke-linecap="square" draw:auto-grow-width="false" draw:auto-grow-height="false"/>
      <style:paragraph-properties style:font-independent-line-spacing="true" style:writing-mode="lr-tb"/>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6">
      <style:drawing-page-properties draw:fill="gradient" draw:fill-gradient-name="a5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83">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text" style:name="a588">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99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graphic" style:name="a1089">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presentation" style:name="a861">
      <style:graphic-properties draw:fill="solid" draw:fill-color="#729fcf" draw:opacity="100%" draw:stroke="solid" svg:stroke-width="0.02778in" svg:stroke-color="#3465af" svg:stroke-opacity="100%"/>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5">
      <style:drawing-page-properties draw:fill="gradient" draw:fill-gradient-name="a86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6">
      <style:text-properties fo:font-variant="normal" fo:text-transform="none" fo:color="#ff9900" style:text-line-through-type="none" style:text-line-through-style="none" style:text-line-through-width="auto" style:text-line-through-color="font-color" style:text-position="0% 100%" fo:font-family="Century Gothic" style:font-family-asian="Arial Unicode MS" style:font-family-complex="Arial Unicode MS" style:font-family-generic="swiss"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61">
      <style:graphic-properties fo:wrap-option="wrap" fo:padding-top="0.05118in" fo:padding-bottom="0.05118in" fo:padding-left="0.09843in" fo:padding-right="0.09843in" draw:textarea-vertical-align="top" draw:textarea-horizontal-align="left" draw:fill="none" draw:stroke="dash" draw:stroke-dash="a1360" svg:stroke-width="0.01024in" svg:stroke-color="#ff0000" svg:stroke-opacity="100%" draw:stroke-linejoin="miter" svg:stroke-linecap="square" draw:auto-grow-width="false" draw:auto-grow-height="false"/>
      <style:paragraph-properties style:font-independent-line-spacing="true" style:writing-mode="lr-tb"/>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8">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parent-style-name="Graphics">
      <style:graphic-properties draw:fill="none" fo:clip="rect(0in, 0in, 0.55587in, 0.52676in)" draw:stroke="none" draw:luminance="0%" draw:contrast="0%" draw:image-opacity="100%"/>
    </style:style>
    <style:style style:family="graphic" style:name="a1364">
      <style:graphic-properties fo:wrap-option="no-wrap" fo:padding-top="0.05118in" fo:padding-bottom="0.05118in" fo:padding-left="0.09843in" fo:padding-right="0.09843in" draw:textarea-vertical-align="middle" draw:textarea-horizontal-align="left" draw:fill="solid" draw:fill-color="#ff0000" draw:opacity="100%" draw:stroke="solid" svg:stroke-width="0.01024in" svg:stroke-color="#ffffff" svg:stroke-opacity="100%" draw:stroke-linejoin="miter" svg:stroke-linecap="square" draw:auto-grow-width="false" draw:auto-grow-height="false"/>
      <style:paragraph-properties style:font-independent-line-spacing="true" style:writing-mode="lr-tb"/>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wrap" fo:padding-top="0.05118in" fo:padding-bottom="0.05118in" fo:padding-left="0.09843in" fo:padding-right="0.09843in" draw:textarea-vertical-align="top" draw:textarea-horizontal-align="left" draw:fill="none" draw:stroke="solid" svg:stroke-width="0.01024in" svg:stroke-color="#ff9900" svg:stroke-opacity="100%" draw:stroke-linejoin="miter" svg:stroke-linecap="square" draw:auto-grow-width="false" draw:auto-grow-height="false"/>
      <style:paragraph-properties style:font-independent-line-spacing="true" style:writing-mode="lr-tb"/>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ffcc66"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1">
      <style:text-properties fo:font-variant="normal" fo:text-transform="none" fo:color="#ffcc66"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2">
      <style:text-properties fo:font-variant="normal" fo:text-transform="none" fo:color="#ffcc66"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3">
      <style:text-properties fo:font-variant="normal" fo:text-transform="none" fo:color="#ffcc66"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4">
      <style:text-properties fo:font-variant="normal" fo:text-transform="none" fo:color="#ffcc66"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ffcc66"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0">
      <style:text-properties fo:font-variant="normal" fo:text-transform="none" fo:color="#ff99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01">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text" style:name="a606">
      <style:text-properties fo:font-variant="normal" fo:text-transform="none" fo:color="#ffcc66"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1">
      <style:text-properties fo:font-variant="normal" fo:text-transform="none" fo:color="#ff9900" style:text-line-through-type="none" style:text-line-through-style="none" style:text-line-through-width="auto" style:text-line-through-color="font-color" style:text-position="0% 100%" fo:font-family="Century Gothic"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cc66"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2">
      <style:text-properties fo:font-variant="normal" fo:text-transform="none" fo:color="#ff9900" style:text-line-through-type="none" style:text-line-through-style="none" style:text-line-through-width="auto" style:text-line-through-color="font-color" style:text-position="0% 100%" fo:font-family="Century Gothic"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ffcc66"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3">
      <style:text-properties fo:font-variant="normal" fo:text-transform="none" fo:color="#ff9900" style:text-line-through-type="none" style:text-line-through-style="none" style:text-line-through-width="auto" style:text-line-through-color="font-color" style:text-position="0% 100%" fo:font-family="Century Gothic"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04">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paragraph" style:name="a609">
      <style:paragraph-properties fo:line-height="100%" fo:text-align="center" style:tab-stop-distance="1in" fo:margin-left="0in" fo:margin-right="0in" fo:text-indent="0in" fo:margin-top="0.11111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ffcc66"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paragraph" style:name="a597">
      <style:paragraph-properties fo:line-height="100%" fo:text-align="center" style:tab-stop-distance="1in" fo:margin-left="0in" fo:margin-right="0in" fo:text-indent="0in" fo:margin-top="0.11111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cc66"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cc66"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paragraph" style:name="a871">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3">
      <style:graphic-properties draw:fill="solid" draw:fill-color="#729fcf" draw:opacity="100%" draw:stroke="solid" svg:stroke-width="0.02778in" svg:stroke-color="#3465af" svg:stroke-opacity="100%"/>
    </style:style>
    <style:style style:family="presentation" style:name="a8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70">
      <style:graphic-properties fo:wrap-option="no-wrap" fo:padding-top="0.05118in" fo:padding-bottom="0.05118in" fo:padding-left="0.09843in" fo:padding-right="0.09843in" draw:textarea-vertical-align="middle" draw:textarea-horizontal-align="left" draw:fill="solid" draw:fill-color="#000080" draw:opacity="100%" draw:stroke="solid" svg:stroke-width="0.01024in" svg:stroke-color="#ffffff" svg:stroke-opacity="100%" draw:stroke-linejoin="miter" svg:stroke-linecap="square" draw:auto-grow-width="false" draw:auto-grow-height="false"/>
      <style:paragraph-properties style:font-independent-line-spacing="true" style:writing-mode="lr-tb"/>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7">
      <style:drawing-page-properties draw:fill="gradient" draw:fill-gradient-name="a87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parent-style-name="Graphics">
      <style:graphic-properties draw:fill="none" fo:clip="rect(0in, 0in, 0in, 0in)" draw:stroke="none" draw:luminance="0%" draw:contrast="0%" draw:image-opacity="100%"/>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no-wrap" fo:padding-top="0.05118in" fo:padding-bottom="0.05118in" fo:padding-left="0.09843in" fo:padding-right="0.09843in" draw:textarea-vertical-align="middle" draw:textarea-horizontal-align="left" draw:fill="none" draw:stroke="solid" svg:stroke-width="0.01024in" svg:stroke-color="#000080" draw:marker-end="a1373" svg:stroke-opacity="100%" draw:stroke-linejoin="miter" svg:stroke-linecap="square" draw:auto-grow-width="false" draw:auto-grow-height="false"/>
      <style:paragraph-properties style:font-independent-line-spacing="true" style:writing-mode="lr-tb"/>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no-wrap" fo:padding-top="0.05118in" fo:padding-bottom="0.05118in" fo:padding-left="0.09843in" fo:padding-right="0.09843in" draw:textarea-vertical-align="middle" draw:textarea-horizontal-align="left" draw:fill="none" draw:stroke="solid" svg:stroke-width="0.01024in" svg:stroke-color="#000080" draw:marker-end="a1377" svg:stroke-opacity="100%" draw:stroke-linejoin="miter" svg:stroke-linecap="square" draw:auto-grow-width="false" draw:auto-grow-height="false"/>
      <style:paragraph-properties style:font-independent-line-spacing="true" style:writing-mode="lr-tb"/>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cc66"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1">
      <style:paragraph-properties fo:line-height="100%" fo:text-align="center" style:tab-stop-distance="1in" fo:margin-left="0in" fo:margin-right="0in" fo:text-indent="0in" fo:margin-top="0.11111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ffcc66"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3">
      <style:paragraph-properties fo:line-height="100%" fo:text-align="center" style:tab-stop-distance="1in" fo:margin-left="0in" fo:margin-right="0in" fo:text-indent="0in" fo:margin-top="0.11111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ffcc66" style:text-line-through-type="none" style:text-line-through-style="none" style:text-line-through-width="auto" style:text-line-through-color="font-color" style:text-position="0% 100%" fo:font-family="Comic Sans MS" style:font-family-generic="script"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10">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paragraph" style:name="a615">
      <style:paragraph-properties fo:line-height="100%" fo:text-align="center" style:tab-stop-distance="1in" fo:margin-left="0in" fo:margin-right="0in" fo:text-indent="0in" fo:margin-top="0.11111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center" style:tab-stop-distance="1in" fo:margin-left="0in" fo:margin-right="0in" fo:text-indent="0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1">
      <style:graphic-properties fo:wrap-option="no-wrap" fo:padding-top="0.05118in" fo:padding-bottom="0.05118in" fo:padding-left="0.09843in" fo:padding-right="0.09843in" draw:textarea-vertical-align="middle" draw:textarea-horizontal-align="left" draw:fill="none" draw:stroke="solid" svg:stroke-width="0.01024in" svg:stroke-color="#000080" svg:stroke-opacity="100%" draw:stroke-linejoin="miter" svg:stroke-linecap="square" draw:auto-grow-width="false" draw:auto-grow-height="fals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1385">
      <style:graphic-properties fo:wrap-option="wrap" fo:padding-top="0.05118in" fo:padding-bottom="0.05118in" fo:padding-left="0.09843in" fo:padding-right="0.09843in" draw:textarea-vertical-align="top" draw:textarea-horizontal-align="left" draw:fill="none" draw:stroke="solid" svg:stroke-width="0.01024in" svg:stroke-color="#ff9900" draw:marker-end="a1384" svg:stroke-opacity="100%" draw:stroke-linejoin="miter" svg:stroke-linecap="square" draw:auto-grow-width="false" draw:auto-grow-height="false"/>
      <style:paragraph-properties style:font-independent-line-spacing="true" style:writing-mode="lr-tb"/>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no-wrap" fo:padding-top="0.05118in" fo:padding-bottom="0.05118in" fo:padding-left="0.09843in" fo:padding-right="0.09843in" draw:textarea-vertical-align="middle" draw:textarea-horizontal-align="left" draw:fill="solid" draw:fill-color="#ff9900" draw:opacity="100%" draw:stroke="solid" svg:stroke-width="0.01024in" svg:stroke-color="#ffffff" svg:stroke-opacity="100%" draw:stroke-linejoin="miter" svg:stroke-linecap="square" draw:auto-grow-width="false" draw:auto-grow-height="false"/>
      <style:paragraph-properties style:font-independent-line-spacing="true" style:writing-mode="lr-tb"/>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1">
      <style:paragraph-properties fo:line-height="100%" fo:text-align="center" style:tab-stop-distance="1in" fo:margin-left="0in" fo:margin-right="0in" fo:text-indent="0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3">
      <style:paragraph-properties fo:line-height="100%" fo:text-align="center" style:tab-stop-distance="1in" fo:margin-left="0in" fo:margin-right="0in" fo:text-indent="0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graphic" style:name="a1122">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presentation" style:name="a628">
      <style:graphic-properties draw:fill="solid" draw:fill-color="#729fcf" draw:opacity="100%" draw:stroke="solid" svg:stroke-width="0.02778in" svg:stroke-color="#3465af" svg:stroke-opacity="100%"/>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no-wrap" fo:padding-top="0.05118in" fo:padding-bottom="0.05118in" fo:padding-left="0.09843in" fo:padding-right="0.09843in" draw:textarea-vertical-align="middle" draw:textarea-horizontal-align="left" draw:fill="none" draw:stroke="solid" svg:stroke-width="0.05551in" svg:stroke-color="#ffffff" svg:stroke-opacity="100%" draw:stroke-linejoin="miter" svg:stroke-linecap="square" draw:auto-grow-width="false" draw:auto-grow-height="false"/>
      <style:paragraph-properties style:font-independent-line-spacing="true" style:writing-mode="lr-tb"/>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no-wrap" fo:padding-top="0.05118in" fo:padding-bottom="0.05118in" fo:padding-left="0.09843in" fo:padding-right="0.09843in" draw:textarea-vertical-align="middle" draw:textarea-horizontal-align="left" draw:fill="none" draw:stroke="solid" svg:stroke-width="0.02795in" svg:stroke-color="#ffffff" svg:stroke-opacity="100%" draw:stroke-linejoin="miter" svg:stroke-linecap="square" draw:auto-grow-width="false" draw:auto-grow-height="false"/>
      <style:paragraph-properties style:font-independent-line-spacing="true" style:writing-mode="lr-tb"/>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9" style:parent-style-name="Graphics">
      <style:graphic-properties draw:fill="none" fo:clip="rect(0in, 0in, 0in, 0in)" draw:stroke="none" draw:luminance="0%" draw:contrast="0%" draw:image-opacity="100%"/>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892">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graphic" style:name="a1402">
      <style:graphic-properties fo:wrap-option="wrap" fo:padding-top="0.05118in" fo:padding-bottom="0.05118in" fo:padding-left="0.09843in" fo:padding-right="0.09843in" draw:textarea-vertical-align="top" draw:textarea-horizontal-align="left" draw:fill="none" draw:stroke="solid" svg:stroke-width="0.01024in" svg:stroke-color="#ff9900" svg:stroke-opacity="100%" draw:stroke-linejoin="miter" svg:stroke-linecap="square" draw:auto-grow-width="false" draw:auto-grow-height="fals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3">
      <style:graphic-properties draw:fill="solid" draw:fill-color="#729fcf" draw:opacity="100%" draw:stroke="solid" svg:stroke-width="0.02778in" svg:stroke-color="#3465af" svg:stroke-opacity="100%"/>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no-wrap" fo:padding-top="0.05118in" fo:padding-bottom="0.05118in" fo:padding-left="0.09843in" fo:padding-right="0.09843in" draw:textarea-vertical-align="middle" draw:textarea-horizontal-align="left" draw:fill="solid" draw:fill-color="#ff9900" draw:opacity="100%" draw:stroke="solid" svg:stroke-width="0.01024in" svg:stroke-color="#ffffff" svg:stroke-opacity="100%" draw:stroke-linejoin="miter" svg:stroke-linecap="square" draw:auto-grow-width="false" draw:auto-grow-height="false"/>
      <style:paragraph-properties style:font-independent-line-spacing="true" style:writing-mode="lr-tb"/>
    </style:style>
    <style:style style:family="graphic" style:name="a1406">
      <style:graphic-properties fo:wrap-option="wrap" fo:padding-top="0.05118in" fo:padding-bottom="0.05118in" fo:padding-left="0.09843in" fo:padding-right="0.09843in" draw:textarea-vertical-align="top" draw:textarea-horizontal-align="left" draw:fill="none" draw:stroke="solid" svg:stroke-width="0.01024in" svg:stroke-color="#ff9900" draw:marker-end="a1405" svg:stroke-opacity="100%" draw:stroke-linejoin="miter" svg:stroke-linecap="square" draw:auto-grow-width="false" draw:auto-grow-height="false"/>
      <style:paragraph-properties style:font-independent-line-spacing="true" style:writing-mode="lr-tb"/>
    </style:style>
    <style:style style:family="drawing-page" style:name="a897">
      <style:drawing-page-properties draw:fill="gradient" draw:fill-gradient-name="a89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parent-style-name="Graphics">
      <style:graphic-properties draw:fill="none" fo:clip="rect(0in, 0in, 0in, 0in)" draw:stroke="none" draw:luminance="0%" draw:contrast="0%" draw:image-opacity="100%"/>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5">
      <style:graphic-properties fo:wrap-option="wrap" fo:padding-top="0.05118in" fo:padding-bottom="0.05118in" fo:padding-left="0.09843in" fo:padding-right="0.09843in" draw:textarea-vertical-align="top" draw:textarea-horizontal-align="left" draw:fill="none" draw:stroke="solid" svg:stroke-width="0.01024in" svg:stroke-color="#ff9900" draw:marker-end="a1394" svg:stroke-opacity="100%" draw:stroke-linejoin="miter" svg:stroke-linecap="square" draw:auto-grow-width="false" draw:auto-grow-height="false"/>
      <style:paragraph-properties style:font-independent-line-spacing="true" style:writing-mode="lr-tb"/>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9">
      <style:graphic-properties fo:wrap-option="wrap" fo:padding-top="0.05118in" fo:padding-bottom="0.05118in" fo:padding-left="0.09843in" fo:padding-right="0.09843in" draw:textarea-vertical-align="top" draw:textarea-horizontal-align="left" draw:fill="none" draw:stroke="solid" svg:stroke-width="0.01024in" svg:stroke-color="#ff9900" draw:marker-end="a1398" svg:stroke-opacity="100%" draw:stroke-linejoin="miter" svg:stroke-linecap="square" draw:auto-grow-width="false" draw:auto-grow-height="false"/>
      <style:paragraph-properties style:font-independent-line-spacing="true" style:writing-mode="lr-tb"/>
    </style:style>
    <style:style style:family="drawing-page" style:name="a6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2">
      <style:drawing-page-properties draw:fill="gradient" draw:fill-gradient-name="a6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3748in" fo:margin-right="0in" fo:text-indent="-0.3748in" fo:margin-top="0.0965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132">
      <style:graphic-properties fo:wrap-option="no-wrap" fo:padding-top="0.05118in" fo:padding-bottom="0.05118in" fo:padding-left="0.09843in" fo:padding-right="0.09843in" draw:textarea-vertical-align="middle" draw:textarea-horizontal-align="left" draw:fill="none" draw:stroke="solid" svg:stroke-width="0.02795in" svg:stroke-color="#ff0000" svg:stroke-opacity="100%" draw:stroke-linejoin="miter" svg:stroke-linecap="square" draw:auto-grow-width="false" draw:auto-grow-height="false"/>
      <style:paragraph-properties style:font-independent-line-spacing="true" style:writing-mode="lr-tb"/>
    </style:style>
    <style:style style:family="paragraph" style:name="a638">
      <style:paragraph-properties fo:line-height="100%" fo:text-align="left" style:tab-stop-distance="1in" fo:margin-left="0.3748in" fo:margin-right="0in" fo:text-indent="-0.3748in" fo:margin-top="0.0965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no-wrap" fo:padding-top="0.05118in" fo:padding-bottom="0.05118in" fo:padding-left="0.09843in" fo:padding-right="0.09843in" draw:textarea-vertical-align="middle" draw:textarea-horizontal-align="left" draw:fill="none" draw:stroke="solid" svg:stroke-width="0.02795in" svg:stroke-color="#ffff00" svg:stroke-opacity="100%" draw:stroke-linejoin="miter" svg:stroke-linecap="square" draw:auto-grow-width="false" draw:auto-grow-height="false"/>
      <style:paragraph-properties style:font-independent-line-spacing="true" style:writing-mode="lr-tb"/>
    </style:style>
    <style:style style:family="graphic" style:name="a1136" style:parent-style-name="Graphics">
      <style:graphic-properties draw:fill="none" fo:clip="rect(0in, 0in, 0in, 0in)" draw:stroke="none" draw:luminance="0%" draw:contrast="0%" draw:image-opacity="100%"/>
    </style:style>
    <style:style style:family="graphic" style:name="a1137" style:parent-style-name="Graphics">
      <style:graphic-properties draw:fill="none" draw:stroke="none"/>
    </style:style>
    <style:style style:family="presentation" style:name="a910">
      <style:graphic-properties draw:fill="solid" draw:fill-color="#729fcf" draw:opacity="100%" draw:stroke="solid" svg:stroke-width="0.02778in" svg:stroke-color="#3465af" svg:stroke-opacity="100%"/>
    </style:style>
    <style:style style:family="graphic" style:name="a1138" style:parent-style-name="Graphics">
      <style:graphic-properties draw:fill="none" draw:stroke="none"/>
    </style:style>
    <style:style style:family="presentation" style:name="a9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4">
      <style:drawing-page-properties draw:fill="gradient" draw:fill-gradient-name="a91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5" style:parent-style-name="Graphics">
      <style:graphic-properties draw:fill="none" fo:clip="rect(0in, 0in, 0in, 0in)" draw:stroke="none" draw:luminance="0%" draw:contrast="0%" draw:image-opacity="100%"/>
    </style:style>
    <style:style style:family="text" style:name="a916">
      <style:text-properties fo:font-variant="normal" fo:text-transform="none" fo:color="#ff990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1">
      <style:graphic-properties fo:wrap-option="no-wrap" fo:padding-top="0.05118in" fo:padding-bottom="0.05118in" fo:padding-left="0.09843in" fo:padding-right="0.09843in" draw:textarea-vertical-align="middle" draw:textarea-horizontal-align="left" draw:fill="none" draw:stroke="solid" svg:stroke-width="0.01378in" svg:stroke-color="#ff9900" draw:marker-start="a1409" draw:marker-end="a1410" svg:stroke-opacity="100%" draw:stroke-linejoin="miter" svg:stroke-linecap="square" draw:auto-grow-width="false" draw:auto-grow-height="false"/>
      <style:paragraph-properties style:font-independent-line-spacing="true" style:writing-mode="lr-tb"/>
    </style:style>
    <style:style style:family="text" style:name="a917">
      <style:text-properties fo:font-variant="normal" fo:text-transform="none" fo:color="#ff660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f9900" style:text-line-through-type="none" style:text-line-through-style="none" style:text-line-through-width="auto" style:text-line-through-color="font-color" style:text-position="0% 100%" style:font-family-asian="Symbol" style:font-family-complex="Symbol" style:font-family-generic-asian="roman" style:font-family-generic-complex="roman" style:font-pitch-asian="variable" style:font-pitch-complex="variable" style:font-charset="x-symbo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33cc33"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left" style:tab-stop-distance="1in" fo:margin-left="0in" fo:margin-right="0in" fo:text-indent="0in" fo:margin-top="0.24306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4">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1415">
      <style:text-properties fo:font-variant="normal" fo:text-transform="none" fo:color="#ff9900" style:text-line-through-type="none" style:text-line-through-style="none" style:text-line-through-width="auto" style:text-line-through-color="font-color" style:text-position="0% 100%" style:font-family-asian="Symbol" style:font-family-complex="Symbol" style:font-family-generic-asian="roman" style:font-family-generic-complex="roman" style:font-pitch-asian="variable" style:font-pitch-complex="variable" style:font-charset="x-symbo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6">
      <style:paragraph-properties fo:line-height="100%" fo:text-align="left" style:tab-stop-distance="1in" fo:margin-left="0in" fo:margin-right="0in" fo:text-indent="0in" fo:margin-top="0.24306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7">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3748in" fo:margin-right="0in" fo:text-indent="-0.3748in" fo:margin-top="0.0833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642">
      <style:paragraph-properties fo:line-height="100%" fo:text-align="left" style:tab-stop-distance="1in" fo:margin-left="0in" fo:margin-right="0in" fo:text-indent="0in" fo:margin-top="0.0965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644">
      <style:paragraph-properties fo:line-height="100%" fo:text-align="left" style:tab-stop-distance="1in" fo:margin-left="0.3748in" fo:margin-right="0in" fo:text-indent="-0.3748in" fo:margin-top="0.0965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1in" fo:margin-left="0in" fo:margin-right="0in" fo:text-indent="0in" fo:margin-top="0.0965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graphic" style:name="a647">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2">
      <style:graphic-properties draw:fill="solid" draw:fill-color="#729fcf" draw:opacity="100%" draw:stroke="solid" svg:stroke-width="0.02778in" svg:stroke-color="#3465af" svg:stroke-opacity="100%"/>
    </style:style>
    <style:style style:family="graphic" style:name="a648" style:parent-style-name="Graphics">
      <style:graphic-properties draw:fill="none" fo:clip="rect(0in, 0in, 0in, 0in)" draw:stroke="none" draw:luminance="0%" draw:contrast="0%" draw:image-opacity="100%"/>
    </style:style>
    <style:style style:family="presentation" style:name="a1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6">
      <style:drawing-page-properties draw:fill="gradient" draw:fill-gradient-name="a114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7">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0">
      <style:text-properties fo:font-variant="normal" fo:text-transform="none" fo:color="#cc0066"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1">
      <style:text-properties fo:font-variant="normal" fo:text-transform="none" fo:color="#c0c0c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c0c0c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1420">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ff990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1">
      <style:graphic-properties draw:fill="solid" draw:fill-color="#729fcf" draw:opacity="100%" draw:stroke="solid" svg:stroke-width="0.02778in" svg:stroke-color="#3465af" svg:stroke-opacity="100%"/>
    </style:style>
    <style:style style:family="text" style:name="a927">
      <style:text-properties fo:font-variant="normal" fo:text-transform="none" fo:color="#ff990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6699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6699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5">
      <style:drawing-page-properties draw:fill="gradient" draw:fill-gradient-name="a142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6">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7">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8">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9">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5">
      <style:graphic-properties draw:fill="solid" draw:fill-color="#729fcf" draw:opacity="100%" draw:stroke="solid" svg:stroke-width="0.02778in" svg:stroke-color="#3465af" svg:stroke-opacity="100%"/>
    </style:style>
    <style:style style:family="paragraph" style:name="a115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1">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7">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parent-style-name="Graphics">
      <style:graphic-properties draw:fill="none" fo:clip="rect(0in, 0in, 0in, 0in)" draw:stroke="none" draw:luminance="0%" draw:contrast="0%" draw:image-opacity="100%"/>
    </style:style>
    <style:style style:family="graphic" style:name="a658">
      <style:graphic-properties fo:wrap-option="wrap" fo:padding-top="0.05118in" fo:padding-bottom="0.05118in" fo:padding-left="0.09843in" fo:padding-right="0.09843in" draw:textarea-vertical-align="top" draw:textarea-horizontal-align="left" draw:fill="solid" draw:fill-color="#ffffff" draw:opacity="100%" draw:stroke="solid" svg:stroke-width="0.01024in" svg:stroke-color="#000000" svg:stroke-opacity="100%" draw:stroke-linejoin="miter" svg:stroke-linecap="square" draw:auto-grow-width="false" draw:auto-grow-height="false"/>
      <style:paragraph-properties style:font-independent-line-spacing="true" style:writing-mode="lr-tb"/>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no-wrap" fo:padding-top="0.05118in" fo:padding-bottom="0.05118in" fo:padding-left="0.09843in" fo:padding-right="0.09843in" draw:textarea-vertical-align="middle" draw:textarea-horizontal-align="left" draw:fill="none" draw:stroke="solid" svg:stroke-width="0.06929in" svg:stroke-color="#ff0000" draw:marker-end="a1155" svg:stroke-opacity="100%" draw:stroke-linejoin="miter" svg:stroke-linecap="square" draw:auto-grow-width="false" draw:auto-grow-height="fals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6699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118in" fo:padding-bottom="0.05118in" fo:padding-left="0.09843in" fo:padding-right="0.09843in" draw:textarea-vertical-align="top" draw:textarea-horizontal-align="center" draw:fill="none" draw:stroke="none" draw:auto-grow-width="false" draw:auto-grow-height="true"/>
      <style:paragraph-properties style:font-independent-line-spacing="true" style:writing-mode="lr-tb"/>
    </style:style>
    <style:style style:family="text" style:name="a1430">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graphic" style:name="a938">
      <style:graphic-properties fo:wrap-option="no-wrap" fo:padding-top="0.05118in" fo:padding-bottom="0.05118in" fo:padding-left="0.09843in" fo:padding-right="0.09843in" draw:textarea-vertical-align="middle" draw:textarea-horizontal-align="left" draw:fill="none" draw:stroke="solid" svg:stroke-width="0.04173in" svg:stroke-color="#ffffff" svg:stroke-opacity="100%" draw:stroke-linejoin="miter" svg:stroke-linecap="square" draw:auto-grow-width="false" draw:auto-grow-height="false"/>
      <style:paragraph-properties style:font-independent-line-spacing="true" style:writing-mode="lr-tb"/>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35">
      <style:paragraph-properties fo:line-height="90%" fo:text-align="center" style:tab-stop-distance="1in" fo:margin-left="0.3748in" fo:margin-right="0in" fo:text-indent="-0.3748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38">
      <style:paragraph-properties fo:line-height="90%" fo:text-align="center" style:tab-stop-distance="1in" fo:margin-left="0.3748in" fo:margin-right="0in" fo:text-indent="-0.3748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1">
      <style:drawing-page-properties draw:fill="gradient" draw:fill-gradient-name="a66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2" style:parent-style-name="Graphics">
      <style:graphic-properties draw:fill="none" fo:clip="rect(0in, 0in, 0in, 0in)" draw:stroke="none" draw:luminance="0%" draw:contrast="0%" draw:image-opacity="100%"/>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graphic" style:name="a1160">
      <style:graphic-properties fo:wrap-option="no-wrap" fo:padding-top="0.05118in" fo:padding-bottom="0.05118in" fo:padding-left="0.09843in" fo:padding-right="0.09843in" draw:textarea-vertical-align="middle" draw:textarea-horizontal-align="left" draw:fill="none" draw:stroke="solid" svg:stroke-width="0.06929in" svg:stroke-color="#ff0000" draw:marker-end="a1159" svg:stroke-opacity="100%" draw:stroke-linejoin="miter" svg:stroke-linecap="square" draw:auto-grow-width="false" draw:auto-grow-height="false"/>
      <style:paragraph-properties style:font-independent-line-spacing="true" style:writing-mode="lr-tb"/>
    </style:style>
    <style:style style:family="presentation" style:name="a666">
      <style:graphic-properties draw:fill="solid" draw:fill-color="#729fcf" draw:opacity="100%" draw:stroke="solid" svg:stroke-width="0.02778in" svg:stroke-color="#3465af" svg:stroke-opacity="100%"/>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4">
      <style:graphic-properties fo:wrap-option="no-wrap" fo:padding-top="0.05118in" fo:padding-bottom="0.05118in" fo:padding-left="0.09843in" fo:padding-right="0.09843in" draw:textarea-vertical-align="middle" draw:textarea-horizontal-align="left" draw:fill="none" draw:stroke="solid" svg:stroke-width="0.06929in" svg:stroke-color="#ff0000" draw:marker-end="a1163" svg:stroke-opacity="100%" draw:stroke-linejoin="miter" svg:stroke-linecap="square" draw:auto-grow-width="false" draw:auto-grow-height="false"/>
      <style:paragraph-properties style:font-independent-line-spacing="true" style:writing-mode="lr-tb"/>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no-wrap" fo:padding-top="0.05118in" fo:padding-bottom="0.05118in" fo:padding-left="0.09843in" fo:padding-right="0.09843in" draw:textarea-vertical-align="middle" draw:textarea-horizontal-align="left" draw:fill="none" draw:stroke="solid" svg:stroke-width="0.06929in" svg:stroke-color="#ff0000" draw:marker-end="a1167" svg:stroke-opacity="100%" draw:stroke-linejoin="miter" svg:stroke-linecap="square" draw:auto-grow-width="false" draw:auto-grow-height="false"/>
      <style:paragraph-properties style:font-independent-line-spacing="true" style:writing-mode="lr-tb"/>
    </style:style>
    <style:style style:family="graphic" style:name="a941">
      <style:graphic-properties fo:wrap-option="no-wrap" fo:padding-top="0.05118in" fo:padding-bottom="0.05118in" fo:padding-left="0.09843in" fo:padding-right="0.09843in" draw:textarea-vertical-align="middle" draw:textarea-horizontal-align="left" draw:fill="none" draw:stroke="solid" svg:stroke-width="0.04173in" svg:stroke-color="#ffffff" svg:stroke-opacity="100%" draw:stroke-linejoin="miter" svg:stroke-linecap="square" draw:auto-grow-width="false" draw:auto-grow-height="false"/>
      <style:paragraph-properties style:font-independent-line-spacing="true" style:writing-mode="lr-tb"/>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5">
      <style:graphic-properties draw:fill="solid" draw:fill-color="#729fcf" draw:opacity="100%" draw:stroke="solid" svg:stroke-width="0.02778in" svg:stroke-color="#3465af" svg:stroke-opacity="100%"/>
    </style:style>
    <style:style style:family="text" style:name="a1440">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1">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9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2">
      <style:paragraph-properties fo:line-height="90%" fo:text-align="center" style:tab-stop-distance="1in" fo:margin-left="0.3748in" fo:margin-right="0in" fo:text-indent="-0.3748in" fo:margin-top="0.09653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9">
      <style:drawing-page-properties draw:fill="gradient" draw:fill-gradient-name="a94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4">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45">
      <style:paragraph-properties fo:line-height="90%" fo:text-align="center" style:tab-stop-distance="1in" fo:margin-left="0in" fo:margin-right="0in" fo:text-indent="0in" fo:margin-top="0.09653in" fo:margin-bottom="0in" style:punctuation-wrap="hanging" style:vertical-align="auto" style:writing-mode="lr-tb">
        <style:tab-stops>
          <style:tab-stop style:position="0.9996in"/>
          <style:tab-stop style:position="1.9996in"/>
          <style:tab-stop style:position="2.9996in"/>
          <style:tab-stop style:position="3.9996in"/>
          <style:tab-stop style:position="4.9996in"/>
          <style:tab-stop style:position="5.9996in"/>
          <style:tab-stop style:position="6.9996in"/>
          <style:tab-stop style:position="7.9996in"/>
          <style:tab-stop style:position="8.9996in"/>
          <style:tab-stop style:position="9.9996in"/>
          <style:tab-stop style:position="10.999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48">
      <style:paragraph-properties fo:line-height="90%" fo:text-align="center" style:tab-stop-distance="1in" fo:margin-left="0in" fo:margin-right="0in" fo:text-indent="0in" fo:margin-top="0.09653in" fo:margin-bottom="0in" style:punctuation-wrap="hanging" style:vertical-align="auto" style:writing-mode="lr-tb">
        <style:tab-stops>
          <style:tab-stop style:position="0.9996in"/>
          <style:tab-stop style:position="1.9996in"/>
          <style:tab-stop style:position="2.9996in"/>
          <style:tab-stop style:position="3.9996in"/>
          <style:tab-stop style:position="4.9996in"/>
          <style:tab-stop style:position="5.9996in"/>
          <style:tab-stop style:position="6.9996in"/>
          <style:tab-stop style:position="7.9996in"/>
          <style:tab-stop style:position="8.9996in"/>
          <style:tab-stop style:position="9.9996in"/>
          <style:tab-stop style:position="10.999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gradient" draw:fill-gradient-name="a6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3">
      <style:paragraph-properties fo:line-height="100%" fo:text-align="center" style:tab-stop-distance="1in" fo:margin-left="0in" fo:margin-right="0in" fo:text-indent="0in" fo:margin-top="0.11111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675" style:parent-style-name="Graphics">
      <style:graphic-properties draw:fill="none" fo:clip="rect(0in, 0in, 0in, 0in)" draw:stroke="none" draw:luminance="0%" draw:contrast="0%" draw:image-opacity="100%"/>
    </style:style>
    <style:style style:family="paragraph" style:name="a117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1">
      <style:graphic-properties fo:wrap-option="wrap" fo:padding-top="0.05118in" fo:padding-bottom="0.05118in" fo:padding-left="0.09843in" fo:padding-right="0.09843in" draw:textarea-vertical-align="top" draw:textarea-horizontal-align="center" draw:fill="none" draw:stroke="none" draw:auto-grow-width="false" draw:auto-grow-height="tru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2" style:parent-style-name="Graphics">
      <style:graphic-properties draw:fill="none" draw:stroke="non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3" style:parent-style-name="Graphics">
      <style:graphic-properties draw:fill="none" draw:stroke="non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4" style:parent-style-name="Graphics">
      <style:graphic-properties draw:fill="none" draw:stroke="non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ff9900" style:text-line-through-type="none" style:text-line-through-style="none" style:text-line-through-width="auto" style:text-line-through-color="font-color" style:text-position="0% 100%" fo:font-family="Century Gothic"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8">
      <style:graphic-properties draw:fill="solid" draw:fill-color="#729fcf" draw:opacity="100%" draw:stroke="solid" svg:stroke-width="0.02778in" svg:stroke-color="#3465af" svg:stroke-opacity="100%"/>
    </style:style>
    <style:style style:family="text" style:name="a951">
      <style:text-properties fo:font-variant="normal" fo:text-transform="none" fo:color="#ff9900" style:text-line-through-type="none" style:text-line-through-style="none" style:text-line-through-width="auto" style:text-line-through-color="font-color" style:text-position="0% 100%" fo:font-family="Century Gothic"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ff9900" style:text-line-through-type="none" style:text-line-through-style="none" style:text-line-through-width="auto" style:text-line-through-color="font-color" style:text-position="0% 100%" fo:font-family="Century Gothic"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ff9900" style:text-line-through-type="none" style:text-line-through-style="none" style:text-line-through-width="auto" style:text-line-through-color="font-color" style:text-position="0% 100%" fo:font-family="Century Gothic"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0">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6">
      <style:text-properties fo:font-variant="normal" fo:text-transform="none" fo:color="#ff9900" style:text-line-through-type="none" style:text-line-through-style="none" style:text-line-through-width="auto" style:text-line-through-color="font-color" style:text-position="0% 100%" fo:font-family="Century Gothic"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1">
      <style:paragraph-properties fo:line-height="90%" fo:text-align="center" style:tab-stop-distance="1in" fo:margin-left="0.3748in" fo:margin-right="0in" fo:text-indent="-0.3748in" fo:margin-top="0.09653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ff9900" style:text-line-through-type="none" style:text-line-through-style="none" style:text-line-through-width="auto" style:text-line-through-color="font-color" style:text-position="0% 100%" fo:font-family="Century Gothic"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59">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54">
      <style:paragraph-properties fo:line-height="90%" fo:text-align="center" style:tab-stop-distance="1in" fo:margin-left="0.3748in" fo:margin-right="0in" fo:text-indent="-0.3748in" fo:margin-top="0.09653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57">
      <style:paragraph-properties fo:line-height="90%" fo:text-align="center" style:tab-stop-distance="1in" fo:margin-left="0.3748in" fo:margin-right="0in" fo:text-indent="-0.3748in" fo:margin-top="0.09653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5">
      <style:graphic-properties draw:fill="solid" draw:fill-color="#729fcf" draw:opacity="100%" draw:stroke="solid" svg:stroke-width="0.02778in" svg:stroke-color="#3465af" svg:stroke-opacity="100%"/>
    </style:style>
    <style:style style:family="drawing-page" style:name="a11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2">
      <style:drawing-page-properties draw:fill="gradient" draw:fill-gradient-name="a118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3" style:parent-style-name="Graphics">
      <style:graphic-properties draw:fill="none" fo:clip="rect(0in, 0in, 0in, 0in)" draw:stroke="none" draw:luminance="0%" draw:contrast="0%" draw:image-opacity="100%"/>
    </style:style>
    <style:style style:family="drawing-page" style:name="a689">
      <style:drawing-page-properties draw:fill="gradient" draw:fill-gradient-name="a68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graphic" style:name="a962">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963" style:parent-style-name="Graphics">
      <style:graphic-properties draw:fill="none" fo:clip="rect(0in, 0in, 0in, 0in)" draw:stroke="none" draw:luminance="0%" draw:contrast="0%" draw:image-opacity="100%"/>
    </style:style>
    <style:style style:family="graphic" style:name="a964" style:parent-style-name="Graphics">
      <style:graphic-properties draw:fill="none" fo:clip="rect(0in, 0in, 0in, 0in)" draw:stroke="none" draw:luminance="0%" draw:contrast="0%" draw:image-opacity="100%"/>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67">
      <style:graphic-properties fo:wrap-option="no-wrap" fo:padding-top="0.05118in" fo:padding-bottom="0.05118in" fo:padding-left="0.09843in" fo:padding-right="0.09843in" draw:textarea-vertical-align="middle" draw:textarea-horizontal-align="left" draw:fill="none" draw:stroke="solid" svg:stroke-width="0.02795in" svg:stroke-color="#ffff00" svg:stroke-opacity="100%" draw:stroke-linejoin="miter" svg:stroke-linecap="square" draw:auto-grow-width="false" draw:auto-grow-height="false"/>
      <style:paragraph-properties style:font-independent-line-spacing="true" style:writing-mode="lr-tb"/>
    </style:style>
    <style:style style:family="text" style:name="a1462">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65">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66">
      <style:text-properties fo:font-variant="normal" fo:text-transform="none" fo:color="#ff0000" style:text-line-through-type="none" style:text-line-through-style="none" style:text-line-through-width="auto" style:text-line-through-color="font-color" style:text-position="0% 100%" fo:font-family="Symbol" style:font-family-generic="roma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67">
      <style:paragraph-properties fo:line-height="90%" fo:text-align="center" style:tab-stop-distance="1in" fo:margin-left="0.3748in" fo:margin-right="0in" fo:text-indent="-0.3748in" fo:margin-top="0.09653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00">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2">
      <style:paragraph-properties fo:line-height="100%" fo:text-align="left" style:tab-stop-distance="1in" fo:margin-left="0.3748in" fo:margin-right="0in" fo:text-indent="-0.3748in" fo:margin-top="0.0965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no-wrap" fo:padding-top="0.05118in" fo:padding-bottom="0.05118in" fo:padding-left="0.09843in" fo:padding-right="0.09843in" draw:textarea-vertical-align="middle" draw:textarea-horizontal-align="left" draw:fill="none" draw:stroke="solid" svg:stroke-width="0.02795in" svg:stroke-color="#ffff00" svg:stroke-opacity="100%" draw:stroke-linejoin="miter" svg:stroke-linecap="square" draw:auto-grow-width="false" draw:auto-grow-height="false"/>
      <style:paragraph-properties style:font-independent-line-spacing="true" style:writing-mode="lr-tb"/>
    </style:style>
    <style:style style:family="paragraph" style:name="a708">
      <style:paragraph-properties fo:line-height="100%" fo:text-align="left" style:tab-stop-distance="1in" fo:margin-left="0.3748in" fo:margin-right="0in" fo:text-indent="-0.3748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4">
      <style:paragraph-properties fo:line-height="100%" fo:text-align="left" style:tab-stop-distance="1in" fo:margin-left="0.3748in" fo:margin-right="0in" fo:text-indent="-0.3748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draw:fill="solid" draw:fill-color="#729fcf" draw:opacity="100%" draw:stroke="solid" svg:stroke-width="0.02778in" svg:stroke-color="#3465af" svg:stroke-opacity="100%"/>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07">
      <style:graphic-properties fo:wrap-option="no-wrap" fo:padding-top="0.05in" fo:padding-bottom="0.05in" fo:padding-left="0.1in" fo:padding-right="0.1in" draw:textarea-vertical-align="middle" draw:textarea-horizontal-align="left" draw:fill="none" draw:stroke="dash" draw:stroke-dash="a1206" svg:stroke-width="0.01378in" svg:stroke-color="#ffffff" svg:stroke-opacity="100%" draw:stroke-linejoin="round" svg:stroke-linecap="butt" draw:auto-grow-width="false" draw:auto-grow-height="fals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3748in" fo:margin-right="0in" fo:text-indent="-0.3748in" fo:margin-top="0.06944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4">
      <style:drawing-page-properties draw:fill="gradient" draw:fill-gradient-name="a119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omic Sans MS" style:font-family-asian="Arial Unicode MS" style:font-family-complex="Arial Unicode MS" style:font-family-generic="script"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9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fo:wrap-option="no-wrap" fo:padding-top="0.05118in" fo:padding-bottom="0.05118in" fo:padding-left="0.09843in" fo:padding-right="0.09843in" draw:textarea-vertical-align="middle" draw:textarea-horizontal-align="left" draw:fill="none" draw:stroke="solid" svg:stroke-width="0.01378in" svg:stroke-color="#ff0000" svg:stroke-opacity="100%" draw:stroke-linejoin="miter" svg:stroke-linecap="square" draw:auto-grow-width="false" draw:auto-grow-height="false"/>
      <style:paragraph-properties style:font-independent-line-spacing="true" style:writing-mode="lr-tb"/>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style:vertical-pos="middl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975">
      <style:graphic-properties style:vertical-pos="middle"/>
    </style:style>
    <style:style style:family="paragraph" style:name="a1470">
      <style:paragraph-properties fo:line-height="90%" fo:text-align="center" style:tab-stop-distance="1in" fo:margin-left="0.3748in" fo:margin-right="0in" fo:text-indent="-0.3748in" fo:margin-top="0.09653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7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473">
      <style:paragraph-properties fo:line-height="90%" fo:text-align="center" style:tab-stop-distance="1in" fo:margin-left="0.3748in" fo:margin-right="0in" fo:text-indent="-0.3748in" fo:margin-top="0.09653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parent-style-name="Graphics">
      <style:graphic-properties draw:fill="none" fo:clip="rect(0in, 0in, 0in, 0in)" draw:stroke="none" draw:luminance="0%" draw:contrast="0%" draw:image-opacity="100%"/>
    </style:style>
    <style:style style:family="text" style:name="a1475">
      <style:text-properties fo:font-variant="normal" fo:text-transform="none" fo:color="#ff505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76">
      <style:paragraph-properties fo:line-height="90%" fo:text-align="center" style:tab-stop-distance="1in" fo:margin-left="0.3748in" fo:margin-right="0in" fo:text-indent="-0.3748in" fo:margin-top="0.09653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39">
      <text:list-level-style-number text:level="1" style:num-format="">
        <style:list-level-properties text:space-before="0in" text:min-label-width="0.3748in"/>
      </text:list-level-style-number>
      <text:list-level-style-number text:level="2" style:num-format="">
        <style:list-level-properties text:space-before="0.75in" text:min-label-width="0.3748in"/>
      </text:list-level-style-number>
      <text:list-level-style-number text:level="3" style:num-format="">
        <style:list-level-properties text:space-before="1.25in" text:min-label-width="0.3748in"/>
      </text:list-level-style-number>
      <text:list-level-style-number text:level="4" style:num-format="">
        <style:list-level-properties text:space-before="1.75in" text:min-label-width="0.3748in"/>
      </text:list-level-style-number>
      <text:list-level-style-number text:level="5" style:num-format="">
        <style:list-level-properties text:space-before="2.25in" text:min-label-width="0.3748in"/>
      </text:list-level-style-number>
      <text:list-level-style-number text:level="6" style:num-format="">
        <style:list-level-properties text:space-before="2.75in" text:min-label-width="0.3748in"/>
      </text:list-level-style-number>
      <text:list-level-style-number text:level="7" style:num-format="">
        <style:list-level-properties text:space-before="3.25in" text:min-label-width="0.3748in"/>
      </text:list-level-style-number>
      <text:list-level-style-number text:level="8" style:num-format="">
        <style:list-level-properties text:space-before="3.75in" text:min-label-width="0.3748in"/>
      </text:list-level-style-number>
      <text:list-level-style-number text:level="9" style:num-format="">
        <style:list-level-properties text:space-before="4.25in" text:min-label-width="0.3748in"/>
      </text:list-level-style-number>
    </text:list-style>
    <text:list-style style:name="a1468">
      <text:list-level-style-number text:level="1" style:num-format="">
        <style:list-level-properties text:space-before="0in" text:min-label-width="0.3748in"/>
      </text:list-level-style-number>
      <text:list-level-style-number text:level="2" style:num-format="">
        <style:list-level-properties text:space-before="0.75in" text:min-label-width="0.3748in"/>
      </text:list-level-style-number>
      <text:list-level-style-number text:level="3" style:num-format="">
        <style:list-level-properties text:space-before="1.25in" text:min-label-width="0.3748in"/>
      </text:list-level-style-number>
      <text:list-level-style-number text:level="4" style:num-format="">
        <style:list-level-properties text:space-before="1.75in" text:min-label-width="0.3748in"/>
      </text:list-level-style-number>
      <text:list-level-style-number text:level="5" style:num-format="">
        <style:list-level-properties text:space-before="2.25in" text:min-label-width="0.3748in"/>
      </text:list-level-style-number>
      <text:list-level-style-number text:level="6" style:num-format="">
        <style:list-level-properties text:space-before="2.75in" text:min-label-width="0.3748in"/>
      </text:list-level-style-number>
      <text:list-level-style-number text:level="7" style:num-format="">
        <style:list-level-properties text:space-before="3.25in" text:min-label-width="0.3748in"/>
      </text:list-level-style-number>
      <text:list-level-style-number text:level="8" style:num-format="">
        <style:list-level-properties text:space-before="3.75in" text:min-label-width="0.3748in"/>
      </text:list-level-style-number>
      <text:list-level-style-number text:level="9" style:num-format="">
        <style:list-level-properties text:space-before="4.25in" text:min-label-width="0.3748in"/>
      </text:list-level-style-number>
    </text:list-style>
    <text:list-style style:name="a1474">
      <text:list-level-style-number text:level="1" style:num-format="">
        <style:list-level-properties text:space-before="0in" text:min-label-width="0.3748in"/>
      </text:list-level-style-number>
      <text:list-level-style-number text:level="2" style:num-format="">
        <style:list-level-properties text:space-before="0.75in" text:min-label-width="0.3748in"/>
      </text:list-level-style-number>
      <text:list-level-style-number text:level="3" style:num-format="">
        <style:list-level-properties text:space-before="1.25in" text:min-label-width="0.3748in"/>
      </text:list-level-style-number>
      <text:list-level-style-number text:level="4" style:num-format="">
        <style:list-level-properties text:space-before="1.75in" text:min-label-width="0.3748in"/>
      </text:list-level-style-number>
      <text:list-level-style-number text:level="5" style:num-format="">
        <style:list-level-properties text:space-before="2.25in" text:min-label-width="0.3748in"/>
      </text:list-level-style-number>
      <text:list-level-style-number text:level="6" style:num-format="">
        <style:list-level-properties text:space-before="2.75in" text:min-label-width="0.3748in"/>
      </text:list-level-style-number>
      <text:list-level-style-number text:level="7" style:num-format="">
        <style:list-level-properties text:space-before="3.25in" text:min-label-width="0.3748in"/>
      </text:list-level-style-number>
      <text:list-level-style-number text:level="8" style:num-format="">
        <style:list-level-properties text:space-before="3.75in" text:min-label-width="0.3748in"/>
      </text:list-level-style-number>
      <text:list-level-style-number text:level="9" style:num-format="">
        <style:list-level-properties text:space-before="4.25in" text:min-label-width="0.3748in"/>
      </text:list-level-style-number>
    </text:list-style>
    <text:list-style style:name="a14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8">
      <text:list-level-style-number text:level="1" style:num-format="">
        <style:list-level-properties text:space-before="0in" text:min-label-width="0.3748in"/>
      </text:list-level-style-number>
      <text:list-level-style-number text:level="2" style:num-format="">
        <style:list-level-properties text:space-before="0.75in" text:min-label-width="0.3748in"/>
      </text:list-level-style-number>
      <text:list-level-style-number text:level="3" style:num-format="">
        <style:list-level-properties text:space-before="1.25in" text:min-label-width="0.3748in"/>
      </text:list-level-style-number>
      <text:list-level-style-number text:level="4" style:num-format="">
        <style:list-level-properties text:space-before="1.75in" text:min-label-width="0.3748in"/>
      </text:list-level-style-number>
      <text:list-level-style-number text:level="5" style:num-format="">
        <style:list-level-properties text:space-before="2.25in" text:min-label-width="0.3748in"/>
      </text:list-level-style-number>
      <text:list-level-style-number text:level="6" style:num-format="">
        <style:list-level-properties text:space-before="2.75in" text:min-label-width="0.3748in"/>
      </text:list-level-style-number>
      <text:list-level-style-number text:level="7" style:num-format="">
        <style:list-level-properties text:space-before="3.25in" text:min-label-width="0.3748in"/>
      </text:list-level-style-number>
      <text:list-level-style-number text:level="8" style:num-format="">
        <style:list-level-properties text:space-before="3.75in" text:min-label-width="0.3748in"/>
      </text:list-level-style-number>
      <text:list-level-style-number text:level="9" style:num-format="">
        <style:list-level-properties text:space-before="4.25in" text:min-label-width="0.3748in"/>
      </text:list-level-style-number>
    </text:list-style>
    <text:list-style style:name="a1452">
      <text:list-level-style-number text:level="1" style:num-format="">
        <style:list-level-properties text:space-before="0in" text:min-label-width="0.3748in"/>
      </text:list-level-style-number>
      <text:list-level-style-number text:level="2" style:num-format="">
        <style:list-level-properties text:space-before="0.75in" text:min-label-width="0.3748in"/>
      </text:list-level-style-number>
      <text:list-level-style-number text:level="3" style:num-format="">
        <style:list-level-properties text:space-before="1.25in" text:min-label-width="0.3748in"/>
      </text:list-level-style-number>
      <text:list-level-style-number text:level="4" style:num-format="">
        <style:list-level-properties text:space-before="1.75in" text:min-label-width="0.3748in"/>
      </text:list-level-style-number>
      <text:list-level-style-number text:level="5" style:num-format="">
        <style:list-level-properties text:space-before="2.25in" text:min-label-width="0.3748in"/>
      </text:list-level-style-number>
      <text:list-level-style-number text:level="6" style:num-format="">
        <style:list-level-properties text:space-before="2.75in" text:min-label-width="0.3748in"/>
      </text:list-level-style-number>
      <text:list-level-style-number text:level="7" style:num-format="">
        <style:list-level-properties text:space-before="3.25in" text:min-label-width="0.3748in"/>
      </text:list-level-style-number>
      <text:list-level-style-number text:level="8" style:num-format="">
        <style:list-level-properties text:space-before="3.75in" text:min-label-width="0.3748in"/>
      </text:list-level-style-number>
      <text:list-level-style-number text:level="9" style:num-format="">
        <style:list-level-properties text:space-before="4.25in" text:min-label-width="0.3748in"/>
      </text:list-level-style-number>
    </text:list-style>
    <text:list-style style:name="a1436">
      <text:list-level-style-number text:level="1" style:num-format="">
        <style:list-level-properties text:space-before="0in" text:min-label-width="0.3748in"/>
      </text:list-level-style-number>
      <text:list-level-style-number text:level="2" style:num-format="">
        <style:list-level-properties text:space-before="0.75in" text:min-label-width="0.3748in"/>
      </text:list-level-style-number>
      <text:list-level-style-number text:level="3" style:num-format="">
        <style:list-level-properties text:space-before="1.25in" text:min-label-width="0.3748in"/>
      </text:list-level-style-number>
      <text:list-level-style-number text:level="4" style:num-format="">
        <style:list-level-properties text:space-before="1.75in" text:min-label-width="0.3748in"/>
      </text:list-level-style-number>
      <text:list-level-style-number text:level="5" style:num-format="">
        <style:list-level-properties text:space-before="2.25in" text:min-label-width="0.3748in"/>
      </text:list-level-style-number>
      <text:list-level-style-number text:level="6" style:num-format="">
        <style:list-level-properties text:space-before="2.75in" text:min-label-width="0.3748in"/>
      </text:list-level-style-number>
      <text:list-level-style-number text:level="7" style:num-format="">
        <style:list-level-properties text:space-before="3.25in" text:min-label-width="0.3748in"/>
      </text:list-level-style-number>
      <text:list-level-style-number text:level="8" style:num-format="">
        <style:list-level-properties text:space-before="3.75in" text:min-label-width="0.3748in"/>
      </text:list-level-style-number>
      <text:list-level-style-number text:level="9" style:num-format="">
        <style:list-level-properties text:space-before="4.25in" text:min-label-width="0.3748in"/>
      </text:list-level-style-number>
    </text:list-style>
    <text:list-style style:name="a1477">
      <text:list-level-style-number text:level="1" style:num-format="">
        <style:list-level-properties text:space-before="0in" text:min-label-width="0.3748in"/>
      </text:list-level-style-number>
      <text:list-level-style-number text:level="2" style:num-format="">
        <style:list-level-properties text:space-before="0.75in" text:min-label-width="0.3748in"/>
      </text:list-level-style-number>
      <text:list-level-style-number text:level="3" style:num-format="">
        <style:list-level-properties text:space-before="1.25in" text:min-label-width="0.3748in"/>
      </text:list-level-style-number>
      <text:list-level-style-number text:level="4" style:num-format="">
        <style:list-level-properties text:space-before="1.75in" text:min-label-width="0.3748in"/>
      </text:list-level-style-number>
      <text:list-level-style-number text:level="5" style:num-format="">
        <style:list-level-properties text:space-before="2.25in" text:min-label-width="0.3748in"/>
      </text:list-level-style-number>
      <text:list-level-style-number text:level="6" style:num-format="">
        <style:list-level-properties text:space-before="2.75in" text:min-label-width="0.3748in"/>
      </text:list-level-style-number>
      <text:list-level-style-number text:level="7" style:num-format="">
        <style:list-level-properties text:space-before="3.25in" text:min-label-width="0.3748in"/>
      </text:list-level-style-number>
      <text:list-level-style-number text:level="8" style:num-format="">
        <style:list-level-properties text:space-before="3.75in" text:min-label-width="0.3748in"/>
      </text:list-level-style-number>
      <text:list-level-style-number text:level="9" style:num-format="">
        <style:list-level-properties text:space-before="4.25in" text:min-label-width="0.3748in"/>
      </text:list-level-style-number>
    </text:list-style>
    <text:list-style style:name="a14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1">
      <text:list-level-style-number text:level="1" style:num-format="">
        <style:list-level-properties text:space-before="0in" text:min-label-width="0.3748in"/>
      </text:list-level-style-number>
      <text:list-level-style-number text:level="2" style:num-format="">
        <style:list-level-properties text:space-before="0.75in" text:min-label-width="0.3748in"/>
      </text:list-level-style-number>
      <text:list-level-style-number text:level="3" style:num-format="">
        <style:list-level-properties text:space-before="1.25in" text:min-label-width="0.3748in"/>
      </text:list-level-style-number>
      <text:list-level-style-number text:level="4" style:num-format="">
        <style:list-level-properties text:space-before="1.75in" text:min-label-width="0.3748in"/>
      </text:list-level-style-number>
      <text:list-level-style-number text:level="5" style:num-format="">
        <style:list-level-properties text:space-before="2.25in" text:min-label-width="0.3748in"/>
      </text:list-level-style-number>
      <text:list-level-style-number text:level="6" style:num-format="">
        <style:list-level-properties text:space-before="2.75in" text:min-label-width="0.3748in"/>
      </text:list-level-style-number>
      <text:list-level-style-number text:level="7" style:num-format="">
        <style:list-level-properties text:space-before="3.25in" text:min-label-width="0.3748in"/>
      </text:list-level-style-number>
      <text:list-level-style-number text:level="8" style:num-format="">
        <style:list-level-properties text:space-before="3.75in" text:min-label-width="0.3748in"/>
      </text:list-level-style-number>
      <text:list-level-style-number text:level="9" style:num-format="">
        <style:list-level-properties text:space-before="4.25in" text:min-label-width="0.3748in"/>
      </text:list-level-style-number>
    </text:list-style>
    <text:list-style style:name="a1443">
      <text:list-level-style-number text:level="1" style:num-format="">
        <style:list-level-properties text:space-before="0in" text:min-label-width="0.3748in"/>
      </text:list-level-style-number>
      <text:list-level-style-number text:level="2" style:num-format="">
        <style:list-level-properties text:space-before="0.75in" text:min-label-width="0.3748in"/>
      </text:list-level-style-number>
      <text:list-level-style-number text:level="3" style:num-format="">
        <style:list-level-properties text:space-before="1.25in" text:min-label-width="0.3748in"/>
      </text:list-level-style-number>
      <text:list-level-style-number text:level="4" style:num-format="">
        <style:list-level-properties text:space-before="1.75in" text:min-label-width="0.3748in"/>
      </text:list-level-style-number>
      <text:list-level-style-number text:level="5" style:num-format="">
        <style:list-level-properties text:space-before="2.25in" text:min-label-width="0.3748in"/>
      </text:list-level-style-number>
      <text:list-level-style-number text:level="6" style:num-format="">
        <style:list-level-properties text:space-before="2.75in" text:min-label-width="0.3748in"/>
      </text:list-level-style-number>
      <text:list-level-style-number text:level="7" style:num-format="">
        <style:list-level-properties text:space-before="3.25in" text:min-label-width="0.3748in"/>
      </text:list-level-style-number>
      <text:list-level-style-number text:level="8" style:num-format="">
        <style:list-level-properties text:space-before="3.75in" text:min-label-width="0.3748in"/>
      </text:list-level-style-number>
      <text:list-level-style-number text:level="9" style:num-format="">
        <style:list-level-properties text:space-before="4.25in" text:min-label-width="0.3748in"/>
      </text:list-level-style-number>
    </text:list-style>
    <text:list-style style:name="a1455">
      <text:list-level-style-number text:level="1" style:num-format="">
        <style:list-level-properties text:space-before="0in" text:min-label-width="0.3748in"/>
      </text:list-level-style-number>
      <text:list-level-style-number text:level="2" style:num-format="">
        <style:list-level-properties text:space-before="0.75in" text:min-label-width="0.3748in"/>
      </text:list-level-style-number>
      <text:list-level-style-number text:level="3" style:num-format="">
        <style:list-level-properties text:space-before="1.25in" text:min-label-width="0.3748in"/>
      </text:list-level-style-number>
      <text:list-level-style-number text:level="4" style:num-format="">
        <style:list-level-properties text:space-before="1.75in" text:min-label-width="0.3748in"/>
      </text:list-level-style-number>
      <text:list-level-style-number text:level="5" style:num-format="">
        <style:list-level-properties text:space-before="2.25in" text:min-label-width="0.3748in"/>
      </text:list-level-style-number>
      <text:list-level-style-number text:level="6" style:num-format="">
        <style:list-level-properties text:space-before="2.75in" text:min-label-width="0.3748in"/>
      </text:list-level-style-number>
      <text:list-level-style-number text:level="7" style:num-format="">
        <style:list-level-properties text:space-before="3.25in" text:min-label-width="0.3748in"/>
      </text:list-level-style-number>
      <text:list-level-style-number text:level="8" style:num-format="">
        <style:list-level-properties text:space-before="3.75in" text:min-label-width="0.3748in"/>
      </text:list-level-style-number>
      <text:list-level-style-number text:level="9" style:num-format="">
        <style:list-level-properties text:space-before="4.25in" text:min-label-width="0.3748in"/>
      </text:list-level-style-number>
    </text:list-style>
  </office:automatic-styles>
  <office:body>
    <office:presentation>
      <draw:page draw:name="page1" draw:style-name="a586" draw:master-page-name="Master1-Layout7-blank-Vide" presentation:presentation-page-layout-name="Master1-PPL7" draw:id="Slide-256">
        <draw:frame draw:id="id75" presentation:style-name="a595" draw:name="Titre 1" svg:x="0.875in" svg:y="0.36577in" svg:width="8.25in" svg:height="1.83346in" presentation:class="title" presentation:placeholder="false">
          <draw:text-box>
            <text:p text:style-name="a594" text:class-names="" text:cond-style-name=""><text:span text:style-name="a587" text:class-names=""><text:line-break/></text:span><text:span text:style-name="a588" text:class-names=""><text:s text:c="2"/></text:span><text:span text:style-name="a589" text:class-names="">MASTER<text:s text:c="1"/></text:span><text:span text:style-name="a590" text:class-names="">MANU<text:line-break/></text:span><text:span text:style-name="a591" text:class-names=""><text:line-break/></text:span><text:span text:style-name="a592" text:class-names="">HMMA315</text:span><text:span text:style-name="a593" text:class-names=""><text:line-break/></text:span></text:p>
          </draw:text-box>
          <svg:title/>
          <svg:desc/>
        </draw:frame>
        <draw:frame draw:id="id76" presentation:style-name="a624" draw:name="Sous-titre 2" svg:x="1.52751in" svg:y="3.47927in" svg:width="7.66654in" svg:height="2.33346in" presentation:class="subtitle" presentation:placeholder="false">
          <draw:text-box>
            <text:p text:style-name="a597" text:class-names="" text:cond-style-name=""><text:span text:style-name="a596" text:class-names="">Un aperçu des techniques d’imagerie médicale</text:span></text:p>
            <text:p text:style-name="a609" text:class-names="" text:cond-style-name=""><text:span text:style-name="a598" text:class-names="">et</text:span><text:span text:style-name="a599" text:class-names=""><text:s text:c="1"/></text:span><text:span text:style-name="a600" text:class-names="">des</text:span><text:span text:style-name="a601" text:class-names=""><text:s text:c="1"/></text:span><text:span text:style-name="a602" text:class-names="">problèmes</text:span><text:span text:style-name="a603" text:class-names=""><text:s text:c="1"/></text:span><text:span text:style-name="a604" text:class-names="">inverses</text:span><text:span text:style-name="a605" text:class-names=""><text:s text:c="1"/></text:span><text:span text:style-name="a606" text:class-names="">associé</text:span><text:span text:style-name="a607" text:class-names="">s</text:span><text:span text:style-name="a608" text:class-names=""/></text:p>
            <text:p text:style-name="a611" text:class-names="" text:cond-style-name=""><text:span text:style-name="a610" text:class-names=""/></text:p>
            <text:p text:style-name="a613" text:class-names="" text:cond-style-name=""><text:span text:style-name="a612" text:class-names=""><text:s text:c="1"/></text:span></text:p>
            <text:p text:style-name="a615" text:class-names="" text:cond-style-name=""><text:span text:style-name="a614" text:class-names=""/></text:p>
            <text:p text:style-name="a617" text:class-names="" text:cond-style-name=""><text:span text:style-name="a616" text:class-names=""/></text:p>
            <text:p text:style-name="a621" text:class-names="" text:cond-style-name=""><text:span text:style-name="a618" text:class-names="">J</text:span><text:span text:style-name="a619" text:class-names="">.-F.<text:s text:c="1"/></text:span><text:span text:style-name="a620" text:class-names="">Crouzet</text:span></text:p>
            <text:p text:style-name="a623" text:class-names="" text:cond-style-name=""><text:span text:style-name="a622" text:class-names=""/></text:p>
          </draw:text-box>
          <svg:title/>
          <svg:desc/>
        </draw:frame>
        <presentation:notes draw:style-name="a630">
          <draw:frame draw:id="id77" draw:style-name="a627" draw:name="Espace réservé du numéro de diapositive 7" svg:x="4.16654in" svg:y="10.25in" svg:width="3.16693in" svg:height="0.5in">
            <draw:text-box>
              <text:p text:style-name="a626" text:class-names="" text:cond-style-name=""><text:span text:style-name="a625" text:class-names=""><text:page-number style:num-format="1" text:fixed="false"/></text:span></text:p>
            </draw:text-box>
            <svg:title/>
            <svg:desc/>
          </draw:frame>
          <draw:page-thumbnail draw:page-number="1" svg:x="1.04167in" svg:y="0.83333in" svg:width="5.33333in" svg:height="4in" presentation:class="page" draw:id="id78" presentation:style-name="a628" draw:name="Espace réservé de l'image des diapositives 1">
            <svg:title/>
            <svg:desc/>
          </draw:page-thumbnail>
          <draw:frame draw:id="id79" presentation:style-name="a629" draw:name="Espace réservé des notes 2" svg:x="1in" svg:y="5.16614in" svg:width="5.41654in" svg:height="4.83386in" presentation:class="notes" presentation:placeholder="true">
            <draw:text-box/>
            <svg:title/>
            <svg:desc/>
          </draw:frame>
        </presentation:notes>
      </draw:page>
      <draw:page draw:name="page3" draw:style-name="a632" draw:master-page-name="Master1-Layout7-blank-Vide" presentation:presentation-page-layout-name="Master1-PPL7" draw:id="Slide-258">
        <draw:custom-shape svg:x="1.45455in" svg:y="0.33081in" svg:width="8.81818in" svg:height="0.7197in" draw:id="id80" draw:style-name="a647" draw:name="Forme libre : forme 2">
          <svg:title/>
          <svg:desc/>
          <text:p text:style-name="a636" text:class-names="" text:cond-style-name=""><text:span text:style-name="a633" text:class-names="">1.<text:s text:c="1"/></text:span><text:span text:style-name="a634" text:class-names="">Radiographie standard (1910</text:span><text:span text:style-name="a635" text:class-names="">)</text:span></text:p>
          <text:p text:style-name="a638" text:class-names="" text:cond-style-name=""><text:span text:style-name="a637" text:class-names=""/></text:p>
          <text:p text:style-name="a640" text:class-names="" text:cond-style-name=""><text:span text:style-name="a639" text:class-names="">Röntgen découvre les rayons X en 1895</text:span></text:p>
          <text:p text:style-name="a642" text:class-names="" text:cond-style-name=""><text:span text:style-name="a641" text:class-names=""/></text:p>
          <text:p text:style-name="a644" text:class-names="" text:cond-style-name=""><text:span text:style-name="a643" text:class-names=""/></text:p>
          <text:p text:style-name="a646" text:class-names="" text:cond-style-name=""><text:span text:style-name="a6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1" draw:style-name="a648" draw:name="thorax" svg:x="1.86856in" svg:y="2.24482in" svg:width="5.59724in" svg:height="4.55394in" style:rel-width="scale" style:rel-height="scale">
          <draw:image xlink:href="media/image1.jpg" xlink:type="simple" xlink:show="embed" xlink:actuate="onLoad"/>
          <svg:title/>
          <svg:desc/>
        </draw:frame>
        <draw:custom-shape svg:x="0.74488in" svg:y="6.91653in" svg:width="8.09921in" svg:height="0.43622in" draw:id="id83" draw:style-name="a651" draw:name="Forme libre : forme 4">
          <svg:title/>
          <svg:desc/>
          <text:p text:style-name="a650" text:class-names="" text:cond-style-name="" text:id="id82"><text:span text:style-name="a649" text:class-names="">intéressant pour de petites zones comportant peu d'information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81"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83" smil:attributeName="visibility" smil:to="visible" smil:begin="0.0s" smil:dur="0.00100000004749745s" smil:fill="hold"/>
                </anim:par>
              </anim:par>
            </anim:par>
          </anim:seq>
        </anim:par>
        <presentation:notes draw:style-name="a659">
          <draw:frame draw:id="id84" draw:style-name="a654" draw:name="Espace réservé du numéro de diapositive 7" svg:x="4.16654in" svg:y="10.25in" svg:width="3.16693in" svg:height="0.5in">
            <draw:text-box>
              <text:p text:style-name="a653" text:class-names="" text:cond-style-name=""><text:span text:style-name="a652" text:class-names=""><text:page-number style:num-format="1" text:fixed="false"/></text:span></text:p>
            </draw:text-box>
            <svg:title/>
            <svg:desc/>
          </draw:frame>
          <draw:page-thumbnail draw:page-number="2" svg:x="1.04167in" svg:y="0.83333in" svg:width="5.33333in" svg:height="4in" presentation:class="page" draw:id="id85" presentation:style-name="a655" draw:name="Espace réservé de l'image des diapositives 1">
            <svg:title/>
            <svg:desc/>
          </draw:page-thumbnail>
          <draw:frame draw:id="id86" draw:style-name="a658" draw:name="ZoneTexte 2" svg:x="1in" svg:y="5.16614in" svg:width="5.41654in" svg:height="4.83346in">
            <draw:text-box>
              <text:p text:style-name="a657" text:class-names="" text:cond-style-name=""><text:span text:style-name="a656" text:class-names=""/></text:p>
            </draw:text-box>
            <svg:title/>
            <svg:desc/>
          </draw:frame>
        </presentation:notes>
      </draw:page>
      <draw:page draw:name="page4" draw:style-name="a661" draw:master-page-name="Master1-Layout7-blank-Vide" presentation:presentation-page-layout-name="Master1-PPL7" draw:id="Slide-259">
        <draw:frame draw:id="id87" draw:style-name="a662" draw:name="radio" svg:x="0.5in" svg:y="0.33346in" svg:width="9.06417in" svg:height="6.98937in" style:rel-width="scale" style:rel-height="scale">
          <draw:image xlink:href="media/image2.png" xlink:type="simple" xlink:show="embed" xlink:actuate="onLoad"/>
          <svg:title/>
          <svg:desc/>
        </draw:frame>
        <presentation:notes draw:style-name="a668">
          <draw:frame draw:id="id88" draw:style-name="a665" draw:name="Espace réservé du numéro de diapositive 7" svg:x="4.16654in" svg:y="10.25in" svg:width="3.16693in" svg:height="0.5in">
            <draw:text-box>
              <text:p text:style-name="a664" text:class-names="" text:cond-style-name=""><text:span text:style-name="a663" text:class-names=""><text:page-number style:num-format="1" text:fixed="false"/></text:span></text:p>
            </draw:text-box>
            <svg:title/>
            <svg:desc/>
          </draw:frame>
          <draw:page-thumbnail draw:page-number="3" svg:x="1.04167in" svg:y="0.83333in" svg:width="5.33333in" svg:height="4in" presentation:class="page" draw:id="id89" presentation:style-name="a666" draw:name="Espace réservé de l'image des diapositives 1">
            <svg:title/>
            <svg:desc/>
          </draw:page-thumbnail>
          <draw:frame draw:id="id90" presentation:style-name="a667" draw:name="Espace réservé des notes 2" svg:x="1in" svg:y="5.16614in" svg:width="5.41654in" svg:height="4.83386in" presentation:class="notes" presentation:placeholder="true">
            <draw:text-box/>
            <svg:title/>
            <svg:desc/>
          </draw:frame>
        </presentation:notes>
      </draw:page>
      <draw:page draw:name="page5" draw:style-name="a670" draw:master-page-name="Master1-Layout7-blank-Vide" presentation:presentation-page-layout-name="Master1-PPL7" draw:id="Slide-260">
        <draw:frame draw:id="id92" presentation:style-name="a674" draw:name="Sous-titre 1" svg:x="0.25in" svg:y="0.16614in" svg:width="9.41654in" svg:height="0.83346in" presentation:class="subtitle" presentation:placeholder="false">
          <draw:text-box>
            <text:p text:style-name="a673" text:class-names="" text:cond-style-name="" text:id="id91"><text:span text:style-name="a671" text:class-names="">2.<text:s text:c="1"/></text:span><text:span text:style-name="a672" text:class-names="">Tomographie classique (1920)</text:span></text:p>
          </draw:text-box>
          <svg:title/>
          <svg:desc/>
        </draw:frame>
        <draw:frame draw:id="id93" draw:style-name="a675" draw:name="scan0" svg:x="1.33346in" svg:y="1in" svg:width="7.19449in" svg:height="5.75157in" style:rel-width="scale" style:rel-height="scale">
          <draw:image xlink:href="media/image3.png" xlink:type="simple" xlink:show="embed" xlink:actuate="onLoad"/>
          <svg:title/>
          <svg:desc/>
        </draw:frame>
        <draw:custom-shape svg:x="0.82003in" svg:y="6.91653in" svg:width="8.45916in" svg:height="0.43995in" draw:id="id95" draw:style-name="a681" draw:name="Forme libre : forme 3">
          <svg:title/>
          <svg:desc/>
          <text:p text:style-name="a680" text:class-names="" text:cond-style-name="" text:id="id94"><text:span text:style-name="a676" text:class-names="">Peu</text:span><text:span text:style-name="a677" text:class-names=""><text:s text:c="1"/>coûteux non plus</text:span><text:span text:style-name="a678" text:class-names="">, mais tomographie approximative<text:s text:c="1"/></text:span><text:span text:style-name="a679" text:class-names="">(flous, artéfact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presentation:group-id="0" smil:begin="0.0s" smil:fill="hold">
                  <anim:set smil:targetElement="id91"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93"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95" smil:attributeName="visibility" smil:to="visible" smil:begin="0.0s" smil:dur="0.00100000004749745s" smil:fill="hold"/>
                </anim:par>
              </anim:par>
            </anim:par>
          </anim:seq>
        </anim:par>
        <presentation:notes draw:style-name="a687">
          <draw:frame draw:id="id96" draw:style-name="a684" draw:name="Espace réservé du numéro de diapositive 7" svg:x="4.16654in" svg:y="10.25in" svg:width="3.16693in" svg:height="0.5in">
            <draw:text-box>
              <text:p text:style-name="a683" text:class-names="" text:cond-style-name=""><text:span text:style-name="a682" text:class-names=""><text:page-number style:num-format="1" text:fixed="false"/></text:span></text:p>
            </draw:text-box>
            <svg:title/>
            <svg:desc/>
          </draw:frame>
          <draw:page-thumbnail draw:page-number="4" svg:x="1.04167in" svg:y="0.83333in" svg:width="5.33333in" svg:height="4in" presentation:class="page" draw:id="id97" presentation:style-name="a685" draw:name="Espace réservé de l'image des diapositives 1">
            <svg:title/>
            <svg:desc/>
          </draw:page-thumbnail>
          <draw:frame draw:id="id98" presentation:style-name="a686" draw:name="Espace réservé des notes 2" svg:x="1in" svg:y="5.16614in" svg:width="5.41654in" svg:height="4.83386in" presentation:class="notes" presentation:placeholder="true">
            <draw:text-box/>
            <svg:title/>
            <svg:desc/>
          </draw:frame>
        </presentation:notes>
      </draw:page>
      <draw:page draw:name="page6" draw:style-name="a689" draw:master-page-name="Master1-Layout7-blank-Vide" presentation:presentation-page-layout-name="Master1-PPL7" draw:id="Slide-261">
        <draw:custom-shape svg:x="1.25in" svg:y="0in" svg:width="8.75in" svg:height="2.41654in" draw:id="id99" draw:style-name="a719" draw:name="Forme libre : forme 1">
          <svg:title/>
          <svg:desc/>
          <text:p text:style-name="a692" text:class-names="" text:cond-style-name=""><text:span text:style-name="a690" text:class-names="">3.<text:s text:c="1"/></text:span><text:span text:style-name="a691" text:class-names="">Echographie (1980)</text:span></text:p>
          <text:p text:style-name="a694" text:class-names="" text:cond-style-name=""><text:span text:style-name="a693" text:class-names=""/></text:p>
          <text:p text:style-name="a698" text:class-names="" text:cond-style-name=""><text:span text:style-name="a695" text:class-names="">Coût également modéré, et mise en<text:s text:c="1"/></text:span><text:span text:style-name="a696" text:class-names="">oeuvre</text:span><text:span text:style-name="a697" text:class-names=""><text:s text:c="1"/>facile.</text:span></text:p>
          <text:p text:style-name="a708" text:class-names="" text:cond-style-name=""><text:span text:style-name="a699" text:class-names="">Mais<text:s text:c="1"/></text:span><text:span text:style-name="a700" text:class-names="">encore<text:s text:c="1"/></text:span><text:span text:style-name="a701" text:class-names="">non<text:s text:c="1"/></text:span><text:span text:style-name="a702" text:class-names="">injectif</text:span><text:span text:style-name="a703" text:class-names=""><text:s text:c="1"/></text:span><text:span text:style-name="a704" text:class-names="">(</text:span><text:span text:style-name="a705" text:class-names="">p</text:span><text:span text:style-name="a706" text:class-names="">arties invisibles).</text:span><text:span text:style-name="a707" text:class-names=""/></text:p>
          <text:p text:style-name="a714" text:class-names="" text:cond-style-name=""><text:span text:style-name="a709" text:class-names="">Précis pour de petits ensembles<text:s text:c="1"/></text:span><text:span text:style-name="a710" text:class-names="">comportan</text:span><text:span text:style-name="a711" text:class-names="">t</text:span><text:span text:style-name="a712" text:class-names=""><text:s text:c="1"/></text:span><text:span text:style-name="a713" text:class-names="">peu d'interfaces.</text:span></text:p>
          <text:p text:style-name="a716" text:class-names="" text:cond-style-name=""><text:span text:style-name="a715" text:class-names=""/></text:p>
          <text:p text:style-name="a718" text:class-names="" text:cond-style-name=""><text:span text:style-name="a71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0" draw:style-name="a720" draw:name="echo" svg:x="1.75in" svg:y="2.66654in" svg:width="6.61614in" svg:height="3.58504in" style:rel-width="scale" style:rel-height="scale">
          <draw:image xlink:href="media/image4.jpg" xlink:type="simple" xlink:show="embed" xlink:actuate="onLoad"/>
          <svg:title/>
          <svg:desc/>
        </draw:frame>
        <draw:custom-shape svg:x="2.58583in" svg:y="6.58346in" svg:width="4.02441in" svg:height="0.56929in" draw:id="id102" draw:style-name="a723" draw:name="Forme libre : forme 3">
          <svg:title/>
          <svg:desc/>
          <text:p text:style-name="a722" text:class-names="" text:cond-style-name="" text:id="id101"><text:span text:style-name="a721" text:class-names="">20 KHz &lt; f &lt; 200 MHz</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00"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02" smil:attributeName="visibility" smil:to="visible" smil:begin="0.0s" smil:dur="0.00100000004749745s" smil:fill="hold"/>
                </anim:par>
              </anim:par>
            </anim:par>
          </anim:seq>
        </anim:par>
        <presentation:notes draw:style-name="a731">
          <draw:frame draw:id="id103" draw:style-name="a726" draw:name="Espace réservé du numéro de diapositive 7" svg:x="4.16654in" svg:y="10.25in" svg:width="3.16693in" svg:height="0.5in">
            <draw:text-box>
              <text:p text:style-name="a725" text:class-names="" text:cond-style-name=""><text:span text:style-name="a724" text:class-names=""><text:page-number style:num-format="1" text:fixed="false"/></text:span></text:p>
            </draw:text-box>
            <svg:title/>
            <svg:desc/>
          </draw:frame>
          <draw:page-thumbnail draw:page-number="5" svg:x="1.04167in" svg:y="0.83333in" svg:width="5.33333in" svg:height="4in" presentation:class="page" draw:id="id104" presentation:style-name="a727" draw:name="Espace réservé de l'image des diapositives 1">
            <svg:title/>
            <svg:desc/>
          </draw:page-thumbnail>
          <draw:frame draw:id="id105" draw:style-name="a730" draw:name="ZoneTexte 2" svg:x="1in" svg:y="5.16614in" svg:width="5.41654in" svg:height="4.83346in">
            <draw:text-box>
              <text:p text:style-name="a729" text:class-names="" text:cond-style-name=""><text:span text:style-name="a728" text:class-names=""/></text:p>
            </draw:text-box>
            <svg:title/>
            <svg:desc/>
          </draw:frame>
        </presentation:notes>
      </draw:page>
      <draw:page draw:name="page7" draw:style-name="a733" draw:master-page-name="Master1-Layout7-blank-Vide" presentation:presentation-page-layout-name="Master1-PPL7" draw:id="Slide-262">
        <draw:frame draw:id="id106" draw:style-name="a734" draw:name="echo1" svg:x="0.72715in" svg:y="0.19292in" svg:width="8.34055in" svg:height="6.53976in" style:rel-width="scale" style:rel-height="scale">
          <draw:image xlink:href="media/image5.png" xlink:type="simple" xlink:show="embed" xlink:actuate="onLoad"/>
          <svg:title/>
          <svg:desc/>
        </draw:frame>
        <draw:custom-shape svg:x="1.89219in" svg:y="6.73268in" svg:width="5.72311in" svg:height="0.77653in" draw:id="id107" draw:style-name="a746" draw:name="Forme libre : forme 2">
          <svg:title/>
          <svg:desc/>
          <text:p text:style-name="a740" text:class-names="" text:cond-style-name=""><text:span text:style-name="a735" text:class-names="">F</text:span><text:span text:style-name="a736" text:class-names="">aisceau<text:s text:c="1"/></text:span><text:span text:style-name="a737" text:class-names="">rotatif<text:s text:c="1"/></text:span><text:span text:style-name="a738" text:class-names="">é</text:span><text:span text:style-name="a739" text:class-names="">metteur d'ultrasons<text:s text:c="1"/></text:span></text:p>
          <text:p text:style-name="a745" text:class-names="" text:cond-style-name=""><text:span text:style-name="a741" text:class-names="">Réception</text:span><text:span text:style-name="a742" text:class-names=""><text:s text:c="1"/></text:span><text:span text:style-name="a743" text:class-names="">des échos de<text:s text:c="1"/></text:span><text:span text:style-name="a744" text:class-names="">réflexion/transmission)</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752">
          <draw:frame draw:id="id108" draw:style-name="a749" draw:name="Espace réservé du numéro de diapositive 7" svg:x="4.16654in" svg:y="10.25in" svg:width="3.16693in" svg:height="0.5in">
            <draw:text-box>
              <text:p text:style-name="a748" text:class-names="" text:cond-style-name=""><text:span text:style-name="a747" text:class-names=""><text:page-number style:num-format="1" text:fixed="false"/></text:span></text:p>
            </draw:text-box>
            <svg:title/>
            <svg:desc/>
          </draw:frame>
          <draw:page-thumbnail draw:page-number="6" svg:x="1.04167in" svg:y="0.83333in" svg:width="5.33333in" svg:height="4in" presentation:class="page" draw:id="id109" presentation:style-name="a750" draw:name="Espace réservé de l'image des diapositives 1">
            <svg:title/>
            <svg:desc/>
          </draw:page-thumbnail>
          <draw:frame draw:id="id110" presentation:style-name="a751" draw:name="Espace réservé des notes 2" svg:x="1in" svg:y="5.16614in" svg:width="5.41654in" svg:height="4.83386in" presentation:class="notes" presentation:placeholder="true">
            <draw:text-box/>
            <svg:title/>
            <svg:desc/>
          </draw:frame>
        </presentation:notes>
      </draw:page>
      <draw:page draw:name="page8" draw:style-name="a754" draw:master-page-name="Master1-Layout7-blank-Vide" presentation:presentation-page-layout-name="Master1-PPL7" draw:id="Slide-263">
        <draw:frame draw:id="id111" draw:style-name="a755" draw:name="echo2" svg:x="0.78642in" svg:y="0.18674in" svg:width="8.42716in" svg:height="6.15118in" style:rel-width="scale" style:rel-height="scale">
          <draw:image xlink:href="media/image6.png" xlink:type="simple" xlink:show="embed" xlink:actuate="onLoad"/>
          <svg:title/>
          <svg:desc/>
        </draw:frame>
        <draw:custom-shape svg:x="0.75in" svg:y="6.5in" svg:width="8.41496in" svg:height="0.77653in" draw:id="id112" draw:style-name="a771" draw:name="Forme libre : forme 2">
          <svg:title/>
          <svg:desc/>
          <text:p text:style-name="a763" text:class-names="" text:cond-style-name=""><text:span text:style-name="a756" text:class-names="">P</text:span><text:span text:style-name="a757" text:class-names="">our<text:s text:c="1"/></text:span><text:span text:style-name="a758" text:class-names="">un angle<text:s text:c="1"/></text:span><text:span text:style-name="a759" text:class-names="">d’émission donné : enregistrement du temps<text:s text:c="1"/></text:span><text:span text:style-name="a760" text:class-names="">des<text:s text:c="1"/></text:span><text:span text:style-name="a761" text:class-names="">échos</text:span><text:span text:style-name="a762" text:class-names=""/></text:p>
          <text:p text:style-name="a770" text:class-names="" text:cond-style-name=""><text:span text:style-name="a764" text:class-names=""><text:s text:c="1"/>-&gt;<text:s text:c="1"/></text:span><text:span text:style-name="a765" text:class-names="">I</text:span><text:span text:style-name="a766" text:class-names="">mage formée<text:s text:c="1"/></text:span><text:span text:style-name="a767" text:class-names="">sur<text:s text:c="1"/></text:span><text:span text:style-name="a768" text:class-names="">la zone balayée</text:span><text:span text:style-name="a76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777">
          <draw:frame draw:id="id113" draw:style-name="a774" draw:name="Espace réservé du numéro de diapositive 7" svg:x="4.16654in" svg:y="10.25in" svg:width="3.16693in" svg:height="0.5in">
            <draw:text-box>
              <text:p text:style-name="a773" text:class-names="" text:cond-style-name=""><text:span text:style-name="a772" text:class-names=""><text:page-number style:num-format="1" text:fixed="false"/></text:span></text:p>
            </draw:text-box>
            <svg:title/>
            <svg:desc/>
          </draw:frame>
          <draw:page-thumbnail draw:page-number="7" svg:x="1.04167in" svg:y="0.83333in" svg:width="5.33333in" svg:height="4in" presentation:class="page" draw:id="id114" presentation:style-name="a775" draw:name="Espace réservé de l'image des diapositives 1">
            <svg:title/>
            <svg:desc/>
          </draw:page-thumbnail>
          <draw:frame draw:id="id115" presentation:style-name="a776" draw:name="Espace réservé des notes 2" svg:x="1in" svg:y="5.16614in" svg:width="5.41654in" svg:height="4.83386in" presentation:class="notes" presentation:placeholder="true">
            <draw:text-box/>
            <svg:title/>
            <svg:desc/>
          </draw:frame>
        </presentation:notes>
      </draw:page>
      <draw:page draw:name="page9" draw:style-name="a779" draw:master-page-name="Master1-Layout7-blank-Vide" presentation:presentation-page-layout-name="Master1-PPL7" draw:id="Slide-264">
        <draw:custom-shape svg:x="0in" svg:y="0in" svg:width="10in" svg:height="3.25in" draw:id="id116" draw:style-name="a789" draw:name="Forme libre : forme 1">
          <svg:title/>
          <svg:desc/>
          <text:p text:style-name="a782" text:class-names="" text:cond-style-name=""><text:span text:style-name="a780" text:class-names="">4. Résonance<text:s text:c="1"/></text:span><text:span text:style-name="a781" text:class-names="">magnétique nucléaire, IRM (1980)</text:span></text:p>
          <text:p text:style-name="a784" text:class-names="" text:cond-style-name=""><text:span text:style-name="a783" text:class-names=""/></text:p>
          <text:p text:style-name="a786" text:class-names="" text:cond-style-name=""><text:span text:style-name="a785" text:class-names="">.</text:span></text:p>
          <text:p text:style-name="a788" text:class-names="" text:cond-style-name=""><text:span text:style-name="a78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7" draw:style-name="a790" draw:name="SEP_IRM" svg:x="2.66654in" svg:y="3.58346in" svg:width="4.55039in" svg:height="3.19094in" style:rel-width="scale" style:rel-height="scale">
          <draw:image xlink:href="media/image7.jpg" xlink:type="simple" xlink:show="embed" xlink:actuate="onLoad"/>
          <svg:title/>
          <svg:desc/>
        </draw:frame>
        <draw:custom-shape svg:x="0.01923in" svg:y="6.92205in" svg:width="10.13516in" svg:height="0.43995in" draw:id="id119" draw:style-name="a799" draw:name="Forme libre : forme 3">
          <svg:title/>
          <svg:desc/>
          <text:p text:style-name="a798" text:class-names="" text:cond-style-name="" text:id="id118"><text:span text:style-name="a791" text:class-names="">Mesure mieux la viscosité que la<text:s text:c="1"/></text:span><text:span text:style-name="a792" text:class-names="">densité</text:span><text:span text:style-name="a793" text:class-names=""><text:s text:c="1"/>/</text:span><text:span text:style-name="a794" text:class-names=""><text:s text:c="1"/></text:span><text:span text:style-name="a795" text:class-names="">Examens fonctionnels du<text:s text:c="1"/></text:span><text:span text:style-name="a796" text:class-names="">cerveau</text:span><text:span text:style-name="a79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91654in" svg:width="10in" svg:height="2.62323in" draw:id="id124" draw:style-name="a810" draw:name="Forme libre : forme 4">
          <svg:title/>
          <svg:desc/>
          <text:p text:style-name="a801" text:class-names="" text:cond-style-name="" text:id="id120"><text:span text:style-name="a800" text:class-names="">Basée sur la résonance des protons de l'eau contenus dans les différents tissus mous.</text:span></text:p>
          <text:p text:style-name="a805" text:class-names="" text:cond-style-name="" text:id="id121"><text:span text:style-name="a802" text:class-names="">Leur fréquence de résonance est proportionnelle au<text:s text:c="1"/></text:span><text:span text:style-name="a803" text:class-names="">champ<text:s text:c="1"/></text:span><text:span text:style-name="a804" text:class-names="">magnétique appliqué, dont l'amplitude varie.</text:span></text:p>
          <text:p text:style-name="a807" text:class-names="" text:cond-style-name="" text:id="id122"><text:span text:style-name="a806" text:class-names="">L'espace est alors codé en fonction de ces résonances.</text:span></text:p>
          <text:p text:style-name="a809" text:class-names="" text:cond-style-name="" text:id="id123"><text:span text:style-name="a808" text:class-names="">On obtient la transformée de Fourier des viscosités sur des coupes 2D</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24"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17"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19" smil:attributeName="visibility" smil:to="visible" smil:begin="0.0s" smil:dur="0.00100000004749745s" smil:fill="hold"/>
                </anim:par>
              </anim:par>
            </anim:par>
          </anim:seq>
        </anim:par>
        <presentation:notes draw:style-name="a818">
          <draw:frame draw:id="id125" draw:style-name="a813" draw:name="Espace réservé du numéro de diapositive 7" svg:x="4.16654in" svg:y="10.25in" svg:width="3.16693in" svg:height="0.5in">
            <draw:text-box>
              <text:p text:style-name="a812" text:class-names="" text:cond-style-name=""><text:span text:style-name="a811" text:class-names=""><text:page-number style:num-format="1" text:fixed="false"/></text:span></text:p>
            </draw:text-box>
            <svg:title/>
            <svg:desc/>
          </draw:frame>
          <draw:page-thumbnail draw:page-number="8" svg:x="1.04167in" svg:y="0.83333in" svg:width="5.33333in" svg:height="4in" presentation:class="page" draw:id="id126" presentation:style-name="a814" draw:name="Espace réservé de l'image des diapositives 1">
            <svg:title/>
            <svg:desc/>
          </draw:page-thumbnail>
          <draw:frame draw:id="id127" draw:style-name="a817" draw:name="ZoneTexte 2" svg:x="1in" svg:y="5.16614in" svg:width="5.41654in" svg:height="4.83346in">
            <draw:text-box>
              <text:p text:style-name="a816" text:class-names="" text:cond-style-name=""><text:span text:style-name="a815" text:class-names=""/></text:p>
            </draw:text-box>
            <svg:title/>
            <svg:desc/>
          </draw:frame>
        </presentation:notes>
      </draw:page>
      <draw:page draw:name="page10" draw:style-name="a820" draw:master-page-name="Master1-Layout7-blank-Vide" presentation:presentation-page-layout-name="Master1-PPL7" draw:id="Slide-265">
        <draw:custom-shape svg:x="0.25in" svg:y="0.25in" svg:width="9.75in" svg:height="0.91654in" draw:id="id134" draw:style-name="a836" draw:name="Forme libre : forme 1">
          <svg:title/>
          <svg:desc/>
          <text:p text:style-name="a822" text:class-names="" text:cond-style-name="" text:id="id128"><text:span text:style-name="a821" text:class-names=""/></text:p>
          <text:p text:style-name="a825" text:class-names="" text:cond-style-name="" text:id="id129"><text:span text:style-name="a823" text:class-names="">5. Scanner :<text:s text:c="1"/></text:span><text:span text:style-name="a824" text:class-names="">tomographie de transmission</text:span></text:p>
          <text:p text:style-name="a829" text:class-names="" text:cond-style-name="" text:id="id130"><text:span text:style-name="a826" text:class-names=""><text:s text:c="14"/></text:span><text:span text:style-name="a827" text:class-names=""><text:s text:c="1"/>(</text:span><text:span text:style-name="a828" text:class-names="">tomodensitométrie X)</text:span></text:p>
          <text:p text:style-name="a831" text:class-names="" text:cond-style-name="" text:id="id131"><text:span text:style-name="a830" text:class-names=""/></text:p>
          <text:p text:style-name="a833" text:class-names="" text:cond-style-name="" text:id="id132"><text:span text:style-name="a832" text:class-names=""><text:s text:c="1"/></text:span></text:p>
          <text:p text:style-name="a835" text:class-names="" text:cond-style-name="" text:id="id133"><text:span text:style-name="a83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1653in" svg:width="10in" svg:height="0.58346in" draw:id="id137" draw:style-name="a842" draw:name="Forme libre : forme 2">
          <svg:title/>
          <svg:desc/>
          <text:p text:style-name="a839" text:class-names="" text:cond-style-name="" text:id="id135"><text:span text:style-name="a837" text:class-names=""><text:s text:c="1"/></text:span><text:span text:style-name="a838" text:class-names="">Examen morphologique seulement: densité des tissus durs, des os,...</text:span></text:p>
          <text:p text:style-name="a841" text:class-names="" text:cond-style-name="" text:id="id136"><text:span text:style-name="a84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8" draw:style-name="a843" draw:name="emphy_tdm" svg:x="2.63046in" svg:y="2.85197in" svg:width="4.58504in" svg:height="3.64567in" style:rel-width="scale" style:rel-height="scale">
          <draw:image xlink:href="media/image8.png" xlink:type="simple" xlink:show="embed" xlink:actuate="onLoad"/>
          <svg:title/>
          <svg:desc/>
        </draw:frame>
        <draw:custom-shape svg:x="0.14173in" svg:y="1.25in" svg:width="9.8626in" svg:height="1.5752in" draw:id="id143" draw:style-name="a857" draw:name="Forme libre : forme 4">
          <svg:title/>
          <svg:desc/>
          <text:p text:style-name="a847" text:class-names="" text:cond-style-name="" text:id="id139"><text:span text:style-name="a844" text:class-names="">Plus coûteux techniquement, mais<text:s text:c="1"/></text:span><text:span text:style-name="a845" text:class-names="">« vraie »<text:s text:c="1"/></text:span><text:span text:style-name="a846" text:class-names="">tomographie.</text:span></text:p>
          <text:p text:style-name="a849" text:class-names="" text:cond-style-name="" text:id="id140"><text:span text:style-name="a848" text:class-names="">1er scanner commercialisé en 1963<text:s text:c="1"/></text:span></text:p>
          <text:p text:style-name="a854" text:class-names="" text:cond-style-name="" text:id="id141"><text:span text:style-name="a850" text:class-names="">Tomographie Assistée par Ordinateur en 1972 (Hounsfield,<text:s text:c="1"/></text:span><text:span text:style-name="a851" text:class-names="">Cormack</text:span><text:span text:style-name="a852" text:class-names="">)</text:span><text:span text:style-name="a853" text:class-names=""/></text:p>
          <text:p text:style-name="a856" text:class-names="" text:cond-style-name="" text:id="id142"><text:span text:style-name="a8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34"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43"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38"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37" smil:attributeName="visibility" smil:to="visible" smil:begin="0.0s" smil:dur="0.00100000004749745s" smil:fill="hold"/>
                </anim:par>
              </anim:par>
            </anim:par>
          </anim:seq>
        </anim:par>
        <presentation:notes draw:style-name="a863">
          <draw:frame draw:id="id144" draw:style-name="a860" draw:name="Espace réservé du numéro de diapositive 7" svg:x="4.16654in" svg:y="10.25in" svg:width="3.16693in" svg:height="0.5in">
            <draw:text-box>
              <text:p text:style-name="a859" text:class-names="" text:cond-style-name=""><text:span text:style-name="a858" text:class-names=""><text:page-number style:num-format="1" text:fixed="false"/></text:span></text:p>
            </draw:text-box>
            <svg:title/>
            <svg:desc/>
          </draw:frame>
          <draw:page-thumbnail draw:page-number="9" svg:x="1.04167in" svg:y="0.83333in" svg:width="5.33333in" svg:height="4in" presentation:class="page" draw:id="id145" presentation:style-name="a861" draw:name="Espace réservé de l'image des diapositives 1">
            <svg:title/>
            <svg:desc/>
          </draw:page-thumbnail>
          <draw:frame draw:id="id146" presentation:style-name="a862" draw:name="Espace réservé des notes 2" svg:x="1in" svg:y="5.16614in" svg:width="5.41654in" svg:height="4.83386in" presentation:class="notes" presentation:placeholder="true">
            <draw:text-box/>
            <svg:title/>
            <svg:desc/>
          </draw:frame>
        </presentation:notes>
      </draw:page>
      <draw:page draw:name="page11" draw:style-name="a865" draw:master-page-name="Master1-Layout7-blank-Vide" presentation:presentation-page-layout-name="Master1-PPL7" draw:id="Slide-266">
        <draw:custom-shape svg:x="0.75in" svg:y="0.41654in" svg:width="8.5in" svg:height="1.25in" draw:id="id148" draw:style-name="a868" draw:name="Forme libre : forme 1">
          <svg:title/>
          <svg:desc/>
          <text:p text:style-name="a867" text:class-names="" text:cond-style-name="" text:id="id147"><text:span text:style-name="a866" text:class-names="">Caméra mixte TEP &amp; Scanner</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9" draw:style-name="a869" svg:x="1.5in" svg:y="1.91653in" svg:width="6.91653in" svg:height="5.07126in" style:rel-width="scale" style:rel-height="scale">
          <draw:image xlink:href="media/image9.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48"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49" smil:attributeName="visibility" smil:to="visible" smil:begin="0.0s" smil:dur="0.00100000004749745s" smil:fill="hold"/>
                </anim:par>
              </anim:par>
            </anim:par>
          </anim:seq>
        </anim:par>
        <presentation:notes draw:style-name="a875">
          <draw:frame draw:id="id150" draw:style-name="a872" draw:name="Espace réservé du numéro de diapositive 7" svg:x="4.16654in" svg:y="10.25in" svg:width="3.16693in" svg:height="0.5in">
            <draw:text-box>
              <text:p text:style-name="a871" text:class-names="" text:cond-style-name=""><text:span text:style-name="a870" text:class-names=""><text:page-number style:num-format="1" text:fixed="false"/></text:span></text:p>
            </draw:text-box>
            <svg:title/>
            <svg:desc/>
          </draw:frame>
          <draw:page-thumbnail draw:page-number="10" svg:x="1.04167in" svg:y="0.83333in" svg:width="5.33333in" svg:height="4in" presentation:class="page" draw:id="id151" presentation:style-name="a873" draw:name="Espace réservé de l'image des diapositives 1">
            <svg:title/>
            <svg:desc/>
          </draw:page-thumbnail>
          <draw:frame draw:id="id152" presentation:style-name="a874" draw:name="Espace réservé des notes 2" svg:x="1in" svg:y="5.16614in" svg:width="5.41654in" svg:height="4.83386in" presentation:class="notes" presentation:placeholder="true">
            <draw:text-box/>
            <svg:title/>
            <svg:desc/>
          </draw:frame>
        </presentation:notes>
      </draw:page>
      <draw:page draw:name="page12" draw:style-name="a877" draw:master-page-name="Master1-Layout7-blank-Vide" presentation:presentation-page-layout-name="Master1-PPL7" draw:id="Slide-267">
        <draw:frame draw:id="id153" draw:style-name="a878" draw:name="scan1" svg:x="0.41654in" svg:y="0.16654in" svg:width="8.84724in" svg:height="6.37165in" style:rel-width="scale" style:rel-height="scale">
          <draw:image xlink:href="media/image10.png" xlink:type="simple" xlink:show="embed" xlink:actuate="onLoad"/>
          <svg:title/>
          <svg:desc/>
        </draw:frame>
        <draw:custom-shape svg:x="0.57807in" svg:y="6.73268in" svg:width="8.88718in" svg:height="0.77653in" draw:id="id154" draw:style-name="a889" draw:name="Forme libre : forme 2">
          <svg:title/>
          <svg:desc/>
          <text:p text:style-name="a882" text:class-names="" text:cond-style-name=""><text:span text:style-name="a879" text:class-names="">G</text:span><text:span text:style-name="a880" text:class-names="">éométrie parallèle. Recherche simultanée des coupes : tomographie</text:span><text:span text:style-name="a881" text:class-names=""/></text:p>
          <text:p text:style-name="a888" text:class-names="" text:cond-style-name=""><text:span text:style-name="a883" text:class-names="">Rotation totale du s</text:span><text:span text:style-name="a884" text:class-names="">ystème -&gt; plus<text:s text:c="1"/></text:span><text:span text:style-name="a885" text:class-names="">coûteux que la<text:s text:c="1"/></text:span><text:span text:style-name="a886" text:class-names="">« tomographie classique »</text:span><text:span text:style-name="a88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895">
          <draw:frame draw:id="id155" draw:style-name="a892" draw:name="Espace réservé du numéro de diapositive 7" svg:x="4.16654in" svg:y="10.25in" svg:width="3.16693in" svg:height="0.5in">
            <draw:text-box>
              <text:p text:style-name="a891" text:class-names="" text:cond-style-name=""><text:span text:style-name="a890" text:class-names=""><text:page-number style:num-format="1" text:fixed="false"/></text:span></text:p>
            </draw:text-box>
            <svg:title/>
            <svg:desc/>
          </draw:frame>
          <draw:page-thumbnail draw:page-number="11" svg:x="1.04167in" svg:y="0.83333in" svg:width="5.33333in" svg:height="4in" presentation:class="page" draw:id="id156" presentation:style-name="a893" draw:name="Espace réservé de l'image des diapositives 1">
            <svg:title/>
            <svg:desc/>
          </draw:page-thumbnail>
          <draw:frame draw:id="id157" presentation:style-name="a894" draw:name="Espace réservé des notes 2" svg:x="1in" svg:y="5.16614in" svg:width="5.41654in" svg:height="4.83386in" presentation:class="notes" presentation:placeholder="true">
            <draw:text-box/>
            <svg:title/>
            <svg:desc/>
          </draw:frame>
        </presentation:notes>
      </draw:page>
      <draw:page draw:name="page13" draw:style-name="a897" draw:master-page-name="Master1-Layout7-blank-Vide" presentation:presentation-page-layout-name="Master1-PPL7" draw:id="Slide-268">
        <draw:frame draw:id="id158" draw:style-name="a898" draw:name="scan2" svg:x="0.83346in" svg:y="0.16654in" svg:width="8.51378in" svg:height="6.46732in" style:rel-width="scale" style:rel-height="scale">
          <draw:image xlink:href="media/image11.png" xlink:type="simple" xlink:show="embed" xlink:actuate="onLoad"/>
          <svg:title/>
          <svg:desc/>
        </draw:frame>
        <draw:custom-shape svg:x="1.97389in" svg:y="6.83346in" svg:width="6.28136in" svg:height="0.43995in" draw:id="id159" draw:style-name="a906" draw:name="Forme libre : forme 2">
          <svg:title/>
          <svg:desc/>
          <text:p text:style-name="a905" text:class-names="" text:cond-style-name=""><text:span text:style-name="a899" text:class-names=""><text:s text:c="1"/></text:span><text:span text:style-name="a900" text:class-names="">G</text:span><text:span text:style-name="a901" text:class-names="">éométrie conique.<text:s text:c="1"/></text:span><text:span text:style-name="a902" text:class-names="">P</text:span><text:span text:style-name="a903" text:class-names="">rincipe similaire moins coûteux</text:span><text:span text:style-name="a90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912">
          <draw:frame draw:id="id160" draw:style-name="a909" draw:name="Espace réservé du numéro de diapositive 7" svg:x="4.16654in" svg:y="10.25in" svg:width="3.16693in" svg:height="0.5in">
            <draw:text-box>
              <text:p text:style-name="a908" text:class-names="" text:cond-style-name=""><text:span text:style-name="a907" text:class-names=""><text:page-number style:num-format="1" text:fixed="false"/></text:span></text:p>
            </draw:text-box>
            <svg:title/>
            <svg:desc/>
          </draw:frame>
          <draw:page-thumbnail draw:page-number="12" svg:x="1.04167in" svg:y="0.83333in" svg:width="5.33333in" svg:height="4in" presentation:class="page" draw:id="id161" presentation:style-name="a910" draw:name="Espace réservé de l'image des diapositives 1">
            <svg:title/>
            <svg:desc/>
          </draw:page-thumbnail>
          <draw:frame draw:id="id162" presentation:style-name="a911" draw:name="Espace réservé des notes 2" svg:x="1in" svg:y="5.16614in" svg:width="5.41654in" svg:height="4.83386in" presentation:class="notes" presentation:placeholder="true">
            <draw:text-box/>
            <svg:title/>
            <svg:desc/>
          </draw:frame>
        </presentation:notes>
      </draw:page>
      <draw:page draw:name="page14" draw:style-name="a914" draw:master-page-name="Master1-Layout7-blank-Vide" presentation:presentation-page-layout-name="Master1-PPL7" draw:id="Slide-269">
        <draw:frame draw:id="id163" draw:style-name="a915" draw:name="fan_beam" svg:x="2.75in" svg:y="1.25in" svg:width="4.41653in" svg:height="4.38898in" style:rel-width="scale" style:rel-height="scale">
          <draw:image xlink:href="media/image12.jpg" xlink:type="simple" xlink:show="embed" xlink:actuate="onLoad"/>
          <svg:title/>
          <svg:desc/>
        </draw:frame>
        <draw:custom-shape svg:x="1.16378in" svg:y="0.33346in" svg:width="8.34803in" svg:height="0.76969in" draw:id="id166" draw:style-name="a925" draw:name="Forme libre : forme 2">
          <svg:title/>
          <svg:desc/>
          <text:p text:style-name="a922" text:class-names="" text:cond-style-name="" text:id="id164"><text:span text:style-name="a916" text:class-names="">GEOMETRIE PARALLELE</text:span><text:span text:style-name="a917" text:class-names=""><text:s text:c="2"/></text:span><text:span text:style-name="a918" text:class-names=""><text:s text:c="2"/></text:span><text:span text:style-name="a919" text:class-names=""><text:s text:c="10"/></text:span><text:span text:style-name="a920" text:class-names=""><text:s text:c="1"/></text:span><text:span text:style-name="a921" text:class-names="">TRANSFORMEE DE RADON</text:span></text:p>
          <text:p text:style-name="a924" text:class-names="" text:cond-style-name="" text:id="id165"><text:span text:style-name="a9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47559in" svg:y="6.16654in" svg:width="7.19094in" svg:height="0.77653in" draw:id="id169" draw:style-name="a935" draw:name="Forme libre : forme 3">
          <svg:title/>
          <svg:desc/>
          <text:p text:style-name="a932" text:class-names="" text:cond-style-name="" text:id="id167"><text:span text:style-name="a926" text:class-names="">GEOMETRIE CONIQUE<text:s text:c="1"/></text:span><text:span text:style-name="a927" text:class-names=""><text:s text:c="17"/></text:span><text:span text:style-name="a928" text:class-names="">FAN-BEAM<text:s text:c="1"/></text:span><text:span text:style-name="a929" text:class-names="">TRANSFORM</text:span><text:span text:style-name="a930" text:class-names=""><text:s text:c="1"/></text:span><text:span text:style-name="a931" text:class-names=""/></text:p>
          <text:p text:style-name="a934" text:class-names="" text:cond-style-name="" text:id="id168"><text:span text:style-name="a933" text:class-names=""><text:s text:c="1"/></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5in" svg:y="0.41654in" svg:width="0.41654in" svg:height="0.25in" draw:id="id171" draw:style-name="a938" draw:name="Forme libre : forme 4">
          <svg:title/>
          <svg:desc/>
          <text:p text:style-name="a937" text:class-names="" text:cond-style-name="" text:id="id170"><text:span text:style-name="a936" text:class-names=""/></text:p>
          <draw:enhanced-geometry xmlns:dr3d="urn:oasis:names:tc:opendocument:xmlns:dr3d:1.0" draw:type="non-primitive" svg:viewBox="0 0 21600 21600" draw:enhanced-path="M ?f8 ?f12 L ?f11 ?f12 ?f11 ?f8 ?f9 ?f10 ?f11 ?f9 ?f11 ?f15 ?f8 ?f15 Z N" draw:text-areas="?f20 ?f12 ?f21 ?f15"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f16 * ?f12"/>
            <draw:equation draw:name="f19" draw:formula="?f18 / 10800"/>
            <draw:equation draw:name="f20" draw:formula="?f17 / ?f14"/>
            <draw:equation draw:name="f21" draw:formula="?f11 + ?f19"/>
            <draw:equation draw:name="f22" draw:formula="$0 / ?f6"/>
            <draw:equation draw:name="f23" draw:formula="$1 / ?f7"/>
            <draw:handle draw:handle-position="$0 $1" draw:handle-range-x-minimum="0" draw:handle-range-x-maximum="21600" draw:handle-range-y-minimum="0" draw:handle-range-y-maximum="10800"/>
          </draw:enhanced-geometry>
        </draw:custom-shape>
        <draw:custom-shape svg:x="4.79173in" svg:y="6.25in" svg:width="0.41654in" svg:height="0.25in" draw:id="id173" draw:style-name="a941" draw:name="Forme libre : forme 5">
          <svg:title/>
          <svg:desc/>
          <text:p text:style-name="a940" text:class-names="" text:cond-style-name="" text:id="id172"><text:span text:style-name="a939" text:class-names=""/></text:p>
          <draw:enhanced-geometry xmlns:dr3d="urn:oasis:names:tc:opendocument:xmlns:dr3d:1.0" draw:type="non-primitive" svg:viewBox="0 0 21600 21600" draw:enhanced-path="M ?f8 ?f12 L ?f11 ?f12 ?f11 ?f8 ?f9 ?f10 ?f11 ?f9 ?f11 ?f15 ?f8 ?f15 Z N" draw:text-areas="?f20 ?f12 ?f21 ?f15"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f16 * ?f12"/>
            <draw:equation draw:name="f19" draw:formula="?f18 / 10800"/>
            <draw:equation draw:name="f20" draw:formula="?f17 / ?f14"/>
            <draw:equation draw:name="f21" draw:formula="?f11 + ?f19"/>
            <draw:equation draw:name="f22" draw:formula="$0 / ?f6"/>
            <draw:equation draw:name="f23" draw:formula="$1 / ?f7"/>
            <draw:handle draw:handle-position="$0 $1" draw:handle-range-x-minimum="0" draw:handle-range-x-maximum="21600" draw:handle-range-y-minimum="0" draw:handle-range-y-maximum="10800"/>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66"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71"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63"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69"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73"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presentation:notes draw:style-name="a947">
          <draw:frame draw:id="id174" draw:style-name="a944" draw:name="Espace réservé du numéro de diapositive 7" svg:x="4.16654in" svg:y="10.25in" svg:width="3.16693in" svg:height="0.5in">
            <draw:text-box>
              <text:p text:style-name="a943" text:class-names="" text:cond-style-name=""><text:span text:style-name="a942" text:class-names=""><text:page-number style:num-format="1" text:fixed="false"/></text:span></text:p>
            </draw:text-box>
            <svg:title/>
            <svg:desc/>
          </draw:frame>
          <draw:page-thumbnail draw:page-number="13" svg:x="1.04167in" svg:y="0.83333in" svg:width="5.33333in" svg:height="4in" presentation:class="page" draw:id="id175" presentation:style-name="a945" draw:name="Espace réservé de l'image des diapositives 1">
            <svg:title/>
            <svg:desc/>
          </draw:page-thumbnail>
          <draw:frame draw:id="id176" presentation:style-name="a946" draw:name="Espace réservé des notes 2" svg:x="1in" svg:y="5.16614in" svg:width="5.41654in" svg:height="4.83386in" presentation:class="notes" presentation:placeholder="true">
            <draw:text-box/>
            <svg:title/>
            <svg:desc/>
          </draw:frame>
        </presentation:notes>
      </draw:page>
      <draw:page draw:name="page15" draw:style-name="a949" draw:master-page-name="Master1-Layout7-blank-Vide" presentation:presentation-page-layout-name="Master1-PPL7" draw:id="Slide-270">
        <draw:custom-shape svg:x="0in" svg:y="0in" svg:width="10in" svg:height="1.66654in" draw:id="id177" draw:style-name="a959" draw:name="Forme libre : forme 1">
          <svg:title/>
          <svg:desc/>
          <text:p text:style-name="a952" text:class-names="" text:cond-style-name=""><text:span text:style-name="a950" text:class-names="">Moyennes des densités sur des<text:s text:c="1"/></text:span><text:span text:style-name="a951" text:class-names="">lignes</text:span></text:p>
          <text:p text:style-name="a954" text:class-names="" text:cond-style-name=""><text:span text:style-name="a953" text:class-names=""/></text:p>
          <text:p text:style-name="a958" text:class-names="" text:cond-style-name=""><text:span text:style-name="a955" text:class-names="">Coupe par coupe <text:s text:c="13"/></text:span><text:span text:style-name="a956" text:class-names="">Tomographie 2D</text:span><text:span text:style-name="a95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6563in" svg:y="2.34882in" svg:width="10in" svg:height="0.00039in" draw:id="id178" draw:style-name="a962" draw:name="Forme libre : forme 2">
          <svg:title/>
          <svg:desc/>
          <text:p text:style-name="a961" text:class-names="" text:cond-style-name=""><text:span text:style-name="a96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9" draw:style-name="a963" draw:name="thorax" svg:x="0.46579in" svg:y="2.19086in" svg:width="3.08346in" svg:height="2.50866in" style:rel-width="scale" style:rel-height="scale">
          <draw:image xlink:href="media/image1.jpg" xlink:type="simple" xlink:show="embed" xlink:actuate="onLoad"/>
          <svg:title/>
          <svg:desc/>
        </draw:frame>
        <draw:frame draw:id="id180" draw:style-name="a964" draw:name="tdm" svg:x="7.36833in" svg:y="2.22125in" svg:width="2.51024in" svg:height="2.16496in" style:rel-width="scale" style:rel-height="scale">
          <draw:image xlink:href="media/image13.jpg" xlink:type="simple" xlink:show="embed" xlink:actuate="onLoad"/>
          <svg:title/>
          <svg:desc/>
        </draw:frame>
        <draw:custom-shape svg:x="1.4899in" svg:y="2.8681in" svg:width="0.22047in" svg:height="0.16339in" draw:id="id181" draw:style-name="a967" draw:name="Forme libre : forme 31">
          <svg:title/>
          <svg:desc/>
          <text:p text:style-name="a966" text:class-names="" text:cond-style-name=""><text:span text:style-name="a96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52629in" svg:y="2.85629in" svg:width="3.08346in" svg:height="0.1752in" draw:id="id182" draw:style-name="a970" draw:name="Forme libre : forme 32">
          <svg:title/>
          <svg:desc/>
          <text:p text:style-name="a969" text:class-names="" text:cond-style-name=""><text:span text:style-name="a96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3" draw:style-name="a974" draw:name="ZoneTexte 35" svg:x="6.58346in" svg:y="3.91653in" svg:width="3.10748in" svg:height="0.93937in">
          <draw:text-box>
            <text:p text:style-name="a973" text:class-names="" text:cond-style-name=""><draw:frame draw:style-name="a971" text:anchor-type="as-char" svg:x="1172.89451in" svg:y="0in" svg:width="2.59639in" svg:height="0.74701in" style:rel-width="scale" style:rel-height="scale"><draw:object xlink:href="Object 1/" xlink:type="simple" xlink:show="embed" xlink:actuate="onLoad"/></draw:frame><text:span text:style-name="a972" text:class-names=""/></text:p>
          </draw:text-box>
          <svg:title/>
          <svg:desc/>
        </draw:frame>
        <draw:frame draw:id="id184" draw:style-name="a978" draw:name="ZoneTexte 36" svg:x="6.63701in" svg:y="3.16653in" svg:width="1.70157in" svg:height="0.73465in">
          <draw:text-box>
            <text:p text:style-name="a977" text:class-names="" text:cond-style-name=""><draw:frame draw:style-name="a975" text:anchor-type="as-char" svg:x="1173.41597in" svg:y="0in" svg:width="1.5534in" svg:height="0.31854in" style:rel-width="scale" style:rel-height="scale"><draw:object xlink:href="Object 2/" xlink:type="simple" xlink:show="embed" xlink:actuate="onLoad"/></draw:frame><text:span text:style-name="a976" text:class-names=""/></text:p>
          </draw:text-box>
          <svg:title/>
          <svg:desc/>
        </draw:frame>
        <draw:frame draw:id="id185" draw:style-name="a979" draw:name="form1-red" svg:x="3.71889in" svg:y="2.21142in" svg:width="3.27244in" svg:height="1.02244in" style:rel-width="scale" style:rel-height="scale">
          <draw:image xlink:href="media/image14.png" xlink:type="simple" xlink:show="embed" xlink:actuate="onLoad"/>
          <svg:title/>
          <svg:desc/>
        </draw:frame>
        <draw:custom-shape svg:x="4.72047in" svg:y="1.19803in" svg:width="0.91693in" svg:height="0.25in" draw:id="id186" draw:style-name="a982" draw:name="Forme libre : forme 38">
          <svg:title/>
          <svg:desc/>
          <text:p text:style-name="a981" text:class-names="" text:cond-style-name=""><text:span text:style-name="a980" text:class-names=""/></text:p>
          <draw:enhanced-geometry xmlns:dr3d="urn:oasis:names:tc:opendocument:xmlns:dr3d:1.0" draw:type="non-primitive" svg:viewBox="0 0 21600 21600" draw:enhanced-path="M ?f8 ?f10 L ?f11 ?f8 ?f11 ?f12 ?f13 ?f12 ?f13 ?f8 ?f9 ?f10 ?f13 ?f9 ?f13 ?f14 ?f11 ?f14 ?f11 ?f9 Z N" draw:text-areas="?f17 ?f12 ?f18 ?f14" draw:modifiers="43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draw:frame draw:id="id187" draw:style-name="a983" draw:name="Image 39" svg:x="3.71037in" svg:y="3.57888in" svg:width="3.16027in" svg:height="2.76024in" style:rel-width="scale" style:rel-height="scale">
          <draw:image xlink:href="media/image15.png" xlink:type="simple" xlink:show="embed" xlink:actuate="onLoad"/>
          <svg:title/>
          <svg:desc/>
        </draw:frame>
        <draw:custom-shape svg:x="0.9586in" svg:y="6.64355in" svg:width="8.08281in" svg:height="0.57458in" draw:id="id189" draw:style-name="a989" draw:name="Forme libre : forme 40">
          <svg:title/>
          <svg:desc/>
          <text:p text:style-name="a988" text:class-names="" text:cond-style-name="" text:id="id188"><text:span text:style-name="a984" text:class-names="">NE PAS PRIVILEGIER DE DIRECTION<text:s text:c="1"/></text:span><text:span text:style-name="a985" text:class-names=""><text:s text:c="1"/></text:span><text:span text:style-name="a986" text:class-names="">-&gt; <text:s text:c="1"/>"VRAI 3D"<text:s text:c="1"/></text:span><text:span text:style-name="a98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89" smil:attributeName="visibility" smil:to="visible" smil:begin="0.0s" smil:dur="0.00100000004749745s" smil:fill="hold"/>
                </anim:par>
              </anim:par>
            </anim:par>
          </anim:seq>
        </anim:par>
        <presentation:notes draw:style-name="a995">
          <draw:frame draw:id="id190" draw:style-name="a992" draw:name="Espace réservé du numéro de diapositive 7" svg:x="4.16654in" svg:y="10.25in" svg:width="3.16693in" svg:height="0.5in">
            <draw:text-box>
              <text:p text:style-name="a991" text:class-names="" text:cond-style-name=""><text:span text:style-name="a990" text:class-names=""><text:page-number style:num-format="1" text:fixed="false"/></text:span></text:p>
            </draw:text-box>
            <svg:title/>
            <svg:desc/>
          </draw:frame>
          <draw:page-thumbnail draw:page-number="14" svg:x="1.04167in" svg:y="0.83333in" svg:width="5.33333in" svg:height="4in" presentation:class="page" draw:id="id191" presentation:style-name="a993" draw:name="Espace réservé de l'image des diapositives 1">
            <svg:title/>
            <svg:desc/>
          </draw:page-thumbnail>
          <draw:frame draw:id="id192" presentation:style-name="a994" draw:name="Espace réservé des notes 2" svg:x="1in" svg:y="5.16614in" svg:width="5.41654in" svg:height="4.83386in" presentation:class="notes" presentation:placeholder="true">
            <draw:text-box/>
            <svg:title/>
            <svg:desc/>
          </draw:frame>
        </presentation:notes>
      </draw:page>
      <draw:page draw:name="page17" draw:style-name="a997" draw:master-page-name="Master1-Layout7-blank-Vide" presentation:presentation-page-layout-name="Master1-PPL7" draw:id="Slide-272">
        <draw:frame draw:id="id193" draw:style-name="a998" draw:name="spirales" svg:x="1.61376in" svg:y="2.45947in" svg:width="7in" svg:height="4.25197in" style:rel-width="scale" style:rel-height="scale">
          <draw:image xlink:href="media/image16.jpg" xlink:type="simple" xlink:show="embed" xlink:actuate="onLoad"/>
          <svg:title/>
          <svg:desc/>
        </draw:frame>
        <draw:custom-shape svg:x="2.20442in" svg:y="0.54785in" svg:width="6.0279in" svg:height="1.7863in" draw:id="id194" draw:style-name="a1014" draw:name="Forme libre : forme 2">
          <svg:title/>
          <svg:desc/>
          <text:p text:style-name="a1001" text:class-names="" text:cond-style-name=""><text:span text:style-name="a999" text:class-names="">ROTATION ET TRANSLATION<text:s text:c="1"/></text:span><text:span text:style-name="a1000" text:class-names="">SIMULTANEE</text:span></text:p>
          <text:p text:style-name="a1003" text:class-names="" text:cond-style-name=""><text:span text:style-name="a1002" text:class-names=""/></text:p>
          <text:p text:style-name="a1005" text:class-names="" text:cond-style-name=""><text:span text:style-name="a1004" text:class-names="">ACQUISITION EN SPIRALES</text:span></text:p>
          <text:p text:style-name="a1007" text:class-names="" text:cond-style-name=""><text:span text:style-name="a1006" text:class-names=""/></text:p>
          <text:p text:style-name="a1013" text:class-names="" text:cond-style-name=""><text:span text:style-name="a1008" text:class-names=""><text:s text:c="2"/></text:span><text:span text:style-name="a1009" text:class-names=""><text:s text:c="3"/></text:span><text:span text:style-name="a1010" text:class-names=""><text:s text:c="46"/></text:span><text:span text:style-name="a1011" text:class-names=""><text:s text:c="1"/></text:span><text:span text:style-name="a101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1020">
          <draw:frame draw:id="id195" draw:style-name="a1017" draw:name="Espace réservé du numéro de diapositive 7" svg:x="4.16654in" svg:y="10.25in" svg:width="3.16693in" svg:height="0.5in">
            <draw:text-box>
              <text:p text:style-name="a1016" text:class-names="" text:cond-style-name=""><text:span text:style-name="a1015" text:class-names=""><text:page-number style:num-format="1" text:fixed="false"/></text:span></text:p>
            </draw:text-box>
            <svg:title/>
            <svg:desc/>
          </draw:frame>
          <draw:page-thumbnail draw:page-number="15" svg:x="1.04167in" svg:y="0.83333in" svg:width="5.33333in" svg:height="4in" presentation:class="page" draw:id="id196" presentation:style-name="a1018" draw:name="Espace réservé de l'image des diapositives 1">
            <svg:title/>
            <svg:desc/>
          </draw:page-thumbnail>
          <draw:frame draw:id="id197" presentation:style-name="a1019" draw:name="Espace réservé des notes 2" svg:x="1in" svg:y="5.16614in" svg:width="5.41654in" svg:height="4.83386in" presentation:class="notes" presentation:placeholder="true">
            <draw:text-box/>
            <svg:title/>
            <svg:desc/>
          </draw:frame>
        </presentation:notes>
      </draw:page>
      <draw:page draw:name="page18" draw:style-name="a1022" draw:master-page-name="Master1-Layout7-blank-Vide" presentation:presentation-page-layout-name="Master1-PPL7" draw:id="Slide-273">
        <draw:custom-shape svg:x="0in" svg:y="0in" svg:width="10in" svg:height="3.66654in" draw:id="id201" draw:style-name="a1034" draw:name="Forme libre : forme 1">
          <svg:title/>
          <svg:desc/>
          <text:p text:style-name="a1026" text:class-names="" text:cond-style-name="" text:id="id198"><text:span text:style-name="a1023" text:class-names="">6.<text:s text:c="1"/></text:span><text:span text:style-name="a1024" text:class-names="">Tomo-scintigraphie</text:span><text:span text:style-name="a1025" text:class-names="">, médecine nucléaire (1980)</text:span></text:p>
          <text:p text:style-name="a1031" text:class-names="" text:cond-style-name="" text:id="id199"><text:span text:style-name="a1027" text:class-names=""><text:s text:c="6"/>Tomographie<text:s text:c="1"/></text:span><text:span text:style-name="a1028" text:class-names="">par émission de<text:s text:c="1"/></text:span><text:span text:style-name="a1029" text:class-names="">positons</text:span><text:span text:style-name="a1030" text:class-names=""/></text:p>
          <text:p text:style-name="a1033" text:class-names="" text:cond-style-name="" text:id="id200"><text:span text:style-name="a1032" text:class-names=""><text:s text:c="1"/></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name="Groupe 2" draw:id="id202">
          <svg:title/>
          <svg:desc/>
          <draw:frame draw:id="id213" draw:style-name="a1054" svg:x="1.51048in" svg:y="2.38505in" svg:width="2.65591in" svg:height="3.94252in" style:rel-width="scale" style:rel-height="scale">
            <draw:image xlink:href="media/image17.png" xlink:type="simple" xlink:show="embed" xlink:actuate="onLoad"/>
            <svg:title/>
            <svg:desc/>
          </draw:frame>
          <draw:custom-shape svg:x="2.71639in" svg:y="6.90394in" svg:width="0.20236in" svg:height="0.43504in" draw:id="id214" draw:style-name="a1057" draw:name="Forme libre : forme 4">
            <svg:title/>
            <svg:desc/>
            <text:p text:style-name="a1056" text:class-names="" text:cond-style-name=""><text:span text:style-name="a10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g draw:name="Groupe 5" draw:id="id203">
          <svg:title/>
          <svg:desc/>
          <draw:frame draw:id="id210" draw:style-name="a1047" svg:x="4.60573in" svg:y="2.66698in" svg:width="2.84843in" svg:height="3.55118in" style:rel-width="scale" style:rel-height="scale">
            <draw:image xlink:href="media/image18.png" xlink:type="simple" xlink:show="embed" xlink:actuate="onLoad"/>
            <svg:title/>
            <svg:desc/>
          </draw:frame>
          <draw:custom-shape svg:x="5.94864in" svg:y="6.74926in" svg:width="0.20157in" svg:height="0.43346in" draw:id="id211" draw:style-name="a1050" draw:name="Forme libre : forme 7">
            <svg:title/>
            <svg:desc/>
            <text:p text:style-name="a1049" text:class-names="" text:cond-style-name=""><text:span text:style-name="a104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5.00455in" svg:y="7.91619in" svg:width="1.99646in" svg:height="0.35118in" draw:id="id212" draw:style-name="a1053" draw:name="Forme libre : forme 8">
            <svg:title/>
            <svg:desc/>
            <text:p text:style-name="a1052" text:class-names="" text:cond-style-name=""><text:span text:style-name="a105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custom-shape svg:x="1.7577in" svg:y="1.34318in" svg:width="5.69606in" svg:height="0.98583in" draw:id="id206" draw:style-name="a1039" draw:name="Forme libre : forme 9">
          <svg:title/>
          <svg:desc/>
          <text:p text:style-name="a1036" text:class-names="" text:cond-style-name="" text:id="id204"><text:span text:style-name="a1035" text:class-names="">Emission mono-photonique (SPECT)</text:span></text:p>
          <text:p text:style-name="a1038" text:class-names="" text:cond-style-name="" text:id="id205"><text:span text:style-name="a1037" text:class-names="">Emission de positons (TEP ou PET)</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32717in" svg:y="6.5in" svg:width="8.04921in" svg:height="0.83898in" draw:id="id209" draw:style-name="a1046" draw:name="Forme libre : forme 10">
          <svg:title/>
          <svg:desc/>
          <text:p text:style-name="a1043" text:class-names="" text:cond-style-name="" text:id="id207"><text:span text:style-name="a1040" text:class-names="">Complémentarité avec le Scanner X<text:s text:c="1"/></text:span><text:span text:style-name="a1041" text:class-names="">: Examen<text:s text:c="1"/></text:span><text:span text:style-name="a1042" text:class-names="">fonctionnel.</text:span></text:p>
          <text:p text:style-name="a1045" text:class-names="" text:cond-style-name="" text:id="id208"><text:span text:style-name="a1044" text:class-names="">Métabolisme, nécroses, tumeur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201"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06"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02"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03"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09" smil:attributeName="visibility" smil:to="visible" smil:begin="0.0s" smil:dur="0.00100000004749745s" smil:fill="hold"/>
                </anim:par>
              </anim:par>
            </anim:par>
          </anim:seq>
        </anim:par>
        <presentation:notes draw:style-name="a1063">
          <draw:frame draw:id="id215" draw:style-name="a1060" draw:name="Espace réservé du numéro de diapositive 7" svg:x="4.16654in" svg:y="10.25in" svg:width="3.16693in" svg:height="0.5in">
            <draw:text-box>
              <text:p text:style-name="a1059" text:class-names="" text:cond-style-name=""><text:span text:style-name="a1058" text:class-names=""><text:page-number style:num-format="1" text:fixed="false"/></text:span></text:p>
            </draw:text-box>
            <svg:title/>
            <svg:desc/>
          </draw:frame>
          <draw:page-thumbnail draw:page-number="16" svg:x="1.04167in" svg:y="0.83333in" svg:width="5.33333in" svg:height="4in" presentation:class="page" draw:id="id216" presentation:style-name="a1061" draw:name="Espace réservé de l'image des diapositives 1">
            <svg:title/>
            <svg:desc/>
          </draw:page-thumbnail>
          <draw:frame draw:id="id217" presentation:style-name="a1062" draw:name="Espace réservé des notes 2" svg:x="1in" svg:y="5.16614in" svg:width="5.41654in" svg:height="4.83386in" presentation:class="notes" presentation:placeholder="true">
            <draw:text-box/>
            <svg:title/>
            <svg:desc/>
          </draw:frame>
        </presentation:notes>
      </draw:page>
      <draw:page draw:name="page19" draw:style-name="a1065" draw:master-page-name="Master1-Layout7-blank-Vide" presentation:presentation-page-layout-name="Master1-PPL7" draw:id="Slide-274">
        <draw:frame draw:id="id218" presentation:style-name="a1068" draw:name="Titre 1" svg:x="-0.08346in" svg:y="0.41654in" svg:width="10.08346in" svg:height="1.08346in" presentation:class="title" presentation:placeholder="false">
          <draw:text-box>
            <text:p text:style-name="a1067" text:class-names="" text:cond-style-name=""><text:span text:style-name="a1066" text:class-names="">Imagerie d’émission mono-photonique (SPECT)</text:span></text:p>
          </draw:text-box>
          <svg:title/>
          <svg:desc/>
        </draw:frame>
        <draw:custom-shape svg:x="2.6563in" svg:y="2.34882in" svg:width="10in" svg:height="0.00039in" draw:id="id219" draw:style-name="a1071" draw:name="Forme libre : forme 2">
          <svg:title/>
          <svg:desc/>
          <text:p text:style-name="a1070" text:class-names="" text:cond-style-name=""><text:span text:style-name="a106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6.39055in" svg:y="2.3248in" svg:width="0.2622in" svg:height="0in" draw:id="id220" draw:style-name="a1074" draw:name="Connecteur droit 23">
          <svg:title/>
          <svg:desc/>
          <text:p text:style-name="a1073" text:class-names="" text:cond-style-name=""><text:span text:style-name="a107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2.47205in" svg:width="0.2622in" svg:height="0in" draw:id="id221" draw:style-name="a1077" draw:name="Connecteur droit 24">
          <svg:title/>
          <svg:desc/>
          <text:p text:style-name="a1076" text:class-names="" text:cond-style-name=""><text:span text:style-name="a107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2.63898in" svg:width="0.2622in" svg:height="0in" draw:id="id222" draw:style-name="a1080" draw:name="Connecteur droit 25">
          <svg:title/>
          <svg:desc/>
          <text:p text:style-name="a1079" text:class-names="" text:cond-style-name=""><text:span text:style-name="a107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2.80551in" svg:width="0.2622in" svg:height="0in" draw:id="id223" draw:style-name="a1083" draw:name="Connecteur droit 26">
          <svg:title/>
          <svg:desc/>
          <text:p text:style-name="a1082" text:class-names="" text:cond-style-name=""><text:span text:style-name="a10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2.97205in" svg:width="0.2622in" svg:height="0in" draw:id="id224" draw:style-name="a1086" draw:name="Connecteur droit 27">
          <svg:title/>
          <svg:desc/>
          <text:p text:style-name="a1085" text:class-names="" text:cond-style-name=""><text:span text:style-name="a108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3.13898in" svg:width="0.2622in" svg:height="0in" draw:id="id225" draw:style-name="a1089" draw:name="Connecteur droit 28">
          <svg:title/>
          <svg:desc/>
          <text:p text:style-name="a1088" text:class-names="" text:cond-style-name=""><text:span text:style-name="a108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3.30551in" svg:width="0.2622in" svg:height="0in" draw:id="id226" draw:style-name="a1092" draw:name="Connecteur droit 29">
          <svg:title/>
          <svg:desc/>
          <text:p text:style-name="a1091" text:class-names="" text:cond-style-name=""><text:span text:style-name="a109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3.47205in" svg:width="0.2622in" svg:height="0in" draw:id="id227" draw:style-name="a1095" draw:name="Connecteur droit 30">
          <svg:title/>
          <svg:desc/>
          <text:p text:style-name="a1094" text:class-names="" text:cond-style-name=""><text:span text:style-name="a10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3.63898in" svg:width="0.2622in" svg:height="0in" draw:id="id228" draw:style-name="a1098" draw:name="Connecteur droit 31">
          <svg:title/>
          <svg:desc/>
          <text:p text:style-name="a1097" text:class-names="" text:cond-style-name=""><text:span text:style-name="a109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3.80551in" svg:width="0.2622in" svg:height="0in" draw:id="id229" draw:style-name="a1101" draw:name="Connecteur droit 32">
          <svg:title/>
          <svg:desc/>
          <text:p text:style-name="a1100" text:class-names="" text:cond-style-name=""><text:span text:style-name="a109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3.97205in" svg:width="0.2622in" svg:height="0in" draw:id="id230" draw:style-name="a1104" draw:name="Connecteur droit 33">
          <svg:title/>
          <svg:desc/>
          <text:p text:style-name="a1103" text:class-names="" text:cond-style-name=""><text:span text:style-name="a110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4.13898in" svg:width="0.2622in" svg:height="0in" draw:id="id231" draw:style-name="a1107" draw:name="Connecteur droit 34">
          <svg:title/>
          <svg:desc/>
          <text:p text:style-name="a1106" text:class-names="" text:cond-style-name=""><text:span text:style-name="a110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4.30551in" svg:width="0.2622in" svg:height="0in" draw:id="id232" draw:style-name="a1110" draw:name="Connecteur droit 35">
          <svg:title/>
          <svg:desc/>
          <text:p text:style-name="a1109" text:class-names="" text:cond-style-name=""><text:span text:style-name="a110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4.47205in" svg:width="0.2622in" svg:height="0in" draw:id="id233" draw:style-name="a1113" draw:name="Connecteur droit 36">
          <svg:title/>
          <svg:desc/>
          <text:p text:style-name="a1112" text:class-names="" text:cond-style-name=""><text:span text:style-name="a111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4.63898in" svg:width="0.2622in" svg:height="0in" draw:id="id234" draw:style-name="a1116" draw:name="Connecteur droit 37">
          <svg:title/>
          <svg:desc/>
          <text:p text:style-name="a1115" text:class-names="" text:cond-style-name=""><text:span text:style-name="a111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4.80551in" svg:width="0.2622in" svg:height="0in" draw:id="id235" draw:style-name="a1119" draw:name="Connecteur droit 38">
          <svg:title/>
          <svg:desc/>
          <text:p text:style-name="a1118" text:class-names="" text:cond-style-name=""><text:span text:style-name="a111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4.97205in" svg:width="0.2622in" svg:height="0in" draw:id="id236" draw:style-name="a1122" draw:name="Connecteur droit 39">
          <svg:title/>
          <svg:desc/>
          <text:p text:style-name="a1121" text:class-names="" text:cond-style-name=""><text:span text:style-name="a112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39921in" svg:y="5.13898in" svg:width="0.2622in" svg:height="0in" draw:id="id237" draw:style-name="a1125" draw:name="Connecteur droit 40">
          <svg:title/>
          <svg:desc/>
          <text:p text:style-name="a1124" text:class-names="" text:cond-style-name=""><text:span text:style-name="a112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64764in" svg:y="2.30394in" svg:width="0.00866in" svg:height="2.86102in" draw:id="id238" draw:style-name="a1128" draw:name="Connecteur droit 41">
          <svg:title/>
          <svg:desc/>
          <text:p text:style-name="a1127" text:class-names="" text:cond-style-name=""><text:span text:style-name="a11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39" draw:style-name="a1129" draw:name="19" svg:x="7in" svg:y="2.37323in" svg:width="2.6563in" svg:height="2.90276in" style:rel-width="scale" style:rel-height="scale">
          <draw:image xlink:href="media/image19.png" xlink:type="simple" xlink:show="embed" xlink:actuate="onLoad"/>
          <svg:title/>
          <svg:desc/>
        </draw:frame>
        <draw:custom-shape svg:x="7.03661in" svg:y="3.65118in" svg:width="2.61457in" svg:height="0.14724in" draw:id="id240" draw:style-name="a1132" draw:name="Forme libre : forme 49">
          <svg:title/>
          <svg:desc/>
          <text:p text:style-name="a1131" text:class-names="" text:cond-style-name=""><text:span text:style-name="a113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7.56417in" svg:y="3.63898in" svg:width="0.18071in" svg:height="0.1563in" draw:id="id241" draw:style-name="a1135" draw:name="Forme libre : forme 50">
          <svg:title/>
          <svg:desc/>
          <text:p text:style-name="a1134" text:class-names="" text:cond-style-name=""><text:span text:style-name="a113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42" draw:style-name="a1136" draw:name="camera" svg:x="1.64902in" svg:y="3.41673in" svg:width="3.66654in" svg:height="2.44449in" style:rel-width="scale" style:rel-height="scale">
          <draw:image xlink:href="media/image20.png" xlink:type="simple" xlink:show="embed" xlink:actuate="onLoad"/>
          <svg:title/>
          <svg:desc/>
        </draw:frame>
        <draw:frame draw:id="id243" draw:style-name="a1137" draw:name="Image 59" svg:x="6.39055in" svg:y="5.61474in" svg:width="3.27362in" svg:height="1.02676in" style:rel-width="scale" style:rel-height="scale">
          <draw:image xlink:href="media/image21.png" xlink:type="simple" xlink:show="embed" xlink:actuate="onLoad"/>
          <svg:title/>
          <svg:desc/>
        </draw:frame>
        <draw:frame draw:id="id244" draw:style-name="a1138" draw:name="Image 60" svg:x="1.54714in" svg:y="2.33077in" svg:width="3.8703in" svg:height="0.70316in" style:rel-width="scale" style:rel-height="scale">
          <draw:image xlink:href="media/image22.png" xlink:type="simple" xlink:show="embed" xlink:actuate="onLoad"/>
          <svg:title/>
          <svg:desc/>
        </draw:frame>
        <presentation:notes draw:style-name="a1144">
          <draw:frame draw:id="id245" draw:style-name="a1141" draw:name="Espace réservé du numéro de diapositive 7" svg:x="4.16654in" svg:y="10.25in" svg:width="3.16693in" svg:height="0.5in">
            <draw:text-box>
              <text:p text:style-name="a1140" text:class-names="" text:cond-style-name=""><text:span text:style-name="a1139" text:class-names=""><text:page-number style:num-format="1" text:fixed="false"/></text:span></text:p>
            </draw:text-box>
            <svg:title/>
            <svg:desc/>
          </draw:frame>
          <draw:page-thumbnail draw:page-number="17" svg:x="1.04167in" svg:y="0.83333in" svg:width="5.33333in" svg:height="4in" presentation:class="page" draw:id="id246" presentation:style-name="a1142" draw:name="Espace réservé de l'image des diapositives 1">
            <svg:title/>
            <svg:desc/>
          </draw:page-thumbnail>
          <draw:frame draw:id="id247" presentation:style-name="a1143" draw:name="Espace réservé des notes 2" svg:x="1in" svg:y="5.16614in" svg:width="5.41654in" svg:height="4.83386in" presentation:class="notes" presentation:placeholder="true">
            <draw:text-box/>
            <svg:title/>
            <svg:desc/>
          </draw:frame>
        </presentation:notes>
      </draw:page>
      <draw:page draw:name="page20" draw:style-name="a1146" draw:master-page-name="Master1-Layout7-blank-Vide" presentation:presentation-page-layout-name="Master1-PPL7" draw:id="Slide-275">
        <draw:frame draw:id="id249" presentation:style-name="a1151" draw:name="Titre 1" svg:x="0in" svg:y="0.41614in" svg:width="10in" svg:height="1.25in" presentation:class="title" presentation:placeholder="false">
          <draw:text-box>
            <text:p text:style-name="a1150" text:class-names="" text:cond-style-name="" text:id="id248"><text:span text:style-name="a1147" text:class-names="">Imagerie en coïncidence (</text:span><text:span text:style-name="a1148" text:class-names="">TEP-PET)</text:span><text:span text:style-name="a1149" text:class-names=""/></text:p>
          </draw:text-box>
          <svg:title/>
          <svg:desc/>
        </draw:frame>
        <draw:frame draw:id="id250" draw:style-name="a1152" draw:name="tep" svg:x="4.16654in" svg:y="1.83346in" svg:width="5.37323in" svg:height="4.42362in" style:rel-width="scale" style:rel-height="scale">
          <draw:image xlink:href="media/image23.jpg" xlink:type="simple" xlink:show="embed" xlink:actuate="onLoad"/>
          <svg:title/>
          <svg:desc/>
        </draw:frame>
        <draw:custom-shape svg:x="6.25in" svg:y="4.41653in" svg:width="1.01535in" svg:height="1.16299in" draw:id="id252" draw:style-name="a1156" draw:name="Forme libre : forme 3">
          <svg:title/>
          <svg:desc/>
          <text:p text:style-name="a1154" text:class-names="" text:cond-style-name="" text:id="id251"><text:span text:style-name="a1153" text:class-names=""/></text:p>
          <draw:enhanced-geometry xmlns:dr3d="urn:oasis:names:tc:opendocument:xmlns:dr3d:1.0" draw:type="non-primitive" svg:viewBox="0 0 2580 2955" draw:enhanced-path="F M ?f0 ?f0 L ?f1 ?f2 N" draw:text-areas="?f7 ?f9 ?f8 ?f10">
            <draw:equation draw:name="f0" draw:formula="0"/>
            <draw:equation draw:name="f1" draw:formula="2580"/>
            <draw:equation draw:name="f2" draw:formula="2955"/>
            <draw:equation draw:name="f3" draw:formula="?f2 - ?f0"/>
            <draw:equation draw:name="f4" draw:formula="?f1 - ?f0"/>
            <draw:equation draw:name="f5" draw:formula="?f4 / 2580"/>
            <draw:equation draw:name="f6" draw:formula="?f3 / 2955"/>
            <draw:equation draw:name="f7" draw:formula="?f0 / ?f5"/>
            <draw:equation draw:name="f8" draw:formula="?f1 / ?f5"/>
            <draw:equation draw:name="f9" draw:formula="?f0 / ?f6"/>
            <draw:equation draw:name="f10" draw:formula="?f2 / ?f6"/>
          </draw:enhanced-geometry>
        </draw:custom-shape>
        <draw:custom-shape svg:x="5.25in" svg:y="3.33307in" svg:width="0.49094in" svg:height="0.56535in" draw:id="id254" draw:style-name="a1160" draw:name="Forme libre : forme 4">
          <svg:title/>
          <svg:desc/>
          <text:p text:style-name="a1158" text:class-names="" text:cond-style-name="" text:id="id253"><text:span text:style-name="a1157" text:class-names=""/></text:p>
          <draw:enhanced-geometry xmlns:dr3d="urn:oasis:names:tc:opendocument:xmlns:dr3d:1.0" draw:type="non-primitive" svg:viewBox="0 0 1248 1437" draw:enhanced-path="F M ?f1 ?f2 L ?f0 ?f0 N" draw:text-areas="?f7 ?f9 ?f8 ?f10">
            <draw:equation draw:name="f0" draw:formula="0"/>
            <draw:equation draw:name="f1" draw:formula="1248"/>
            <draw:equation draw:name="f2" draw:formula="1437"/>
            <draw:equation draw:name="f3" draw:formula="?f2 - ?f0"/>
            <draw:equation draw:name="f4" draw:formula="?f1 - ?f0"/>
            <draw:equation draw:name="f5" draw:formula="?f4 / 1248"/>
            <draw:equation draw:name="f6" draw:formula="?f3 / 1437"/>
            <draw:equation draw:name="f7" draw:formula="?f0 / ?f5"/>
            <draw:equation draw:name="f8" draw:formula="?f1 / ?f5"/>
            <draw:equation draw:name="f9" draw:formula="?f0 / ?f6"/>
            <draw:equation draw:name="f10" draw:formula="?f2 / ?f6"/>
          </draw:enhanced-geometry>
        </draw:custom-shape>
        <draw:custom-shape svg:x="1.9752in" svg:y="5.45827in" svg:width="0.6126in" svg:height="0.40236in" draw:id="id256" draw:style-name="a1164" draw:name="Forme libre : forme 7">
          <svg:title/>
          <svg:desc/>
          <text:p text:style-name="a1162" text:class-names="" text:cond-style-name="" text:id="id255"><text:span text:style-name="a1161" text:class-names=""/></text:p>
          <draw:enhanced-geometry xmlns:dr3d="urn:oasis:names:tc:opendocument:xmlns:dr3d:1.0" draw:type="non-primitive" svg:viewBox="0 0 1557 1023" draw:enhanced-path="F M ?f1 ?f0 L ?f0 ?f2 N" draw:text-areas="?f7 ?f9 ?f8 ?f10">
            <draw:equation draw:name="f0" draw:formula="0"/>
            <draw:equation draw:name="f1" draw:formula="1557"/>
            <draw:equation draw:name="f2" draw:formula="1023"/>
            <draw:equation draw:name="f3" draw:formula="?f2 - ?f0"/>
            <draw:equation draw:name="f4" draw:formula="?f1 - ?f0"/>
            <draw:equation draw:name="f5" draw:formula="?f4 / 1557"/>
            <draw:equation draw:name="f6" draw:formula="?f3 / 1023"/>
            <draw:equation draw:name="f7" draw:formula="?f0 / ?f5"/>
            <draw:equation draw:name="f8" draw:formula="?f1 / ?f5"/>
            <draw:equation draw:name="f9" draw:formula="?f0 / ?f6"/>
            <draw:equation draw:name="f10" draw:formula="?f2 / ?f6"/>
          </draw:enhanced-geometry>
        </draw:custom-shape>
        <draw:custom-shape svg:x="3.47756in" svg:y="4.59567in" svg:width="0.57953in" svg:height="0.38465in" draw:id="id258" draw:style-name="a1168" draw:name="Forme libre : forme 8">
          <svg:title/>
          <svg:desc/>
          <text:p text:style-name="a1166" text:class-names="" text:cond-style-name="" text:id="id257"><text:span text:style-name="a1165" text:class-names=""/></text:p>
          <draw:enhanced-geometry xmlns:dr3d="urn:oasis:names:tc:opendocument:xmlns:dr3d:1.0" draw:type="non-primitive" svg:viewBox="0 0 1473 978" draw:enhanced-path="F M ?f0 ?f2 L ?f1 ?f0 N" draw:text-areas="?f7 ?f9 ?f8 ?f10">
            <draw:equation draw:name="f0" draw:formula="0"/>
            <draw:equation draw:name="f1" draw:formula="1473"/>
            <draw:equation draw:name="f2" draw:formula="978"/>
            <draw:equation draw:name="f3" draw:formula="?f2 - ?f0"/>
            <draw:equation draw:name="f4" draw:formula="?f1 - ?f0"/>
            <draw:equation draw:name="f5" draw:formula="?f4 / 1473"/>
            <draw:equation draw:name="f6" draw:formula="?f3 / 978"/>
            <draw:equation draw:name="f7" draw:formula="?f0 / ?f5"/>
            <draw:equation draw:name="f8" draw:formula="?f1 / ?f5"/>
            <draw:equation draw:name="f9" draw:formula="?f0 / ?f6"/>
            <draw:equation draw:name="f10" draw:formula="?f2 / ?f6"/>
          </draw:enhanced-geometry>
        </draw:custom-shape>
        <draw:custom-shape svg:x="0.69075in" svg:y="3.98245in" svg:width="1.54645in" svg:height="0.43995in" draw:id="id260" draw:style-name="a1171" draw:name="Forme libre : forme 10">
          <svg:title/>
          <svg:desc/>
          <text:p text:style-name="a1170" text:class-names="" text:cond-style-name="" text:id="id259"><text:span text:style-name="a1169" text:class-names="">2 - 3 mm</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61" draw:style-name="a1172" draw:name="Image 11" svg:x="-0.12796in" svg:y="3.02992in" svg:width="4.00021in" svg:height="0.55785in" style:rel-width="scale" style:rel-height="scale">
          <draw:image xlink:href="media/image24.png" xlink:type="simple" xlink:show="embed" xlink:actuate="onLoad"/>
          <svg:title/>
          <svg:desc/>
        </draw:frame>
        <draw:frame draw:id="id262" draw:style-name="a1173" draw:name="Image 12" svg:x="0.39122in" svg:y="4.84728in" svg:width="3.16795in" svg:height="0.56927in" style:rel-width="scale" style:rel-height="scale">
          <draw:image xlink:href="media/image25.png" xlink:type="simple" xlink:show="embed" xlink:actuate="onLoad"/>
          <svg:title/>
          <svg:desc/>
        </draw:frame>
        <draw:frame draw:id="id263" draw:style-name="a1174" draw:name="Image 14" svg:x="0.98027in" svg:y="3.57884in" svg:width="2.60246in" svg:height="1.30241in" style:rel-width="scale" style:rel-height="scale">
          <draw:image xlink:href="media/image2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249"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60"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56"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58"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50"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52"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54" smil:attributeName="visibility" smil:to="visible" smil:begin="0.0s" smil:dur="0.00100000004749745s" smil:fill="hold"/>
                </anim:par>
              </anim:par>
            </anim:par>
          </anim:seq>
        </anim:par>
        <presentation:notes draw:style-name="a1180">
          <draw:frame draw:id="id264" draw:style-name="a1177" draw:name="Espace réservé du numéro de diapositive 7" svg:x="4.16654in" svg:y="10.25in" svg:width="3.16693in" svg:height="0.5in">
            <draw:text-box>
              <text:p text:style-name="a1176" text:class-names="" text:cond-style-name=""><text:span text:style-name="a1175" text:class-names=""><text:page-number style:num-format="1" text:fixed="false"/></text:span></text:p>
            </draw:text-box>
            <svg:title/>
            <svg:desc/>
          </draw:frame>
          <draw:page-thumbnail draw:page-number="18" svg:x="1.04167in" svg:y="0.83333in" svg:width="5.33333in" svg:height="4in" presentation:class="page" draw:id="id265" presentation:style-name="a1178" draw:name="Espace réservé de l'image des diapositives 1">
            <svg:title/>
            <svg:desc/>
          </draw:page-thumbnail>
          <draw:frame draw:id="id266" presentation:style-name="a1179" draw:name="Espace réservé des notes 2" svg:x="1in" svg:y="5.16614in" svg:width="5.41654in" svg:height="4.83386in" presentation:class="notes" presentation:placeholder="true">
            <draw:text-box/>
            <svg:title/>
            <svg:desc/>
          </draw:frame>
        </presentation:notes>
      </draw:page>
      <draw:page draw:name="page21" draw:style-name="a1182" draw:master-page-name="Master1-Layout7-blank-Vide" presentation:presentation-page-layout-name="Master1-PPL7" draw:id="Slide-276">
        <draw:frame draw:id="id267" draw:style-name="a1183" draw:name="how_pet_work" svg:x="0in" svg:y="0.33346in" svg:width="10.06772in" svg:height="6.05039in" style:rel-width="scale" style:rel-height="scale">
          <draw:image xlink:href="media/image27.png" xlink:type="simple" xlink:show="embed" xlink:actuate="onLoad"/>
          <svg:title/>
          <svg:desc/>
        </draw:frame>
        <draw:custom-shape svg:x="1.8437in" svg:y="6.75in" svg:width="6.14449in" svg:height="0.43622in" draw:id="id268" draw:style-name="a1186" draw:name="Forme libre : forme 2">
          <svg:title/>
          <svg:desc/>
          <text:p text:style-name="a1185" text:class-names="" text:cond-style-name=""><text:span text:style-name="a1184" text:class-names="">PRINCIPE GENERAL DE FONCTIONNEMENT</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1192">
          <draw:frame draw:id="id269" draw:style-name="a1189" draw:name="Espace réservé du numéro de diapositive 7" svg:x="4.16654in" svg:y="10.25in" svg:width="3.16693in" svg:height="0.5in">
            <draw:text-box>
              <text:p text:style-name="a1188" text:class-names="" text:cond-style-name=""><text:span text:style-name="a1187" text:class-names=""><text:page-number style:num-format="1" text:fixed="false"/></text:span></text:p>
            </draw:text-box>
            <svg:title/>
            <svg:desc/>
          </draw:frame>
          <draw:page-thumbnail draw:page-number="19" svg:x="1.04167in" svg:y="0.83333in" svg:width="5.33333in" svg:height="4in" presentation:class="page" draw:id="id270" presentation:style-name="a1190" draw:name="Espace réservé de l'image des diapositives 1">
            <svg:title/>
            <svg:desc/>
          </draw:page-thumbnail>
          <draw:frame draw:id="id271" presentation:style-name="a1191" draw:name="Espace réservé des notes 2" svg:x="1in" svg:y="5.16614in" svg:width="5.41654in" svg:height="4.83386in" presentation:class="notes" presentation:placeholder="true">
            <draw:text-box/>
            <svg:title/>
            <svg:desc/>
          </draw:frame>
        </presentation:notes>
      </draw:page>
      <draw:page draw:name="page23" draw:style-name="a1194" draw:master-page-name="Master1-Layout7-blank-Vide" presentation:presentation-page-layout-name="Master1-PPL7" draw:id="Slide-278">
        <draw:frame draw:id="id272" presentation:style-name="a1197" draw:name="Titre 1" svg:x="0in" svg:y="-0.00039in" svg:width="10in" svg:height="1.25in" presentation:class="title" presentation:placeholder="false">
          <draw:text-box>
            <text:p text:style-name="a1196" text:class-names="" text:cond-style-name=""><text:span text:style-name="a1195" text:class-names="">Tomographie en coïncidence 3D</text:span></text:p>
          </draw:text-box>
          <svg:title/>
          <svg:desc/>
        </draw:frame>
        <draw:custom-shape svg:x="2.6563in" svg:y="2.34882in" svg:width="10in" svg:height="0.00039in" draw:id="id273" draw:style-name="a1200" draw:name="Forme libre : forme 2">
          <svg:title/>
          <svg:desc/>
          <text:p text:style-name="a1199" text:class-names="" text:cond-style-name=""><text:span text:style-name="a11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7.56417in" svg:y="3.63898in" svg:width="0.18071in" svg:height="0.1563in" draw:id="id274" draw:style-name="a1203" draw:name="Forme libre : forme 5">
          <svg:title/>
          <svg:desc/>
          <text:p text:style-name="a1202" text:class-names="" text:cond-style-name=""><text:span text:style-name="a12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4.72756in" svg:y="2.31929in" svg:width="1.29173in" svg:height="3.34724in" draw:id="id275" draw:style-name="a1207" draw:name="Forme libre : forme 7">
          <svg:title/>
          <svg:desc/>
          <text:p text:style-name="a1205" text:class-names="" text:cond-style-name=""><text:span text:style-name="a1204" text:class-names=""/></text:p>
          <draw:enhanced-geometry xmlns:dr3d="urn:oasis:names:tc:opendocument:xmlns:dr3d:1.0" draw:type="non-primitive" svg:viewBox="0 0 504 1928" draw:enhanced-path="M ?f3 ?f2 C ?f4 ?f5 ?f0 ?f6 ?f7 ?f8 ?f9 ?f10 ?f11 ?f12 ?f11 ?f13 ?f11 ?f14 ?f7 ?f15 ?f7 ?f16 ?f7 ?f17 ?f18 ?f19 ?f11 ?f20 ?f21 ?f22 ?f3 ?f23 ?f3 ?f24 ?f3 ?f18 ?f25 ?f26 ?f11 ?f3 ?f27 ?f28 ?f29 ?f0 ?f30 ?f7 ?f31 ?f9 ?f32 ?f25 ?f33 ?f11 ?f34 ?f27 ?f35 ?f36 ?f35 ?f37 ?f35 ?f38 ?f39 ?f36 ?f33 ?f37 ?f40 ?f38 ?f41 ?f31 ?f33 ?f20 ?f42 ?f40 ?f43 ?f42 ?f44 ?f35 ?f31 ?f45 ?f34 ?f46 ?f35 ?f16 ?f1 ?f47 ?f41 ?f48 ?f33 ?f49 ?f42 ?f50 ?f51 ?f52 ?f20 ?f8 ?f53 ?f54 ?f20 ?f5 ?f20 ?f55 ?f20 ?f56 ?f20 ?f57 ?f20 ?f2 N" draw:text-areas="?f62 ?f64 ?f63 ?f65">
            <draw:equation draw:name="f0" draw:formula="0"/>
            <draw:equation draw:name="f1" draw:formula="504"/>
            <draw:equation draw:name="f2" draw:formula="1928"/>
            <draw:equation draw:name="f3" draw:formula="56"/>
            <draw:equation draw:name="f4" draw:formula="28"/>
            <draw:equation draw:name="f5" draw:formula="1752"/>
            <draw:equation draw:name="f6" draw:formula="1576"/>
            <draw:equation draw:name="f7" draw:formula="8"/>
            <draw:equation draw:name="f8" draw:formula="1448"/>
            <draw:equation draw:name="f9" draw:formula="16"/>
            <draw:equation draw:name="f10" draw:formula="1320"/>
            <draw:equation draw:name="f11" draw:formula="104"/>
            <draw:equation draw:name="f12" draw:formula="1272"/>
            <draw:equation draw:name="f13" draw:formula="1160"/>
            <draw:equation draw:name="f14" draw:formula="1048"/>
            <draw:equation draw:name="f15" draw:formula="904"/>
            <draw:equation draw:name="f16" draw:formula="776"/>
            <draw:equation draw:name="f17" draw:formula="648"/>
            <draw:equation draw:name="f18" draw:formula="96"/>
            <draw:equation draw:name="f19" draw:formula="496"/>
            <draw:equation draw:name="f20" draw:formula="392"/>
            <draw:equation draw:name="f21" draw:formula="112"/>
            <draw:equation draw:name="f22" draw:formula="288"/>
            <draw:equation draw:name="f23" draw:formula="208"/>
            <draw:equation draw:name="f24" draw:formula="152"/>
            <draw:equation draw:name="f25" draw:formula="64"/>
            <draw:equation draw:name="f26" draw:formula="80"/>
            <draw:equation draw:name="f27" draw:formula="144"/>
            <draw:equation draw:name="f28" draw:formula="32"/>
            <draw:equation draw:name="f29" draw:formula="240"/>
            <draw:equation draw:name="f30" draw:formula="296"/>
            <draw:equation draw:name="f31" draw:formula="352"/>
            <draw:equation draw:name="f32" draw:formula="408"/>
            <draw:equation draw:name="f33" draw:formula="440"/>
            <draw:equation draw:name="f34" draw:formula="472"/>
            <draw:equation draw:name="f35" draw:formula="488"/>
            <draw:equation draw:name="f36" draw:formula="224"/>
            <draw:equation draw:name="f37" draw:formula="248"/>
            <draw:equation draw:name="f38" draw:formula="272"/>
            <draw:equation draw:name="f39" draw:formula="448"/>
            <draw:equation draw:name="f40" draw:formula="432"/>
            <draw:equation draw:name="f41" draw:formula="456"/>
            <draw:equation draw:name="f42" draw:formula="424"/>
            <draw:equation draw:name="f43" draw:formula="336"/>
            <draw:equation draw:name="f44" draw:formula="344"/>
            <draw:equation draw:name="f45" draw:formula="552"/>
            <draw:equation draw:name="f46" draw:formula="640"/>
            <draw:equation draw:name="f47" draw:formula="912"/>
            <draw:equation draw:name="f48" draw:formula="1192"/>
            <draw:equation draw:name="f49" draw:formula="1304"/>
            <draw:equation draw:name="f50" draw:formula="1416"/>
            <draw:equation draw:name="f51" draw:formula="400"/>
            <draw:equation draw:name="f52" draw:formula="1360"/>
            <draw:equation draw:name="f53" draw:formula="384"/>
            <draw:equation draw:name="f54" draw:formula="1536"/>
            <draw:equation draw:name="f55" draw:formula="1832"/>
            <draw:equation draw:name="f56" draw:formula="1912"/>
            <draw:equation draw:name="f57" draw:formula="1920"/>
            <draw:equation draw:name="f58" draw:formula="?f2 - ?f0"/>
            <draw:equation draw:name="f59" draw:formula="?f1 - ?f0"/>
            <draw:equation draw:name="f60" draw:formula="?f59 / 504"/>
            <draw:equation draw:name="f61" draw:formula="?f58 / 1928"/>
            <draw:equation draw:name="f62" draw:formula="?f0 / ?f60"/>
            <draw:equation draw:name="f63" draw:formula="?f1 / ?f60"/>
            <draw:equation draw:name="f64" draw:formula="?f0 / ?f61"/>
            <draw:equation draw:name="f65" draw:formula="?f2 / ?f61"/>
          </draw:enhanced-geometry>
        </draw:custom-shape>
        <draw:custom-shape svg:x="4.08346in" svg:y="1.91653in" svg:width="2.58307in" svg:height="4.08346in" draw:id="id276" draw:style-name="a1210" draw:name="Forme libre : forme 8">
          <svg:title/>
          <svg:desc/>
          <text:p text:style-name="a1209" text:class-names="" text:cond-style-name=""><text:span text:style-name="a1208" text:class-names=""/></text:p>
          <draw:enhanced-geometry xmlns:dr3d="urn:oasis:names:tc:opendocument:xmlns:dr3d:1.0" draw:type="non-primitive" svg:viewBox="0 0 88 21600" draw:enhanced-path="M ?f11 ?f8 C ?f13 ?f8 ?f8 ?f38 ?f8 ?f28 L ?f8 ?f30 C ?f8 ?f39 ?f13 ?f10 ?f11 ?f10 ?f14 ?f10 ?f9 ?f39 ?f9 ?f30 L ?f9 ?f28 C ?f9 ?f38 ?f14 ?f8 ?f11 ?f8 Z N M ?f11 ?f8 C ?f13 ?f8 ?f8 ?f38 ?f8 ?f28 ?f8 ?f40 ?f13 ?f15 ?f11 ?f15 ?f14 ?f15 ?f9 ?f40 ?f9 ?f28 ?f9 ?f38 ?f14 ?f8 ?f11 ?f8 Z N" draw:text-areas="?f33 ?f15 ?f36 ?f30" draw:glue-points="?f31 ?f15 ?f31 ?f32 ?f33 ?f34 ?f31 ?f35 ?f36 ?f34" draw:glue-point-leaving-directions="-0, -0, -0, -0, -0" draw:modifiers="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21600"/>
            <draw:equation draw:name="f8" draw:formula="0"/>
            <draw:equation draw:name="f9" draw:formula="88"/>
            <draw:equation draw:name="f10" draw:formula="21600"/>
            <draw:equation draw:name="f11" draw:formula="44"/>
            <draw:equation draw:name="f12" draw:formula="10800"/>
            <draw:equation draw:name="f13" draw:formula="20"/>
            <draw:equation draw:name="f14" draw:formula="68"/>
            <draw:equation draw:name="f15" draw:formula="$0"/>
            <draw:equation draw:name="f16" draw:formula="?f10 - ?f8"/>
            <draw:equation draw:name="f17" draw:formula="?f9 - ?f8"/>
            <draw:equation draw:name="f18" draw:formula="44 * ?f6"/>
            <draw:equation draw:name="f19" draw:formula="?f17 / 88"/>
            <draw:equation draw:name="f20" draw:formula="?f16 / 21600"/>
            <draw:equation draw:name="f21" draw:formula="?f15 * 2"/>
            <draw:equation draw:name="f22" draw:formula="0 * ?f19"/>
            <draw:equation draw:name="f23" draw:formula="88 * ?f19"/>
            <draw:equation draw:name="f24" draw:formula="44 * ?f19"/>
            <draw:equation draw:name="f25" draw:formula="0 * ?f20"/>
            <draw:equation draw:name="f26" draw:formula="10800 * ?f20"/>
            <draw:equation draw:name="f27" draw:formula="21600 * ?f20"/>
            <draw:equation draw:name="f28" draw:formula="?f21 / 4"/>
            <draw:equation draw:name="f29" draw:formula="?f28 * 6"/>
            <draw:equation draw:name="f30" draw:formula="21600 - ?f28"/>
            <draw:equation draw:name="f31" draw:formula="?f24 / ?f19"/>
            <draw:equation draw:name="f32" draw:formula="?f25 / ?f20"/>
            <draw:equation draw:name="f33" draw:formula="?f22 / ?f19"/>
            <draw:equation draw:name="f34" draw:formula="?f26 / ?f20"/>
            <draw:equation draw:name="f35" draw:formula="?f27 / ?f20"/>
            <draw:equation draw:name="f36" draw:formula="?f23 / ?f19"/>
            <draw:equation draw:name="f37" draw:formula="?f29 / 11"/>
            <draw:equation draw:name="f38" draw:formula="?f28 - ?f37"/>
            <draw:equation draw:name="f39" draw:formula="?f30 + ?f37"/>
            <draw:equation draw:name="f40" draw:formula="?f28 + ?f37"/>
            <draw:equation draw:name="f41" draw:formula="$0 / ?f7"/>
            <draw:equation draw:name="f42" draw:formula="?f18 / ?f6"/>
            <draw:handle draw:handle-position="?f42 $0" draw:handle-range-y-minimum="0" draw:handle-range-y-maximum="10800"/>
          </draw:enhanced-geometry>
        </draw:custom-shape>
        <draw:custom-shape svg:x="4.08346in" svg:y="2.91614in" svg:width="2.58307in" svg:height="2.25in" draw:id="id277" draw:style-name="a1216" draw:name="Connecteur droit 9">
          <svg:title/>
          <svg:desc/>
          <text:p text:style-name="a1212" text:class-names="" text:cond-style-name=""><text:span text:style-name="a121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08346in" svg:y="3.91653in" svg:width="2.5in" svg:height="0in" draw:id="id278" draw:style-name="a1222" draw:name="Connecteur droit 10">
          <svg:title/>
          <svg:desc/>
          <text:p text:style-name="a1218" text:class-names="" text:cond-style-name=""><text:span text:style-name="a121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08346in" svg:y="3.33346in" svg:width="2.58307in" svg:height="1.08307in" draw:id="id279" draw:style-name="a1226" draw:name="Forme libre : forme 11">
          <svg:title/>
          <svg:desc/>
          <text:p text:style-name="a1224" text:class-names="" text:cond-style-name=""><text:span text:style-name="a1223"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5in" svg:y="3.33346in" svg:width="1.25in" svg:height="0.91654in" draw:id="id280" draw:style-name="a1232" draw:name="Connecteur droit 12">
          <svg:title/>
          <svg:desc/>
          <text:p text:style-name="a1228" text:class-names="" text:cond-style-name=""><text:span text:style-name="a122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83346in" svg:y="3.41653in" svg:width="0.16654in" svg:height="0.16693in" draw:id="id281" draw:style-name="a1235" draw:name="Forme libre : forme 13">
          <svg:title/>
          <svg:desc/>
          <text:p text:style-name="a1234" text:class-names="" text:cond-style-name=""><text:span text:style-name="a1233" text:class-names=""/></text:p>
          <draw:enhanced-geometry xmlns:dr3d="urn:oasis:names:tc:opendocument:xmlns:dr3d:1.0" draw:type="non-primitive" svg:viewBox="0 0 21600 21600" draw:extrusion-brightness="20%" draw:extrusion-depth="0.17017in 0" draw:extrusion-second-light-level="37%" draw:extrusion-first-light-direction="(0.05468 0 0.01094)" draw:extrusion-second-light-direction="(-0.05468 0 0.01094)" draw:extrusion-shininess="0%" draw:extrusion-viewpoint="(-1.36702in 1.36702in 9.84252in)" draw:extrusion-origin="-0.5 0.5" draw:enhanced-path="M ?f0 ?f0 L ?f1 ?f0 ?f1 ?f1 ?f0 ?f1 ?f0 ?f0 Z N" draw:text-areas="?f4 ?f4 ?f5 ?f5" dr3d:shade-mode="draft" draw:extrusion-second-light-harsh="false" draw:extrusion="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5in" svg:y="4.16654in" svg:width="0.16654in" svg:height="0.16693in" draw:id="id282" draw:style-name="a1238" draw:name="Forme libre : forme 14">
          <svg:title/>
          <svg:desc/>
          <text:p text:style-name="a1237" text:class-names="" text:cond-style-name=""><text:span text:style-name="a1236" text:class-names=""/></text:p>
          <draw:enhanced-geometry xmlns:dr3d="urn:oasis:names:tc:opendocument:xmlns:dr3d:1.0" draw:type="non-primitive" svg:viewBox="0 0 21600 21600" draw:extrusion-brightness="20%" draw:extrusion-depth="0.17017in 0" draw:extrusion-second-light-level="37%" draw:extrusion-first-light-direction="(0.05468 0 0.01094)" draw:extrusion-second-light-direction="(-0.05468 0 0.01094)" draw:extrusion-shininess="0%" draw:extrusion-viewpoint="(-1.36702in 1.36702in 9.84252in)" draw:extrusion-origin="-0.5 0.5" draw:enhanced-path="M ?f0 ?f0 L ?f1 ?f0 ?f1 ?f1 ?f0 ?f1 ?f0 ?f0 Z N" draw:text-areas="?f4 ?f4 ?f5 ?f5" dr3d:shade-mode="draft" draw:extrusion-second-light-harsh="false" draw:extrusion="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5.16654in" svg:y="4in" svg:width="0.16693in" svg:height="0.16654in" draw:id="id283" draw:style-name="a1241" draw:name="Forme libre : forme 15">
          <svg:title/>
          <svg:desc/>
          <text:p text:style-name="a1240" text:class-names="" text:cond-style-name=""><text:span text:style-name="a1239" text:class-names=""/></text:p>
          <draw:enhanced-geometry xmlns:dr3d="urn:oasis:names:tc:opendocument:xmlns:dr3d:1.0" draw:type="non-primitive" svg:viewBox="0 0 21600 21600" draw:extrusion-brightness="20%" draw:extrusion-depth="0.17017in 0" draw:extrusion-second-light-level="37%" draw:extrusion-first-light-direction="(0.05468 0 0.01094)" draw:extrusion-second-light-direction="(-0.05468 0 0.01094)" draw:extrusion-shininess="0%" draw:extrusion-viewpoint="(-1.36702in 1.36702in 9.84252in)" draw:extrusion-origin="-0.5 0.5" draw:enhanced-path="M ?f0 ?f0 L ?f1 ?f0 ?f1 ?f1 ?f0 ?f1 ?f0 ?f0 Z N" draw:text-areas="?f4 ?f4 ?f5 ?f5" dr3d:shade-mode="draft" draw:extrusion-second-light-harsh="false" draw:extrusion="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5.33346in" svg:y="3.91653in" svg:width="0.16654in" svg:height="0.16693in" draw:id="id284" draw:style-name="a1244" draw:name="Forme libre : forme 16">
          <svg:title/>
          <svg:desc/>
          <text:p text:style-name="a1243" text:class-names="" text:cond-style-name=""><text:span text:style-name="a1242" text:class-names=""/></text:p>
          <draw:enhanced-geometry xmlns:dr3d="urn:oasis:names:tc:opendocument:xmlns:dr3d:1.0" draw:type="non-primitive" svg:viewBox="0 0 21600 21600" draw:extrusion-brightness="20%" draw:extrusion-depth="0.17017in 0" draw:extrusion-second-light-level="37%" draw:extrusion-first-light-direction="(0.05468 0 0.01094)" draw:extrusion-second-light-direction="(-0.05468 0 0.01094)" draw:extrusion-shininess="0%" draw:extrusion-viewpoint="(-1.36702in 1.36702in 9.84252in)" draw:extrusion-origin="-0.5 0.5" draw:enhanced-path="M ?f0 ?f0 L ?f1 ?f0 ?f1 ?f1 ?f0 ?f1 ?f0 ?f0 Z N" draw:text-areas="?f4 ?f4 ?f5 ?f5" dr3d:shade-mode="draft" draw:extrusion-second-light-harsh="false" draw:extrusion="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5.5in" svg:y="3.75in" svg:width="0.16654in" svg:height="0.16654in" draw:id="id285" draw:style-name="a1247" draw:name="Forme libre : forme 17">
          <svg:title/>
          <svg:desc/>
          <text:p text:style-name="a1246" text:class-names="" text:cond-style-name=""><text:span text:style-name="a1245" text:class-names=""/></text:p>
          <draw:enhanced-geometry xmlns:dr3d="urn:oasis:names:tc:opendocument:xmlns:dr3d:1.0" draw:type="non-primitive" svg:viewBox="0 0 21600 21600" draw:extrusion-brightness="20%" draw:extrusion-depth="0.17017in 0" draw:extrusion-second-light-level="37%" draw:extrusion-first-light-direction="(0.05468 0 0.01094)" draw:extrusion-second-light-direction="(-0.05468 0 0.01094)" draw:extrusion-shininess="0%" draw:extrusion-viewpoint="(-1.36702in 1.36702in 9.84252in)" draw:extrusion-origin="-0.5 0.5" draw:enhanced-path="M ?f0 ?f0 L ?f1 ?f0 ?f1 ?f1 ?f0 ?f1 ?f0 ?f0 Z N" draw:text-areas="?f4 ?f4 ?f5 ?f5" dr3d:shade-mode="draft" draw:extrusion-second-light-harsh="false" draw:extrusion="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5.66654in" svg:y="3.58346in" svg:width="0.16693in" svg:height="0.16654in" draw:id="id286" draw:style-name="a1250" draw:name="Forme libre : forme 18">
          <svg:title/>
          <svg:desc/>
          <text:p text:style-name="a1249" text:class-names="" text:cond-style-name=""><text:span text:style-name="a1248" text:class-names=""/></text:p>
          <draw:enhanced-geometry xmlns:dr3d="urn:oasis:names:tc:opendocument:xmlns:dr3d:1.0" draw:type="non-primitive" svg:viewBox="0 0 21600 21600" draw:extrusion-brightness="20%" draw:extrusion-depth="0.17017in 0" draw:extrusion-second-light-level="37%" draw:extrusion-first-light-direction="(0.05468 0 0.01094)" draw:extrusion-second-light-direction="(-0.05468 0 0.01094)" draw:extrusion-shininess="0%" draw:extrusion-viewpoint="(-1.36702in 1.36702in 9.84252in)" draw:extrusion-origin="-0.5 0.5" draw:enhanced-path="M ?f0 ?f0 L ?f1 ?f0 ?f1 ?f1 ?f0 ?f1 ?f0 ?f0 Z N" draw:text-areas="?f4 ?f4 ?f5 ?f5" dr3d:shade-mode="draft" draw:extrusion-second-light-harsh="false" draw:extrusion="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87" draw:style-name="a1251" svg:x="7.33346in" svg:y="2.08346in" svg:width="1.81063in" svg:height="3.82087in" style:rel-width="scale" style:rel-height="scale">
          <draw:image xlink:href="media/image28.png" xlink:type="simple" xlink:show="embed" xlink:actuate="onLoad"/>
          <svg:title/>
          <svg:desc/>
        </draw:frame>
        <draw:frame draw:id="id288" draw:style-name="a1252" draw:name="form1-red" svg:x="0.41857in" svg:y="4.7709in" svg:width="3.27283in" svg:height="1.02244in" style:rel-width="scale" style:rel-height="scale">
          <draw:image xlink:href="media/image14.png" xlink:type="simple" xlink:show="embed" xlink:actuate="onLoad"/>
          <svg:title/>
          <svg:desc/>
        </draw:frame>
        <draw:frame draw:id="id289" draw:style-name="a1253" draw:name="Image 30" svg:x="0.26928in" svg:y="3.2767in" svg:width="3.16694in" svg:height="0.56672in" style:rel-width="scale" style:rel-height="scale">
          <draw:image xlink:href="media/image29.png" xlink:type="simple" xlink:show="embed" xlink:actuate="onLoad"/>
          <svg:title/>
          <svg:desc/>
        </draw:frame>
        <draw:frame draw:id="id290" draw:style-name="a1254" draw:name="Image 31" svg:x="1.57161in" svg:y="3.84619in" svg:width="0.96675in" svg:height="0.7534in" style:rel-width="scale" style:rel-height="scale">
          <draw:image xlink:href="media/image30.png" xlink:type="simple" xlink:show="embed" xlink:actuate="onLoad"/>
          <svg:title/>
          <svg:desc/>
        </draw:frame>
        <draw:frame draw:id="id291" draw:style-name="a1255" draw:name="Image 32" svg:x="3.1469in" svg:y="2.67443in" svg:width="0.93341in" svg:height="0.74006in" style:rel-width="scale" style:rel-height="scale">
          <draw:image xlink:href="media/image31.png" xlink:type="simple" xlink:show="embed" xlink:actuate="onLoad"/>
          <svg:title/>
          <svg:desc/>
        </draw:frame>
        <presentation:notes draw:style-name="a1261">
          <draw:frame draw:id="id292" draw:style-name="a1258" draw:name="Espace réservé du numéro de diapositive 7" svg:x="4.16654in" svg:y="10.25in" svg:width="3.16693in" svg:height="0.5in">
            <draw:text-box>
              <text:p text:style-name="a1257" text:class-names="" text:cond-style-name=""><text:span text:style-name="a1256" text:class-names=""><text:page-number style:num-format="1" text:fixed="false"/></text:span></text:p>
            </draw:text-box>
            <svg:title/>
            <svg:desc/>
          </draw:frame>
          <draw:page-thumbnail draw:page-number="20" svg:x="1.04167in" svg:y="0.83333in" svg:width="5.33333in" svg:height="4in" presentation:class="page" draw:id="id293" presentation:style-name="a1259" draw:name="Espace réservé de l'image des diapositives 1">
            <svg:title/>
            <svg:desc/>
          </draw:page-thumbnail>
          <draw:frame draw:id="id294" presentation:style-name="a1260" draw:name="Espace réservé des notes 2" svg:x="1in" svg:y="5.16614in" svg:width="5.41654in" svg:height="4.83386in" presentation:class="notes" presentation:placeholder="true">
            <draw:text-box/>
            <svg:title/>
            <svg:desc/>
          </draw:frame>
        </presentation:notes>
      </draw:page>
      <draw:page draw:name="page24" draw:style-name="a1263" draw:master-page-name="Master1-Layout7-blank-Vide" presentation:presentation-page-layout-name="Master1-PPL7" draw:id="Slide-279">
        <draw:frame draw:id="id295" presentation:style-name="a1266" draw:name="Titre 1" svg:x="0in" svg:y="0.33307in" svg:width="8.5in" svg:height="1.25in" presentation:class="title" presentation:placeholder="false">
          <draw:text-box>
            <text:p text:style-name="a1265" text:class-names="" text:cond-style-name=""><text:span text:style-name="a1264" text:class-names="">Détection</text:span></text:p>
          </draw:text-box>
          <svg:title/>
          <svg:desc/>
        </draw:frame>
        <draw:frame draw:id="id296" draw:style-name="a1267" svg:x="5.33346in" svg:y="2.16654in" svg:width="4in" svg:height="3in" style:rel-width="scale" style:rel-height="scale">
          <draw:image xlink:href="media/image32.png" xlink:type="simple" xlink:show="embed" xlink:actuate="onLoad"/>
          <svg:title/>
          <svg:desc/>
        </draw:frame>
        <draw:frame draw:id="id297" draw:style-name="a1268" svg:x="1.92874in" svg:y="4.85236in" svg:width="2.05551in" svg:height="2.11102in" style:rel-width="scale" style:rel-height="scale">
          <draw:image xlink:href="media/image33.jpg" xlink:type="simple" xlink:show="embed" xlink:actuate="onLoad"/>
          <svg:title/>
          <svg:desc/>
        </draw:frame>
        <draw:custom-shape svg:x="7.41654in" svg:y="2.58346in" svg:width="1.33858in" svg:height="1.33858in" draw:id="id298" draw:style-name="a1271" draw:name="Forme libre : forme 4">
          <svg:title/>
          <svg:desc/>
          <text:p text:style-name="a1270" text:class-names="" text:cond-style-name=""><text:span text:style-name="a1269"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8.07087in" svg:y="3.83346in" svg:width="0.0122in" svg:height="2.19961in" draw:id="id299" draw:style-name="a1274" draw:name="Connecteur droit 5">
          <svg:title/>
          <svg:desc/>
          <text:p text:style-name="a1273" text:class-names="" text:cond-style-name=""><text:span text:style-name="a127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05551in" svg:y="6.03307in" svg:width="4.01575in" svg:height="0in" draw:id="id300" draw:style-name="a1278" draw:name="Connecteur droit 6">
          <svg:title/>
          <svg:desc/>
          <text:p text:style-name="a1276" text:class-names="" text:cond-style-name=""><text:span text:style-name="a127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22047in" svg:y="4.30197in" svg:width="1.41654in" svg:height="1.18071in" draw:id="id301" draw:style-name="a1282" draw:name="Connecteur droit 7">
          <svg:title/>
          <svg:desc/>
          <text:p text:style-name="a1280" text:class-names="" text:cond-style-name=""><text:span text:style-name="a127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95315in" svg:y="3.27795in" svg:width="0.70827in" svg:height="1.81063in" draw:id="id302" draw:style-name="a1286" draw:name="Connecteur droit 8">
          <svg:title/>
          <svg:desc/>
          <text:p text:style-name="a1284" text:class-names="" text:cond-style-name=""><text:span text:style-name="a128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27441in" svg:y="3.90787in" svg:width="1.33858in" svg:height="0.43622in" draw:id="id303" draw:style-name="a1289" draw:name="Forme libre : forme 9">
          <svg:title/>
          <svg:desc/>
          <text:p text:style-name="a1288" text:class-names="" text:cond-style-name=""><text:span text:style-name="a1287" text:class-names="">crista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69252in" svg:y="2.88386in" svg:width="2.67717in" svg:height="0.43622in" draw:id="id304" draw:style-name="a1292" draw:name="Forme libre : forme 10">
          <svg:title/>
          <svg:desc/>
          <text:p text:style-name="a1291" text:class-names="" text:cond-style-name=""><text:span text:style-name="a1290" text:class-names="">photomultiplicateur</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53465in" svg:y="6.89921in" svg:width="2.83504in" svg:height="0.50275in" draw:id="id305" draw:style-name="a1295" draw:name="Forme libre : forme 11">
          <svg:title/>
          <svg:desc/>
          <text:p text:style-name="a1294" text:class-names="" text:cond-style-name=""><text:span text:style-name="a1293" text:class-names="">Un bloc détecteur</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1301">
          <draw:frame draw:id="id306" draw:style-name="a1298" draw:name="Espace réservé du numéro de diapositive 7" svg:x="4.16654in" svg:y="10.25in" svg:width="3.16693in" svg:height="0.5in">
            <draw:text-box>
              <text:p text:style-name="a1297" text:class-names="" text:cond-style-name=""><text:span text:style-name="a1296" text:class-names=""><text:page-number style:num-format="1" text:fixed="false"/></text:span></text:p>
            </draw:text-box>
            <svg:title/>
            <svg:desc/>
          </draw:frame>
          <draw:page-thumbnail draw:page-number="21" svg:x="1.04167in" svg:y="0.83333in" svg:width="5.33333in" svg:height="4in" presentation:class="page" draw:id="id307" presentation:style-name="a1299" draw:name="Espace réservé de l'image des diapositives 1">
            <svg:title/>
            <svg:desc/>
          </draw:page-thumbnail>
          <draw:frame draw:id="id308" presentation:style-name="a1300" draw:name="Espace réservé des notes 2" svg:x="1in" svg:y="5.16614in" svg:width="5.41654in" svg:height="4.83386in" presentation:class="notes" presentation:placeholder="true">
            <draw:text-box/>
            <svg:title/>
            <svg:desc/>
          </draw:frame>
        </presentation:notes>
      </draw:page>
      <draw:page draw:name="page25" draw:style-name="a1303" draw:master-page-name="Master1-Layout7-blank-Vide" presentation:presentation-page-layout-name="Master1-PPL7" draw:id="Slide-280">
        <draw:custom-shape svg:x="1.08346in" svg:y="0.33346in" svg:width="8.58307in" svg:height="1.25in" draw:id="id309" draw:style-name="a1306" draw:name="Forme libre : forme 1">
          <svg:title/>
          <svg:desc/>
          <text:p text:style-name="a1305" text:class-names="" text:cond-style-name=""><text:span text:style-name="a1304" text:class-names="">Interactions Photons-Matière</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3.16653in" svg:y="2.25in" svg:width="4.5in" svg:height="4.33346in" draw:id="id310" draw:style-name="a1310" draw:name="Forme libre : forme 2">
          <svg:title/>
          <svg:desc/>
          <text:p text:style-name="a1308" text:class-names="" text:cond-style-name=""><text:span text:style-name="a1307"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3.75in" svg:y="2.75in" svg:width="3.33346in" svg:height="3.33346in" draw:id="id311" draw:style-name="a1313" draw:name="Forme libre : forme 3">
          <svg:title/>
          <svg:desc/>
          <text:p text:style-name="a1312" text:class-names="" text:cond-style-name=""><text:span text:style-name="a1311"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5.41654in" svg:y="2.24961in" svg:width="0in" svg:height="4.33347in" draw:id="id312" draw:style-name="a1316" draw:name="Connecteur droit 4">
          <svg:title/>
          <svg:desc/>
          <text:p text:style-name="a1315" text:class-names="" text:cond-style-name=""><text:span text:style-name="a131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16653in" svg:y="4.41653in" svg:width="4.5in" svg:height="0in" draw:id="id313" draw:style-name="a1319" draw:name="Connecteur droit 5">
          <svg:title/>
          <svg:desc/>
          <text:p text:style-name="a1318" text:class-names="" text:cond-style-name=""><text:span text:style-name="a131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83307in" svg:y="2.91654in" svg:width="3.08307in" svg:height="3.08346in" draw:id="id314" draw:style-name="a1322" draw:name="Connecteur droit 6">
          <svg:title/>
          <svg:desc/>
          <text:p text:style-name="a1321" text:class-names="" text:cond-style-name=""><text:span text:style-name="a132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83346in" svg:y="2.83307in" svg:width="3.16654in" svg:height="3.16654in" draw:id="id315" draw:style-name="a1325" draw:name="Connecteur droit 7">
          <svg:title/>
          <svg:desc/>
          <text:p text:style-name="a1324" text:class-names="" text:cond-style-name=""><text:span text:style-name="a132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49961in" svg:y="2.41654in" svg:width="1.75in" svg:height="4in" draw:id="id316" draw:style-name="a1328" draw:name="Connecteur droit 8">
          <svg:title/>
          <svg:desc/>
          <text:p text:style-name="a1327" text:class-names="" text:cond-style-name=""><text:span text:style-name="a13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5in" svg:y="2.41654in" svg:width="1.75in" svg:height="4in" draw:id="id317" draw:style-name="a1331" draw:name="Connecteur droit 9">
          <svg:title/>
          <svg:desc/>
          <text:p text:style-name="a1330" text:class-names="" text:cond-style-name=""><text:span text:style-name="a132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33307in" svg:y="3.58307in" svg:width="4.08307in" svg:height="1.75in" draw:id="id318" draw:style-name="a1334" draw:name="Connecteur droit 10">
          <svg:title/>
          <svg:desc/>
          <text:p text:style-name="a1333" text:class-names="" text:cond-style-name=""><text:span text:style-name="a133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33346in" svg:y="3.58307in" svg:width="4.16654in" svg:height="1.66654in" draw:id="id319" draw:style-name="a1337" draw:name="Connecteur droit 11">
          <svg:title/>
          <svg:desc/>
          <text:p text:style-name="a1336" text:class-names="" text:cond-style-name=""><text:span text:style-name="a133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name="Groupe 12" draw:id="id320">
          <svg:title/>
          <svg:desc/>
          <draw:custom-shape svg:x="4in" svg:y="3.08346in" svg:width="2.36811in" svg:height="0.66614in" draw:id="id357" draw:style-name="a1411" draw:name="Connecteur droit 13">
            <svg:title/>
            <svg:desc/>
            <text:p text:style-name="a1408" text:class-names="" text:cond-style-name=""><text:span text:style-name="a140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22913in" svg:y="3.38189in" svg:width="0.84016in" svg:height="0.56929in" draw:id="id358" draw:style-name="a1414" draw:name="Forme libre : forme 14">
            <svg:title/>
            <svg:desc/>
            <text:p text:style-name="a1413" text:class-names="" text:cond-style-name=""><text:span text:style-name="a1412" text:class-name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5.90984in" svg:y="3.11772in" svg:width="0.84016in" svg:height="0.56929in" draw:id="id359" draw:style-name="a1417" draw:name="Forme libre : forme 15">
            <svg:title/>
            <svg:desc/>
            <text:p text:style-name="a1416" text:class-names="" text:cond-style-name=""><text:span text:style-name="a1415" text:class-name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custom-shape svg:x="3.16653in" svg:y="2.25in" svg:width="4.5in" svg:height="4.33346in" draw:id="id321" draw:style-name="a1340" draw:name="Forme libre : forme 16">
          <svg:title/>
          <svg:desc/>
          <text:p text:style-name="a1339" text:class-names="" text:cond-style-name=""><text:span text:style-name="a1338"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2.16654in" svg:y="2.41654in" svg:width="6.5in" svg:height="4.58346in" draw:id="id322" draw:style-name="a1343" draw:name="Forme libre : forme 17">
          <svg:title/>
          <svg:desc/>
          <text:p text:style-name="a1342" text:class-names="" text:cond-style-name=""><text:span text:style-name="a1341" text:class-names=""/></text:p>
          <draw:enhanced-geometry xmlns:dr3d="urn:oasis:names:tc:opendocument:xmlns:dr3d:1.0" draw:type="non-primitive" svg:viewBox="0 0 3744 2640" draw:enhanced-path="M ?f3 ?f4 L ?f0 ?f4 ?f0 ?f2 ?f5 ?f2 ?f1 ?f2 ?f1 ?f0 ?f6 ?f0 ?f6 ?f7 N" draw:text-areas="?f12 ?f14 ?f13 ?f15">
            <draw:equation draw:name="f0" draw:formula="0"/>
            <draw:equation draw:name="f1" draw:formula="3744"/>
            <draw:equation draw:name="f2" draw:formula="2640"/>
            <draw:equation draw:name="f3" draw:formula="528"/>
            <draw:equation draw:name="f4" draw:formula="1392"/>
            <draw:equation draw:name="f5" draw:formula="384"/>
            <draw:equation draw:name="f6" draw:formula="2592"/>
            <draw:equation draw:name="f7" draw:formula="96"/>
            <draw:equation draw:name="f8" draw:formula="?f2 - ?f0"/>
            <draw:equation draw:name="f9" draw:formula="?f1 - ?f0"/>
            <draw:equation draw:name="f10" draw:formula="?f9 / 3744"/>
            <draw:equation draw:name="f11" draw:formula="?f8 / 2640"/>
            <draw:equation draw:name="f12" draw:formula="?f0 / ?f10"/>
            <draw:equation draw:name="f13" draw:formula="?f1 / ?f10"/>
            <draw:equation draw:name="f14" draw:formula="?f0 / ?f11"/>
            <draw:equation draw:name="f15" draw:formula="?f2 / ?f11"/>
          </draw:enhanced-geometry>
        </draw:custom-shape>
        <draw:custom-shape svg:x="2.58346in" svg:y="6.75in" svg:width="5.58307in" svg:height="0.50275in" draw:id="id323" draw:style-name="a1346" draw:name="Forme libre : forme 18">
          <svg:title/>
          <svg:desc/>
          <text:p text:style-name="a1345" text:class-names="" text:cond-style-name=""><text:span text:style-name="a1344" text:class-names=""><text:s text:c="1"/>Fenêtre de détection des coïncidence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5.16654in" svg:y="3.33346in" svg:width="0.16693in" svg:height="0.16654in" draw:id="id324" draw:style-name="a1349" draw:name="Forme libre : forme 19">
          <svg:title/>
          <svg:desc/>
          <text:p text:style-name="a1348" text:class-names="" text:cond-style-name=""><text:span text:style-name="a1347"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6.58346in" svg:y="4.66654in" svg:width="0.41614in" svg:height="0.16654in" draw:id="id326" draw:style-name="a1353" draw:name="Forme libre : forme 20">
          <svg:title/>
          <svg:desc/>
          <text:p text:style-name="a1351" text:class-names="" text:cond-style-name="" text:id="id325"><text:span text:style-name="a1350" text:class-names=""/></text:p>
          <draw:enhanced-geometry xmlns:dr3d="urn:oasis:names:tc:opendocument:xmlns:dr3d:1.0" draw:type="non-primitive" svg:viewBox="0 0 1058 424" draw:enhanced-path="F M ?f0 ?f0 L ?f1 ?f2 N" draw:text-areas="?f7 ?f9 ?f8 ?f10">
            <draw:equation draw:name="f0" draw:formula="0"/>
            <draw:equation draw:name="f1" draw:formula="1058"/>
            <draw:equation draw:name="f2" draw:formula="424"/>
            <draw:equation draw:name="f3" draw:formula="?f2 - ?f0"/>
            <draw:equation draw:name="f4" draw:formula="?f1 - ?f0"/>
            <draw:equation draw:name="f5" draw:formula="?f4 / 1058"/>
            <draw:equation draw:name="f6" draw:formula="?f3 / 424"/>
            <draw:equation draw:name="f7" draw:formula="?f0 / ?f5"/>
            <draw:equation draw:name="f8" draw:formula="?f1 / ?f5"/>
            <draw:equation draw:name="f9" draw:formula="?f0 / ?f6"/>
            <draw:equation draw:name="f10" draw:formula="?f2 / ?f6"/>
          </draw:enhanced-geometry>
        </draw:custom-shape>
        <draw:custom-shape svg:x="4.91654in" svg:y="4.66654in" svg:width="1.66654in" svg:height="1.33307in" draw:id="id328" draw:style-name="a1357" draw:name="Forme libre : forme 21">
          <svg:title/>
          <svg:desc/>
          <text:p text:style-name="a1355" text:class-names="" text:cond-style-name="" text:id="id327"><text:span text:style-name="a1354" text:class-names=""/></text:p>
          <draw:enhanced-geometry xmlns:dr3d="urn:oasis:names:tc:opendocument:xmlns:dr3d:1.0" draw:type="non-primitive" svg:viewBox="0 0 4234 3387" draw:enhanced-path="F M ?f1 ?f0 L ?f0 ?f2 N" draw:text-areas="?f7 ?f9 ?f8 ?f10">
            <draw:equation draw:name="f0" draw:formula="0"/>
            <draw:equation draw:name="f1" draw:formula="4234"/>
            <draw:equation draw:name="f2" draw:formula="3387"/>
            <draw:equation draw:name="f3" draw:formula="?f2 - ?f0"/>
            <draw:equation draw:name="f4" draw:formula="?f1 - ?f0"/>
            <draw:equation draw:name="f5" draw:formula="?f4 / 4234"/>
            <draw:equation draw:name="f6" draw:formula="?f3 / 3387"/>
            <draw:equation draw:name="f7" draw:formula="?f0 / ?f5"/>
            <draw:equation draw:name="f8" draw:formula="?f1 / ?f5"/>
            <draw:equation draw:name="f9" draw:formula="?f0 / ?f6"/>
            <draw:equation draw:name="f10" draw:formula="?f2 / ?f6"/>
          </draw:enhanced-geometry>
        </draw:custom-shape>
        <draw:custom-shape svg:x="6.08346in" svg:y="4.24961in" svg:width="0.99961in" svg:height="0.83307in" draw:id="id330" draw:style-name="a1361" draw:name="Forme libre : forme 22">
          <svg:title/>
          <svg:desc/>
          <text:p text:style-name="a1359" text:class-names="" text:cond-style-name="" text:id="id329"><text:span text:style-name="a1358" text:class-names=""/></text:p>
          <draw:enhanced-geometry xmlns:dr3d="urn:oasis:names:tc:opendocument:xmlns:dr3d:1.0" draw:type="non-primitive" svg:viewBox="0 0 2540 2117" draw:enhanced-path="F M ?f0 ?f2 L ?f1 ?f0 N" draw:text-areas="?f7 ?f9 ?f8 ?f10">
            <draw:equation draw:name="f0" draw:formula="0"/>
            <draw:equation draw:name="f1" draw:formula="2540"/>
            <draw:equation draw:name="f2" draw:formula="2117"/>
            <draw:equation draw:name="f3" draw:formula="?f2 - ?f0"/>
            <draw:equation draw:name="f4" draw:formula="?f1 - ?f0"/>
            <draw:equation draw:name="f5" draw:formula="?f4 / 2540"/>
            <draw:equation draw:name="f6" draw:formula="?f3 / 2117"/>
            <draw:equation draw:name="f7" draw:formula="?f0 / ?f5"/>
            <draw:equation draw:name="f8" draw:formula="?f1 / ?f5"/>
            <draw:equation draw:name="f9" draw:formula="?f0 / ?f6"/>
            <draw:equation draw:name="f10" draw:formula="?f2 / ?f6"/>
          </draw:enhanced-geometry>
        </draw:custom-shape>
        <draw:custom-shape svg:x="6in" svg:y="5in" svg:width="0.16654in" svg:height="0.16654in" draw:id="id332" draw:style-name="a1364" draw:name="Forme libre : forme 23">
          <svg:title/>
          <svg:desc/>
          <text:p text:style-name="a1363" text:class-names="" text:cond-style-name="" text:id="id331"><text:span text:style-name="a1362"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5in" svg:y="4.83346in" svg:width="1.99961in" svg:height="1.16614in" draw:id="id334" draw:style-name="a1367" draw:name="Forme libre : forme 24">
          <svg:title/>
          <svg:desc/>
          <text:p text:style-name="a1366" text:class-names="" text:cond-style-name="" text:id="id333"><text:span text:style-name="a1365" text:class-names=""/></text:p>
          <draw:enhanced-geometry xmlns:dr3d="urn:oasis:names:tc:opendocument:xmlns:dr3d:1.0" draw:type="non-primitive" svg:viewBox="0 0 5080 2963" draw:enhanced-path="F M ?f1 ?f0 L ?f0 ?f2 N" draw:text-areas="?f7 ?f9 ?f8 ?f10">
            <draw:equation draw:name="f0" draw:formula="0"/>
            <draw:equation draw:name="f1" draw:formula="5080"/>
            <draw:equation draw:name="f2" draw:formula="2963"/>
            <draw:equation draw:name="f3" draw:formula="?f2 - ?f0"/>
            <draw:equation draw:name="f4" draw:formula="?f1 - ?f0"/>
            <draw:equation draw:name="f5" draw:formula="?f4 / 5080"/>
            <draw:equation draw:name="f6" draw:formula="?f3 / 2963"/>
            <draw:equation draw:name="f7" draw:formula="?f0 / ?f5"/>
            <draw:equation draw:name="f8" draw:formula="?f1 / ?f5"/>
            <draw:equation draw:name="f9" draw:formula="?f0 / ?f6"/>
            <draw:equation draw:name="f10" draw:formula="?f2 / ?f6"/>
          </draw:enhanced-geometry>
        </draw:custom-shape>
        <draw:custom-shape svg:x="4.08346in" svg:y="4.41653in" svg:width="0.16654in" svg:height="0.16693in" draw:id="id336" draw:style-name="a1370" draw:name="Forme libre : forme 25">
          <svg:title/>
          <svg:desc/>
          <text:p text:style-name="a1369" text:class-names="" text:cond-style-name="" text:id="id335"><text:span text:style-name="a1368"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3.75in" svg:y="4.25in" svg:width="0.99961in" svg:height="0.41614in" draw:id="id338" draw:style-name="a1374" draw:name="Forme libre : forme 26">
          <svg:title/>
          <svg:desc/>
          <text:p text:style-name="a1372" text:class-names="" text:cond-style-name="" text:id="id337"><text:span text:style-name="a1371" text:class-names=""/></text:p>
          <draw:enhanced-geometry xmlns:dr3d="urn:oasis:names:tc:opendocument:xmlns:dr3d:1.0" draw:type="non-primitive" svg:viewBox="0 0 2540 1058" draw:enhanced-path="F M ?f1 ?f0 L ?f0 ?f2 N" draw:text-areas="?f7 ?f9 ?f8 ?f10">
            <draw:equation draw:name="f0" draw:formula="0"/>
            <draw:equation draw:name="f1" draw:formula="2540"/>
            <draw:equation draw:name="f2" draw:formula="1058"/>
            <draw:equation draw:name="f3" draw:formula="?f2 - ?f0"/>
            <draw:equation draw:name="f4" draw:formula="?f1 - ?f0"/>
            <draw:equation draw:name="f5" draw:formula="?f4 / 2540"/>
            <draw:equation draw:name="f6" draw:formula="?f3 / 1058"/>
            <draw:equation draw:name="f7" draw:formula="?f0 / ?f5"/>
            <draw:equation draw:name="f8" draw:formula="?f1 / ?f5"/>
            <draw:equation draw:name="f9" draw:formula="?f0 / ?f6"/>
            <draw:equation draw:name="f10" draw:formula="?f2 / ?f6"/>
          </draw:enhanced-geometry>
        </draw:custom-shape>
        <draw:custom-shape svg:x="4.75in" svg:y="3.91614in" svg:width="0.74961in" svg:height="0.33307in" draw:id="id340" draw:style-name="a1378" draw:name="Forme libre : forme 27">
          <svg:title/>
          <svg:desc/>
          <text:p text:style-name="a1376" text:class-names="" text:cond-style-name="" text:id="id339"><text:span text:style-name="a1375" text:class-names=""/></text:p>
          <draw:enhanced-geometry xmlns:dr3d="urn:oasis:names:tc:opendocument:xmlns:dr3d:1.0" draw:type="non-primitive" svg:viewBox="0 0 1905 847" draw:enhanced-path="F M ?f0 ?f2 L ?f1 ?f0 N" draw:text-areas="?f7 ?f9 ?f8 ?f10">
            <draw:equation draw:name="f0" draw:formula="0"/>
            <draw:equation draw:name="f1" draw:formula="1905"/>
            <draw:equation draw:name="f2" draw:formula="847"/>
            <draw:equation draw:name="f3" draw:formula="?f2 - ?f0"/>
            <draw:equation draw:name="f4" draw:formula="?f1 - ?f0"/>
            <draw:equation draw:name="f5" draw:formula="?f4 / 1905"/>
            <draw:equation draw:name="f6" draw:formula="?f3 / 847"/>
            <draw:equation draw:name="f7" draw:formula="?f0 / ?f5"/>
            <draw:equation draw:name="f8" draw:formula="?f1 / ?f5"/>
            <draw:equation draw:name="f9" draw:formula="?f0 / ?f6"/>
            <draw:equation draw:name="f10" draw:formula="?f2 / ?f6"/>
          </draw:enhanced-geometry>
        </draw:custom-shape>
        <draw:custom-shape svg:x="5.5in" svg:y="3.58346in" svg:width="0.33346in" svg:height="0.33307in" draw:id="id342" draw:style-name="a1381" draw:name="Forme libre : forme 28">
          <svg:title/>
          <svg:desc/>
          <text:p text:style-name="a1380" text:class-names="" text:cond-style-name="" text:id="id341"><text:span text:style-name="a1379" text:class-names=""/></text:p>
          <draw:enhanced-geometry xmlns:dr3d="urn:oasis:names:tc:opendocument:xmlns:dr3d:1.0" draw:type="non-primitive" svg:viewBox="0 0 21600 21600" draw:enhanced-path="M ?f2 ?f3 L ?f4 ?f5 ?f6 ?f7 ?f8 ?f5 ?f9 ?f10 ?f11 ?f12 ?f13 ?f14 ?f15 ?f16 ?f17 ?f18 ?f19 ?f20 ?f21 ?f22 ?f23 ?f1 ?f24 ?f25 ?f26 ?f27 ?f28 ?f29 ?f30 ?f31 ?f32 ?f33 ?f1 ?f34 ?f35 ?f36 ?f37 ?f38 ?f39 ?f6 ?f40 ?f41 ?f42 ?f43 ?f44 ?f11 ?f2 ?f3 Z N" draw:text-areas="?f63 ?f65 ?f64 ?f66" draw:glue-points="?f57 ?f58 ?f58 ?f59 ?f60 ?f61 ?f61 ?f62" draw:glue-point-leaving-directions="-0, -0, -0, -0">
            <draw:equation draw:name="f0" draw:formula="0"/>
            <draw:equation draw:name="f1" draw:formula="21600"/>
            <draw:equation draw:name="f2" draw:formula="10901"/>
            <draw:equation draw:name="f3" draw:formula="5905"/>
            <draw:equation draw:name="f4" draw:formula="8458"/>
            <draw:equation draw:name="f5" draw:formula="2399"/>
            <draw:equation draw:name="f6" draw:formula="7417"/>
            <draw:equation draw:name="f7" draw:formula="6425"/>
            <draw:equation draw:name="f8" draw:formula="476"/>
            <draw:equation draw:name="f9" draw:formula="4732"/>
            <draw:equation draw:name="f10" draw:formula="7722"/>
            <draw:equation draw:name="f11" draw:formula="106"/>
            <draw:equation draw:name="f12" draw:formula="8718"/>
            <draw:equation draw:name="f13" draw:formula="3828"/>
            <draw:equation draw:name="f14" draw:formula="11880"/>
            <draw:equation draw:name="f15" draw:formula="243"/>
            <draw:equation draw:name="f16" draw:formula="14689"/>
            <draw:equation draw:name="f17" draw:formula="5772"/>
            <draw:equation draw:name="f18" draw:formula="14041"/>
            <draw:equation draw:name="f19" draw:formula="4868"/>
            <draw:equation draw:name="f20" draw:formula="17719"/>
            <draw:equation draw:name="f21" draw:formula="7819"/>
            <draw:equation draw:name="f22" draw:formula="15730"/>
            <draw:equation draw:name="f23" draw:formula="8590"/>
            <draw:equation draw:name="f24" draw:formula="10637"/>
            <draw:equation draw:name="f25" draw:formula="15038"/>
            <draw:equation draw:name="f26" draw:formula="13349"/>
            <draw:equation draw:name="f27" draw:formula="19840"/>
            <draw:equation draw:name="f28" draw:formula="14125"/>
            <draw:equation draw:name="f29" draw:formula="14561"/>
            <draw:equation draw:name="f30" draw:formula="18248"/>
            <draw:equation draw:name="f31" draw:formula="18195"/>
            <draw:equation draw:name="f32" draw:formula="16938"/>
            <draw:equation draw:name="f33" draw:formula="13044"/>
            <draw:equation draw:name="f34" draw:formula="13393"/>
            <draw:equation draw:name="f35" draw:formula="17710"/>
            <draw:equation draw:name="f36" draw:formula="10579"/>
            <draw:equation draw:name="f37" draw:formula="21198"/>
            <draw:equation draw:name="f38" draw:formula="8242"/>
            <draw:equation draw:name="f39" draw:formula="16806"/>
            <draw:equation draw:name="f40" draw:formula="18482"/>
            <draw:equation draw:name="f41" draw:formula="4560"/>
            <draw:equation draw:name="f42" draw:formula="14257"/>
            <draw:equation draw:name="f43" draw:formula="5429"/>
            <draw:equation draw:name="f44" draw:formula="14623"/>
            <draw:equation draw:name="f45" draw:formula="?f1 - ?f0"/>
            <draw:equation draw:name="f46" draw:formula="?f45 / 21600"/>
            <draw:equation draw:name="f47" draw:formula="4680 * ?f46"/>
            <draw:equation draw:name="f48" draw:formula="16140 * ?f46"/>
            <draw:equation draw:name="f49" draw:formula="13280 * ?f46"/>
            <draw:equation draw:name="f50" draw:formula="6570 * ?f46"/>
            <draw:equation draw:name="f51" draw:formula="14623 * ?f46"/>
            <draw:equation draw:name="f52" draw:formula="106 * ?f46"/>
            <draw:equation draw:name="f53" draw:formula="8718 * ?f46"/>
            <draw:equation draw:name="f54" draw:formula="8590 * ?f46"/>
            <draw:equation draw:name="f55" draw:formula="21600 * ?f46"/>
            <draw:equation draw:name="f56" draw:formula="13393 * ?f46"/>
            <draw:equation draw:name="f57" draw:formula="?f51 / ?f46"/>
            <draw:equation draw:name="f58" draw:formula="?f52 / ?f46"/>
            <draw:equation draw:name="f59" draw:formula="?f53 / ?f46"/>
            <draw:equation draw:name="f60" draw:formula="?f54 / ?f46"/>
            <draw:equation draw:name="f61" draw:formula="?f55 / ?f46"/>
            <draw:equation draw:name="f62" draw:formula="?f56 / ?f46"/>
            <draw:equation draw:name="f63" draw:formula="?f47 / ?f46"/>
            <draw:equation draw:name="f64" draw:formula="?f48 / ?f46"/>
            <draw:equation draw:name="f65" draw:formula="?f50 / ?f46"/>
            <draw:equation draw:name="f66" draw:formula="?f49 / ?f46"/>
          </draw:enhanced-geometry>
        </draw:custom-shape>
        <draw:custom-shape svg:x="4in" svg:y="5.08346in" svg:width="0.99961in" svg:height="0.24961in" draw:id="id344" draw:style-name="a1385" draw:name="Forme libre : forme 29">
          <svg:title/>
          <svg:desc/>
          <text:p text:style-name="a1383" text:class-names="" text:cond-style-name="" text:id="id343"><text:span text:style-name="a1382" text:class-names=""/></text:p>
          <draw:enhanced-geometry xmlns:dr3d="urn:oasis:names:tc:opendocument:xmlns:dr3d:1.0" draw:type="non-primitive" svg:viewBox="0 0 2540 635" draw:enhanced-path="F M ?f1 ?f0 L ?f0 ?f2 N" draw:text-areas="?f7 ?f9 ?f8 ?f10">
            <draw:equation draw:name="f0" draw:formula="0"/>
            <draw:equation draw:name="f1" draw:formula="2540"/>
            <draw:equation draw:name="f2" draw:formula="635"/>
            <draw:equation draw:name="f3" draw:formula="?f2 - ?f0"/>
            <draw:equation draw:name="f4" draw:formula="?f1 - ?f0"/>
            <draw:equation draw:name="f5" draw:formula="?f4 / 2540"/>
            <draw:equation draw:name="f6" draw:formula="?f3 / 635"/>
            <draw:equation draw:name="f7" draw:formula="?f0 / ?f5"/>
            <draw:equation draw:name="f8" draw:formula="?f1 / ?f5"/>
            <draw:equation draw:name="f9" draw:formula="?f0 / ?f6"/>
            <draw:equation draw:name="f10" draw:formula="?f2 / ?f6"/>
          </draw:enhanced-geometry>
        </draw:custom-shape>
        <draw:custom-shape svg:x="5in" svg:y="5in" svg:width="0.16654in" svg:height="0.16654in" draw:id="id346" draw:style-name="a1388" draw:name="Forme libre : forme 30">
          <svg:title/>
          <svg:desc/>
          <text:p text:style-name="a1387" text:class-names="" text:cond-style-name="" text:id="id345"><text:span text:style-name="a1386"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6.5in" svg:y="3.83346in" svg:width="0.16654in" svg:height="0.16654in" draw:id="id348" draw:style-name="a1391" draw:name="Forme libre : forme 31">
          <svg:title/>
          <svg:desc/>
          <text:p text:style-name="a1390" text:class-names="" text:cond-style-name="" text:id="id347"><text:span text:style-name="a1389"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5.08346in" svg:y="5in" svg:width="0.33268in" svg:height="0.08307in" draw:id="id350" draw:style-name="a1395" draw:name="Forme libre : forme 32">
          <svg:title/>
          <svg:desc/>
          <text:p text:style-name="a1393" text:class-names="" text:cond-style-name="" text:id="id349"><text:span text:style-name="a1392" text:class-names=""/></text:p>
          <draw:enhanced-geometry xmlns:dr3d="urn:oasis:names:tc:opendocument:xmlns:dr3d:1.0" draw:type="non-primitive" svg:viewBox="0 0 846 212" draw:enhanced-path="F M ?f0 ?f2 L ?f1 ?f0 N" draw:text-areas="?f7 ?f9 ?f8 ?f10">
            <draw:equation draw:name="f0" draw:formula="0"/>
            <draw:equation draw:name="f1" draw:formula="846"/>
            <draw:equation draw:name="f2" draw:formula="212"/>
            <draw:equation draw:name="f3" draw:formula="?f2 - ?f0"/>
            <draw:equation draw:name="f4" draw:formula="?f1 - ?f0"/>
            <draw:equation draw:name="f5" draw:formula="?f4 / 846"/>
            <draw:equation draw:name="f6" draw:formula="?f3 / 212"/>
            <draw:equation draw:name="f7" draw:formula="?f0 / ?f5"/>
            <draw:equation draw:name="f8" draw:formula="?f1 / ?f5"/>
            <draw:equation draw:name="f9" draw:formula="?f0 / ?f6"/>
            <draw:equation draw:name="f10" draw:formula="?f2 / ?f6"/>
          </draw:enhanced-geometry>
        </draw:custom-shape>
        <draw:custom-shape svg:x="6.5in" svg:y="3.91653in" svg:width="0.08307in" svg:height="0.66654in" draw:id="id352" draw:style-name="a1399" draw:name="Forme libre : forme 33">
          <svg:title/>
          <svg:desc/>
          <text:p text:style-name="a1397" text:class-names="" text:cond-style-name="" text:id="id351"><text:span text:style-name="a1396" text:class-names=""/></text:p>
          <draw:enhanced-geometry xmlns:dr3d="urn:oasis:names:tc:opendocument:xmlns:dr3d:1.0" draw:type="non-primitive" svg:viewBox="0 0 212 1694" draw:enhanced-path="F M ?f1 ?f0 L ?f0 ?f2 N" draw:text-areas="?f7 ?f9 ?f8 ?f10">
            <draw:equation draw:name="f0" draw:formula="0"/>
            <draw:equation draw:name="f1" draw:formula="212"/>
            <draw:equation draw:name="f2" draw:formula="1694"/>
            <draw:equation draw:name="f3" draw:formula="?f2 - ?f0"/>
            <draw:equation draw:name="f4" draw:formula="?f1 - ?f0"/>
            <draw:equation draw:name="f5" draw:formula="?f4 / 212"/>
            <draw:equation draw:name="f6" draw:formula="?f3 / 1694"/>
            <draw:equation draw:name="f7" draw:formula="?f0 / ?f5"/>
            <draw:equation draw:name="f8" draw:formula="?f1 / ?f5"/>
            <draw:equation draw:name="f9" draw:formula="?f0 / ?f6"/>
            <draw:equation draw:name="f10" draw:formula="?f2 / ?f6"/>
          </draw:enhanced-geometry>
        </draw:custom-shape>
        <draw:custom-shape svg:x="3.99961in" svg:y="3.41653in" svg:width="2.66614in" svg:height="1.91653in" draw:id="id354" draw:style-name="a1402" draw:name="Forme libre : forme 34">
          <svg:title/>
          <svg:desc/>
          <text:p text:style-name="a1401" text:class-names="" text:cond-style-name="" text:id="id353"><text:span text:style-name="a1400" text:class-names=""/></text:p>
          <draw:enhanced-geometry xmlns:dr3d="urn:oasis:names:tc:opendocument:xmlns:dr3d:1.0" draw:type="non-primitive" svg:viewBox="0 0 6773 4869" draw:enhanced-path="F M ?f1 ?f0 L ?f0 ?f2 N" draw:text-areas="?f7 ?f9 ?f8 ?f10">
            <draw:equation draw:name="f0" draw:formula="0"/>
            <draw:equation draw:name="f1" draw:formula="6773"/>
            <draw:equation draw:name="f2" draw:formula="4869"/>
            <draw:equation draw:name="f3" draw:formula="?f2 - ?f0"/>
            <draw:equation draw:name="f4" draw:formula="?f1 - ?f0"/>
            <draw:equation draw:name="f5" draw:formula="?f4 / 6773"/>
            <draw:equation draw:name="f6" draw:formula="?f3 / 4869"/>
            <draw:equation draw:name="f7" draw:formula="?f0 / ?f5"/>
            <draw:equation draw:name="f8" draw:formula="?f1 / ?f5"/>
            <draw:equation draw:name="f9" draw:formula="?f0 / ?f6"/>
            <draw:equation draw:name="f10" draw:formula="?f2 / ?f6"/>
          </draw:enhanced-geometry>
        </draw:custom-shape>
        <draw:custom-shape svg:x="6.58346in" svg:y="3.33307in" svg:width="0.08268in" svg:height="0.58268in" draw:id="id356" draw:style-name="a1406" draw:name="Forme libre : forme 35">
          <svg:title/>
          <svg:desc/>
          <text:p text:style-name="a1404" text:class-names="" text:cond-style-name="" text:id="id355"><text:span text:style-name="a1403" text:class-names=""/></text:p>
          <draw:enhanced-geometry xmlns:dr3d="urn:oasis:names:tc:opendocument:xmlns:dr3d:1.0" draw:type="non-primitive" svg:viewBox="0 0 211 1481" draw:enhanced-path="F M ?f0 ?f2 L ?f1 ?f0 N" draw:text-areas="?f7 ?f9 ?f8 ?f10">
            <draw:equation draw:name="f0" draw:formula="0"/>
            <draw:equation draw:name="f1" draw:formula="211"/>
            <draw:equation draw:name="f2" draw:formula="1481"/>
            <draw:equation draw:name="f3" draw:formula="?f2 - ?f0"/>
            <draw:equation draw:name="f4" draw:formula="?f1 - ?f0"/>
            <draw:equation draw:name="f5" draw:formula="?f4 / 211"/>
            <draw:equation draw:name="f6" draw:formula="?f3 / 1481"/>
            <draw:equation draw:name="f7" draw:formula="?f0 / ?f5"/>
            <draw:equation draw:name="f8" draw:formula="?f1 / ?f5"/>
            <draw:equation draw:name="f9" draw:formula="?f0 / ?f6"/>
            <draw:equation draw:name="f10" draw:formula="?f2 / ?f6"/>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346" smil:attributeName="visibility" smil:to="visible" smil:begin="0.0s" smil:dur="0.00100000004749745s" smil:fill="hold"/>
                </anim:par>
              </anim:par>
              <anim:par smil:begin="0.00100000004749745s" smil:fill="hold">
                <anim:par presentation:node-type="after-previous" presentation:preset-class="entrance" smil:begin="0.0s" smil:fill="hold">
                  <anim:set smil:targetElement="id348" smil:attributeName="visibility" smil:to="visible" smil:begin="0.0s" smil:dur="0.00100000004749745s" smil:fill="hold"/>
                </anim:par>
              </anim:par>
              <anim:par smil:begin="0.0020000000949949s" smil:fill="hold">
                <anim:par presentation:node-type="after-previous" presentation:preset-class="entrance" smil:begin="0.0s" smil:fill="hold">
                  <anim:set smil:targetElement="id350" smil:attributeName="visibility" smil:to="visible" smil:begin="0.0s" smil:dur="0.00100000004749745s" smil:fill="hold"/>
                </anim:par>
              </anim:par>
              <anim:par smil:begin="0.00300000002607703s" smil:fill="hold">
                <anim:par presentation:node-type="after-previous" presentation:preset-class="entrance" smil:begin="0.0s" smil:fill="hold">
                  <anim:set smil:targetElement="id332" smil:attributeName="visibility" smil:to="visible" smil:begin="0.0s" smil:dur="0.00100000004749745s" smil:fill="hold"/>
                </anim:par>
              </anim:par>
              <anim:par smil:begin="0.0040000001899898s" smil:fill="hold">
                <anim:par presentation:node-type="after-previous" presentation:preset-class="entrance" smil:begin="0.0s" smil:fill="hold">
                  <anim:set smil:targetElement="id352"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328" smil:attributeName="visibility" smil:to="visible" smil:begin="0.0s" smil:dur="0.00100000004749745s" smil:fill="hold"/>
                </anim:par>
              </anim:par>
              <anim:par smil:begin="0.00100000004749745s" smil:fill="hold">
                <anim:par presentation:node-type="after-previous" presentation:preset-class="entrance" smil:begin="0.0s" smil:fill="hold">
                  <anim:set smil:targetElement="id344" smil:attributeName="visibility" smil:to="visible" smil:begin="0.0s" smil:dur="0.00100000004749745s" smil:fill="hold"/>
                </anim:par>
              </anim:par>
              <anim:par smil:begin="0.0020000000949949s" smil:fill="hold">
                <anim:par presentation:node-type="after-previous" presentation:preset-class="entrance" smil:begin="0.0s" smil:fill="hold">
                  <anim:set smil:targetElement="id330" smil:attributeName="visibility" smil:to="visible" smil:begin="0.0s" smil:dur="0.00100000004749745s" smil:fill="hold"/>
                </anim:par>
              </anim:par>
              <anim:par smil:begin="0.00300000002607703s" smil:fill="hold">
                <anim:par presentation:node-type="after-previous" presentation:preset-class="entrance" smil:begin="0.0s" smil:fill="hold">
                  <anim:set smil:targetElement="id356" smil:attributeName="visibility" smil:to="visible" smil:begin="0.0s" smil:dur="0.00100000004749745s" smil:fill="hold"/>
                </anim:par>
              </anim:par>
              <anim:par smil:begin="0.0040000001899898s" smil:fill="hold">
                <anim:par presentation:node-type="after-previous" presentation:preset-class="entrance" smil:begin="0.0s" smil:fill="hold">
                  <anim:set smil:targetElement="id326" smil:attributeName="visibility" smil:to="visible" smil:begin="0.0s" smil:dur="0.00100000004749745s" smil:fill="hold"/>
                </anim:par>
              </anim:par>
              <anim:par smil:begin="0.00499999988824129s" smil:fill="hold">
                <anim:par presentation:node-type="after-previous" presentation:preset-class="entrance" smil:begin="0.0s" smil:fill="hold">
                  <anim:set smil:targetElement="id354" smil:attributeName="visibility" smil:to="visible" smil:begin="0.0s" smil:dur="0.00100000004749745s" smil:fill="hold"/>
                </anim:par>
              </anim:par>
              <anim:par smil:begin="0.00600000005215406s" smil:fill="hold">
                <anim:par presentation:node-type="after-previous" presentation:preset-class="entrance" smil:begin="0.0s" smil:fill="hold">
                  <anim:set smil:targetElement="id334"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336" smil:attributeName="visibility" smil:to="visible" smil:begin="0.0s" smil:dur="0.00100000004749745s" smil:fill="hold"/>
                </anim:par>
              </anim:par>
              <anim:par smil:begin="0.00100000004749745s" smil:fill="hold">
                <anim:par presentation:node-type="after-previous" presentation:preset-class="entrance" smil:begin="0.0s" smil:fill="hold">
                  <anim:set smil:targetElement="id338" smil:attributeName="visibility" smil:to="visible" smil:begin="0.0s" smil:dur="0.00100000004749745s" smil:fill="hold"/>
                </anim:par>
              </anim:par>
              <anim:par smil:begin="0.0020000000949949s" smil:fill="hold">
                <anim:par presentation:node-type="after-previous" presentation:preset-class="entrance" smil:begin="0.0s" smil:fill="hold">
                  <anim:set smil:targetElement="id340" smil:attributeName="visibility" smil:to="visible" smil:begin="0.0s" smil:dur="0.00100000004749745s" smil:fill="hold"/>
                </anim:par>
              </anim:par>
              <anim:par smil:begin="0.00300000002607703s" smil:fill="hold">
                <anim:par presentation:node-type="after-previous" presentation:preset-class="entrance" smil:begin="0.0s" smil:fill="hold">
                  <anim:set smil:targetElement="id342" smil:attributeName="visibility" smil:to="visible" smil:begin="0.0s" smil:dur="0.00100000004749745s" smil:fill="hold"/>
                </anim:par>
              </anim:par>
            </anim:par>
          </anim:seq>
        </anim:par>
        <presentation:notes draw:style-name="a1423">
          <draw:frame draw:id="id360" draw:style-name="a1420" draw:name="Espace réservé du numéro de diapositive 7" svg:x="4.16654in" svg:y="10.25in" svg:width="3.16693in" svg:height="0.5in">
            <draw:text-box>
              <text:p text:style-name="a1419" text:class-names="" text:cond-style-name=""><text:span text:style-name="a1418" text:class-names=""><text:page-number style:num-format="1" text:fixed="false"/></text:span></text:p>
            </draw:text-box>
            <svg:title/>
            <svg:desc/>
          </draw:frame>
          <draw:page-thumbnail draw:page-number="22" svg:x="1.04167in" svg:y="0.83333in" svg:width="5.33333in" svg:height="4in" presentation:class="page" draw:id="id361" presentation:style-name="a1421" draw:name="Espace réservé de l'image des diapositives 1">
            <svg:title/>
            <svg:desc/>
          </draw:page-thumbnail>
          <draw:frame draw:id="id362" presentation:style-name="a1422" draw:name="Espace réservé des notes 2" svg:x="1in" svg:y="5.16614in" svg:width="5.41654in" svg:height="4.83386in" presentation:class="notes" presentation:placeholder="true">
            <draw:text-box/>
            <svg:title/>
            <svg:desc/>
          </draw:frame>
        </presentation:notes>
      </draw:page>
      <draw:page draw:name="page26" draw:style-name="a1425" draw:master-page-name="Master1-Layout7-blank-Vide" presentation:presentation-page-layout-name="Master1-PPL7" draw:id="Slide-281">
        <draw:frame draw:id="id364" presentation:style-name="a1432" draw:name="Titre 1" svg:x="0.75in" svg:y="-0.00039in" svg:width="8.5in" svg:height="0.83346in" presentation:class="title" presentation:placeholder="false">
          <draw:text-box>
            <text:p text:style-name="a1431" text:class-names="" text:cond-style-name="" text:id="id363"><text:span text:style-name="a1426" text:class-names="">P</text:span><text:span text:style-name="a1427" text:class-names="">roblème<text:s text:c="1"/></text:span><text:span text:style-name="a1428" text:class-names="">général<text:s text:c="1"/></text:span><text:span text:style-name="a1429" text:class-names="">(simplifié)</text:span><text:span text:style-name="a1430" text:class-names=""/></text:p>
          </draw:text-box>
          <svg:title/>
          <svg:desc/>
        </draw:frame>
        <draw:frame draw:id="id377" presentation:style-name="a1478" draw:name="Espace réservé du texte 2" svg:x="0.13131in" svg:y="0.83307in" svg:width="10in" svg:height="3.32615in" presentation:class="outline" presentation:placeholder="false">
          <draw:text-box>
            <text:list text:style-name="a1436">
              <text:list-item>
                <text:p text:style-name="a1435" text:class-names="" text:cond-style-name="" text:id="id365"><text:span text:style-name="a1433" text:class-names="">P</text:span><text:span text:style-name="a1434" text:class-names="">roblème inverse de reconstruction d'image</text:span></text:p>
              </text:list-item>
            </text:list>
            <text:list text:style-name="a1439">
              <text:list-item>
                <text:p text:style-name="a1438" text:class-names="" text:cond-style-name="" text:id="id366"><text:span text:style-name="a1437" text:class-names=""/></text:p>
              </text:list-item>
            </text:list>
            <text:list text:style-name="a1443">
              <text:list-item>
                <text:p text:style-name="a1442" text:class-names="" text:cond-style-name="" text:id="id367"><text:span text:style-name="a1440" text:class-names="">Retrouver une fonction f<text:s text:c="1"/></text:span><text:span text:style-name="a1441" text:class-names="">:</text:span></text:p>
              </text:list-item>
            </text:list>
            <text:list text:style-name="a1446">
              <text:list-item>
                <text:p text:style-name="a1445" text:class-names="" text:cond-style-name="" text:id="id368"><text:span text:style-name="a1444" text:class-names="">densité des tissus des organes (Scan X) <text:s text:c="1"/></text:span></text:p>
              </text:list-item>
            </text:list>
            <text:list text:style-name="a1449">
              <text:list-item>
                <text:p text:style-name="a1448" text:class-names="" text:cond-style-name="" text:id="id369"><text:span text:style-name="a1447" text:class-names="">ou intensité d’émission (SPECT ou PET)</text:span></text:p>
              </text:list-item>
            </text:list>
            <text:list text:style-name="a1452">
              <text:list-item>
                <text:p text:style-name="a1451" text:class-names="" text:cond-style-name="" text:id="id370"><text:span text:style-name="a1450" text:class-names=""><text:s text:c="1"/></text:span></text:p>
              </text:list-item>
            </text:list>
            <text:list text:style-name="a1455">
              <text:list-item>
                <text:p text:style-name="a1454" text:class-names="" text:cond-style-name="" text:id="id371"><text:span text:style-name="a1453" text:class-names=""/></text:p>
              </text:list-item>
            </text:list>
            <text:list text:style-name="a1458">
              <text:list-item>
                <text:p text:style-name="a1457" text:class-names="" text:cond-style-name="" text:id="id372"><text:span text:style-name="a1456" text:class-names=""/></text:p>
              </text:list-item>
            </text:list>
            <text:list text:style-name="a1468">
              <text:list-item>
                <text:p text:style-name="a1467" text:class-names="" text:cond-style-name="" text:id="id373"><text:span text:style-name="a1459" text:class-names=""><text:s text:c="1"/>à partir de<text:s text:c="1"/></text:span><text:span text:style-name="a1460" text:class-names="">ses intégrales sur<text:s text:c="1"/></text:span><text:span text:style-name="a1461" text:class-names="">des<text:s text:c="1"/></text:span><text:span text:style-name="a1462" text:class-names="">lignes (projections</text:span><text:span text:style-name="a1463" text:class-names="">) variant<text:s text:c="1"/></text:span><text:span text:style-name="a1464" text:class-names="">dans un<text:s text:c="1"/></text:span><text:span text:style-name="a1465" text:class-names="">ensemble<text:s text:c="1"/></text:span><text:span text:style-name="a1466" text:class-names="">L</text:span></text:p>
              </text:list-item>
            </text:list>
            <text:list text:style-name="a1471">
              <text:list-item>
                <text:p text:style-name="a1470" text:class-names="" text:cond-style-name="" text:id="id374"><text:span text:style-name="a1469" text:class-names=""><text:s text:c="4"/></text:span></text:p>
              </text:list-item>
            </text:list>
            <text:list text:style-name="a1474">
              <text:list-item>
                <text:p text:style-name="a1473" text:class-names="" text:cond-style-name="" text:id="id375"><text:span text:style-name="a1472" text:class-names=""/></text:p>
              </text:list-item>
            </text:list>
            <text:list text:style-name="a1477">
              <text:list-item>
                <text:p text:style-name="a1476" text:class-names="" text:cond-style-name="" text:id="id376"><text:span text:style-name="a1475" text:class-names=""/></text:p>
              </text:list-item>
            </text:list>
          </draw:text-box>
          <svg:title/>
          <svg:desc/>
        </draw:frame>
        <draw:frame draw:id="id378" draw:style-name="a1479" draw:name="form1-red" svg:x="3.36378in" svg:y="3.44067in" svg:width="3.27244in" svg:height="1.02244in" style:rel-width="scale" style:rel-height="scale">
          <draw:image xlink:href="media/image14.png" xlink:type="simple" xlink:show="embed" xlink:actuate="onLoad"/>
          <svg:title/>
          <svg:desc/>
        </draw:frame>
        <draw:custom-shape svg:x="0.13131in" svg:y="6.20202in" svg:width="9.58811in" svg:height="1.37903in" draw:id="id382" draw:style-name="a1503" draw:name="Forme libre : forme 4">
          <svg:title/>
          <svg:desc/>
          <text:p text:style-name="a1487" text:class-names="" text:cond-style-name="" text:id="id379"><text:span text:style-name="a1480" text:class-names="">Données<text:s text:c="1"/></text:span><text:span text:style-name="a1481" text:class-names="">souvent incomplètes</text:span><text:span text:style-name="a1482" text:class-names=""><text:s text:c="1"/>-&gt;</text:span><text:span text:style-name="a1483" text:class-names=""><text:s text:c="1"/>Problème<text:s text:c="1"/></text:span><text:span text:style-name="a1484" text:class-names="">"mal<text:s text:c="1"/></text:span><text:span text:style-name="a1485" text:class-names="">posé« </text:span><text:span text:style-name="a1486" text:class-names=""/></text:p>
          <text:p text:style-name="a1500" text:class-names="" text:cond-style-name="" text:id="id380"><text:span text:style-name="a1488" text:class-names="">D</text:span><text:span text:style-name="a1489" text:class-names="">épend<text:s text:c="1"/></text:span><text:span text:style-name="a1490" text:class-names="">-</text:span><text:span text:style-name="a1491" text:class-names="">principalement</text:span><text:span text:style-name="a1492" text:class-names="">-</text:span><text:span text:style-name="a1493" text:class-names=""><text:s text:c="1"/>de<text:s text:c="1"/></text:span><text:span text:style-name="a1494" text:class-names="">L<text:s text:c="1"/></text:span><text:span text:style-name="a1495" text:class-names="">(en</text:span><text:span text:style-name="a1496" text:class-names=""><text:s text:c="1"/>‘3D<text:s text:c="1"/></text:span><text:span text:style-name="a1497" text:class-names="">tomo</text:span><text:span text:style-name="a1498" text:class-names="">’ et ‘3D vrai’)</text:span><text:span text:style-name="a1499" text:class-names=""/></text:p>
          <text:p text:style-name="a1502" text:class-names="" text:cond-style-name="" text:id="id381"><text:span text:style-name="a15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382" smil:attributeName="visibility" smil:to="visible" smil:begin="0.0s" smil:dur="0.00100000004749745s" smil:fill="hold"/>
                </anim:par>
              </anim:par>
            </anim:par>
            <anim:par smil:begin="indefinite" smil:fill="hold">
              <anim:par smil:begin="0.0s" smil:fill="hold">
                <anim:par presentation:node-type="on-click" presentation:preset-class="entrance" presentation:group-id="0" smil:begin="0.0s" smil:fill="hold">
                  <anim:set smil:targetElement="id365" smil:attributeName="visibility" smil:to="visible" smil:begin="0.0s" smil:dur="0.00100000004749745s" smil:fill="hold"/>
                </anim:par>
              </anim:par>
            </anim:par>
            <anim:par smil:begin="indefinite" smil:fill="hold">
              <anim:par smil:begin="0.0s" smil:fill="hold">
                <anim:par presentation:node-type="on-click" presentation:preset-class="entrance" presentation:group-id="0" smil:begin="0.0s" smil:fill="hold">
                  <anim:set smil:targetElement="id367" smil:attributeName="visibility" smil:to="visible" smil:begin="0.0s" smil:dur="0.00100000004749745s" smil:fill="hold"/>
                </anim:par>
              </anim:par>
            </anim:par>
            <anim:par smil:begin="indefinite" smil:fill="hold">
              <anim:par smil:begin="0.0s" smil:fill="hold">
                <anim:par presentation:node-type="on-click" presentation:preset-class="entrance" presentation:group-id="0"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364"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378" smil:attributeName="visibility" smil:to="visible" smil:begin="0.0s" smil:dur="0.00100000004749745s" smil:fill="hold"/>
                </anim:par>
              </anim:par>
            </anim:par>
          </anim:seq>
        </anim:par>
        <presentation:notes draw:style-name="a1509">
          <draw:frame draw:id="id383" draw:style-name="a1506" draw:name="Espace réservé du numéro de diapositive 7" svg:x="4.16654in" svg:y="10.25in" svg:width="3.16693in" svg:height="0.5in">
            <draw:text-box>
              <text:p text:style-name="a1505" text:class-names="" text:cond-style-name=""><text:span text:style-name="a1504" text:class-names=""><text:page-number style:num-format="1" text:fixed="false"/></text:span></text:p>
            </draw:text-box>
            <svg:title/>
            <svg:desc/>
          </draw:frame>
          <draw:page-thumbnail draw:page-number="23" svg:x="1.04167in" svg:y="0.83333in" svg:width="5.33333in" svg:height="4in" presentation:class="page" draw:id="id384" presentation:style-name="a1507" draw:name="Espace réservé de l'image des diapositives 1">
            <svg:title/>
            <svg:desc/>
          </draw:page-thumbnail>
          <draw:frame draw:id="id385" presentation:style-name="a1508" draw:name="Espace réservé des notes 2" svg:x="1in" svg:y="5.16614in" svg:width="5.41654in" svg:height="4.83386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25in" svg:y="1.22743in" svg:width="7.5in" svg:height="2.61111in"/>
      <presentation:placeholder presentation:object="subtitle" svg:x="1.25in" svg:y="3.93924in" svg:width="7.5in" svg:height="1.81076in"/>
      <presentation:placeholder presentation:object="date-time" svg:x="0.75in" svg:y="6.83346in" svg:width="2.08346in" svg:height="0.5in"/>
      <presentation:placeholder presentation:object="footer" svg:x="3.41653in" svg:y="6.83346in" svg:width="3.16693in" svg:height="0.5in"/>
      <presentation:placeholder presentation:object="page-number" svg:x="7.16654in" svg:y="6.83346in" svg:width="2.08346in" svg:height="0.5in"/>
    </style:presentation-page-layout>
    <style:presentation-page-layout style:name="Master1-PPL2" style:display-name="Titre et contenu">
      <presentation:placeholder presentation:object="title" svg:x="0.75in" svg:y="0.66614in" svg:width="8.5in" svg:height="1.25in"/>
      <presentation:placeholder presentation:object="object" svg:x="0.75in" svg:y="2.16654in" svg:width="8.5in" svg:height="4.5in"/>
      <presentation:placeholder presentation:object="date-time" svg:x="0.75in" svg:y="6.83346in" svg:width="2.08346in" svg:height="0.5in"/>
      <presentation:placeholder presentation:object="footer" svg:x="3.41653in" svg:y="6.83346in" svg:width="3.16693in" svg:height="0.5in"/>
      <presentation:placeholder presentation:object="page-number" svg:x="7.16654in" svg:y="6.83346in" svg:width="2.08346in" svg:height="0.5in"/>
    </style:presentation-page-layout>
    <style:presentation-page-layout style:name="Master1-PPL3" style:display-name="Titre de section">
      <presentation:placeholder presentation:object="title" svg:x="0.68229in" svg:y="1.86979in" svg:width="8.625in" svg:height="3.11979in"/>
      <presentation:placeholder presentation:object="outline" svg:x="0.68229in" svg:y="5.0191in" svg:width="8.625in" svg:height="1.64062in"/>
      <presentation:placeholder presentation:object="date-time" svg:x="0.75in" svg:y="6.83346in" svg:width="2.08346in" svg:height="0.5in"/>
      <presentation:placeholder presentation:object="footer" svg:x="3.41653in" svg:y="6.83346in" svg:width="3.16693in" svg:height="0.5in"/>
      <presentation:placeholder presentation:object="page-number" svg:x="7.16654in" svg:y="6.83346in" svg:width="2.08346in" svg:height="0.5in"/>
    </style:presentation-page-layout>
    <style:presentation-page-layout style:name="Master1-PPL4" style:display-name="Deux contenus">
      <presentation:placeholder presentation:object="title" svg:x="0.75in" svg:y="0.66614in" svg:width="8.5in" svg:height="1.25in"/>
      <presentation:placeholder presentation:object="object" svg:x="0.75in" svg:y="2.16667in" svg:width="4.16667in" svg:height="4.5in"/>
      <presentation:placeholder presentation:object="object" svg:x="5.08333in" svg:y="2.16667in" svg:width="4.16667in" svg:height="4.5in"/>
      <presentation:placeholder presentation:object="date-time" svg:x="0.75in" svg:y="6.83346in" svg:width="2.08346in" svg:height="0.5in"/>
      <presentation:placeholder presentation:object="footer" svg:x="3.41653in" svg:y="6.83346in" svg:width="3.16693in" svg:height="0.5in"/>
      <presentation:placeholder presentation:object="page-number" svg:x="7.16654in" svg:y="6.83346in" svg:width="2.08346in" svg:height="0.5in"/>
    </style:presentation-page-layout>
    <style:presentation-page-layout style:name="Master1-PPL5" style:display-name="Compara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0.75in" svg:y="6.83346in" svg:width="2.08346in" svg:height="0.5in"/>
      <presentation:placeholder presentation:object="footer" svg:x="3.41653in" svg:y="6.83346in" svg:width="3.16693in" svg:height="0.5in"/>
      <presentation:placeholder presentation:object="page-number" svg:x="7.16654in" svg:y="6.83346in" svg:width="2.08346in" svg:height="0.5in"/>
    </style:presentation-page-layout>
    <style:presentation-page-layout style:name="Master1-PPL6" style:display-name="Titre seul">
      <presentation:placeholder presentation:object="title" svg:x="0.75in" svg:y="0.66614in" svg:width="8.5in" svg:height="1.25in"/>
      <presentation:placeholder presentation:object="date-time" svg:x="0.75in" svg:y="6.83346in" svg:width="2.08346in" svg:height="0.5in"/>
      <presentation:placeholder presentation:object="footer" svg:x="3.41653in" svg:y="6.83346in" svg:width="3.16693in" svg:height="0.5in"/>
      <presentation:placeholder presentation:object="page-number" svg:x="7.16654in" svg:y="6.83346in" svg:width="2.08346in" svg:height="0.5in"/>
    </style:presentation-page-layout>
    <style:presentation-page-layout style:name="Master1-PPL7" style:display-name="Vide">
      <presentation:placeholder presentation:object="date-time" svg:x="0.75in" svg:y="6.83346in" svg:width="2.08346in" svg:height="0.5in"/>
      <presentation:placeholder presentation:object="footer" svg:x="3.41653in" svg:y="6.83346in" svg:width="3.16693in" svg:height="0.5in"/>
      <presentation:placeholder presentation:object="page-number" svg:x="7.16654in" svg:y="6.83346in" svg:width="2.08346in" svg:height="0.5in"/>
    </style:presentation-page-layout>
    <style:presentation-page-layout style:name="Master1-PPL8" style:display-name="Contenu avec légende">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0.75in" svg:y="6.83346in" svg:width="2.08346in" svg:height="0.5in"/>
      <presentation:placeholder presentation:object="footer" svg:x="3.41653in" svg:y="6.83346in" svg:width="3.16693in" svg:height="0.5in"/>
      <presentation:placeholder presentation:object="page-number" svg:x="7.16654in" svg:y="6.83346in" svg:width="2.08346in" svg:height="0.5in"/>
    </style:presentation-page-layout>
    <style:presentation-page-layout style:name="Master1-PPL9" style:display-name="Image avec légende">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0.75in" svg:y="6.83346in" svg:width="2.08346in" svg:height="0.5in"/>
      <presentation:placeholder presentation:object="footer" svg:x="3.41653in" svg:y="6.83346in" svg:width="3.16693in" svg:height="0.5in"/>
      <presentation:placeholder presentation:object="page-number" svg:x="7.16654in" svg:y="6.83346in" svg:width="2.08346in" svg:height="0.5in"/>
    </style:presentation-page-layout>
    <style:presentation-page-layout style:name="Master1-PPL10" style:display-name="Titre et texte vertical">
      <presentation:placeholder presentation:object="title" svg:x="0.75in" svg:y="0.66614in" svg:width="8.5in" svg:height="1.25in"/>
      <presentation:placeholder presentation:object="outline" svg:x="0.75in" svg:y="2.16654in" svg:width="8.5in" svg:height="4.5in"/>
      <presentation:placeholder presentation:object="date-time" svg:x="0.75in" svg:y="6.83346in" svg:width="2.08346in" svg:height="0.5in"/>
      <presentation:placeholder presentation:object="footer" svg:x="3.41653in" svg:y="6.83346in" svg:width="3.16693in" svg:height="0.5in"/>
      <presentation:placeholder presentation:object="page-number" svg:x="7.16654in" svg:y="6.83346in" svg:width="2.08346in" svg:height="0.5in"/>
    </style:presentation-page-layout>
    <style:presentation-page-layout style:name="Master1-PPL11" style:display-name="Titre vertical et texte">
      <presentation:placeholder presentation:object="title" svg:x="7.125in" svg:y="0.66667in" svg:width="2.125in" svg:height="6in"/>
      <presentation:placeholder presentation:object="outline" svg:x="0.75in" svg:y="0.66667in" svg:width="6.20833in" svg:height="6in"/>
      <presentation:placeholder presentation:object="date-time" svg:x="0.75in" svg:y="6.83346in" svg:width="2.08346in" svg:height="0.5in"/>
      <presentation:placeholder presentation:object="footer" svg:x="3.41653in" svg:y="6.83346in" svg:width="3.16693in" svg:height="0.5in"/>
      <presentation:placeholder presentation:object="page-number" svg:x="7.16654in" svg:y="6.83346in" svg:width="2.08346in" svg:height="0.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631" draw:style="axial" draw:angle="0" draw:start-color="#0b0b0b" draw:end-color="#4d4d4d" draw:start-intensity="100%" draw:end-intensity="100%"/>
    <draw:gradient draw:name="a688" draw:style="axial" draw:angle="0" draw:start-color="#0b0b0b" draw:end-color="#4d4d4d" draw:start-intensity="100%" draw:end-intensity="100%"/>
    <draw:gradient draw:name="a864" draw:style="axial" draw:angle="0" draw:start-color="#0b0b0b" draw:end-color="#4d4d4d" draw:start-intensity="100%" draw:end-intensity="100%"/>
    <draw:gradient draw:name="a1424" draw:style="axial" draw:angle="0" draw:start-color="#0b0b0b" draw:end-color="#4d4d4d" draw:start-intensity="100%" draw:end-intensity="100%"/>
    <draw:gradient draw:name="a1302" draw:style="axial" draw:angle="0" draw:start-color="#0b0b0b" draw:end-color="#4d4d4d" draw:start-intensity="100%" draw:end-intensity="100%"/>
    <draw:gradient draw:name="a375" draw:style="axial" draw:angle="0" draw:start-color="#0b0b0b" draw:end-color="#4d4d4d" draw:start-intensity="100%" draw:end-intensity="100%"/>
    <draw:gradient draw:name="a660" draw:style="axial" draw:angle="0" draw:start-color="#0b0b0b" draw:end-color="#4d4d4d" draw:start-intensity="100%" draw:end-intensity="100%"/>
    <draw:gradient draw:name="a819" draw:style="axial" draw:angle="0" draw:start-color="#0b0b0b" draw:end-color="#4d4d4d" draw:start-intensity="100%" draw:end-intensity="100%"/>
    <draw:gradient draw:name="a50" draw:style="axial" draw:angle="0" draw:start-color="#0b0b0b" draw:end-color="#4d4d4d" draw:start-intensity="100%" draw:end-intensity="100%"/>
    <draw:gradient draw:name="a519" draw:style="axial" draw:angle="0" draw:start-color="#0b0b0b" draw:end-color="#4d4d4d" draw:start-intensity="100%" draw:end-intensity="100%"/>
    <draw:gradient draw:name="a732" draw:style="axial" draw:angle="0" draw:start-color="#0b0b0b" draw:end-color="#4d4d4d" draw:start-intensity="100%" draw:end-intensity="100%"/>
    <draw:gradient draw:name="a896" draw:style="axial" draw:angle="0" draw:start-color="#0b0b0b" draw:end-color="#4d4d4d" draw:start-intensity="100%" draw:end-intensity="100%"/>
    <draw:gradient draw:name="a1193" draw:style="axial" draw:angle="0" draw:start-color="#0b0b0b" draw:end-color="#4d4d4d" draw:start-intensity="100%" draw:end-intensity="100%"/>
    <draw:gradient draw:name="a1262" draw:style="axial" draw:angle="0" draw:start-color="#0b0b0b" draw:end-color="#4d4d4d" draw:start-intensity="100%" draw:end-intensity="100%"/>
    <draw:gradient draw:name="a310" draw:style="axial" draw:angle="0" draw:start-color="#0b0b0b" draw:end-color="#4d4d4d" draw:start-intensity="100%" draw:end-intensity="100%"/>
    <draw:gradient draw:name="a136" draw:style="axial" draw:angle="0" draw:start-color="#0b0b0b" draw:end-color="#4d4d4d" draw:start-intensity="100%" draw:end-intensity="100%"/>
    <draw:gradient draw:name="a913" draw:style="axial" draw:angle="0" draw:start-color="#0b0b0b" draw:end-color="#4d4d4d" draw:start-intensity="100%" draw:end-intensity="100%"/>
    <draw:gradient draw:name="a669" draw:style="axial" draw:angle="0" draw:start-color="#0b0b0b" draw:end-color="#4d4d4d" draw:start-intensity="100%" draw:end-intensity="100%"/>
    <draw:gradient draw:name="a0" draw:style="axial" draw:angle="0" draw:start-color="#0b0b0b" draw:end-color="#4d4d4d" draw:start-intensity="100%" draw:end-intensity="100%"/>
    <draw:gradient draw:name="a174" draw:style="axial" draw:angle="0" draw:start-color="#0b0b0b" draw:end-color="#4d4d4d" draw:start-intensity="100%" draw:end-intensity="100%"/>
    <draw:gradient draw:name="a778" draw:style="axial" draw:angle="0" draw:start-color="#0b0b0b" draw:end-color="#4d4d4d" draw:start-intensity="100%" draw:end-intensity="100%"/>
    <draw:gradient draw:name="a585" draw:style="axial" draw:angle="0" draw:start-color="#0b0b0b" draw:end-color="#4d4d4d" draw:start-intensity="100%" draw:end-intensity="100%"/>
    <draw:gradient draw:name="a1181" draw:style="axial" draw:angle="0" draw:start-color="#0b0b0b" draw:end-color="#4d4d4d" draw:start-intensity="100%" draw:end-intensity="100%"/>
    <draw:gradient draw:name="a1145" draw:style="axial" draw:angle="0" draw:start-color="#0b0b0b" draw:end-color="#4d4d4d" draw:start-intensity="100%" draw:end-intensity="100%"/>
    <draw:gradient draw:name="a996" draw:style="axial" draw:angle="0" draw:start-color="#0b0b0b" draw:end-color="#4d4d4d" draw:start-intensity="100%" draw:end-intensity="100%"/>
    <draw:gradient draw:name="a1021" draw:style="axial" draw:angle="0" draw:start-color="#0b0b0b" draw:end-color="#4d4d4d" draw:start-intensity="100%" draw:end-intensity="100%"/>
    <draw:gradient draw:name="a428" draw:style="axial" draw:angle="0" draw:start-color="#0b0b0b" draw:end-color="#4d4d4d" draw:start-intensity="100%" draw:end-intensity="100%"/>
    <draw:gradient draw:name="a87" draw:style="axial" draw:angle="0" draw:start-color="#0b0b0b" draw:end-color="#4d4d4d" draw:start-intensity="100%" draw:end-intensity="100%"/>
    <draw:gradient draw:name="a469" draw:style="axial" draw:angle="0" draw:start-color="#0b0b0b" draw:end-color="#4d4d4d" draw:start-intensity="100%" draw:end-intensity="100%"/>
    <draw:gradient draw:name="a1064" draw:style="axial" draw:angle="0" draw:start-color="#0b0b0b" draw:end-color="#4d4d4d" draw:start-intensity="100%" draw:end-intensity="100%"/>
    <draw:gradient draw:name="a876" draw:style="axial" draw:angle="0" draw:start-color="#0b0b0b" draw:end-color="#4d4d4d" draw:start-intensity="100%" draw:end-intensity="100%"/>
    <draw:gradient draw:name="a344" draw:style="axial" draw:angle="0" draw:start-color="#0b0b0b" draw:end-color="#4d4d4d" draw:start-intensity="100%" draw:end-intensity="100%"/>
    <draw:gradient draw:name="a238" draw:style="axial" draw:angle="0" draw:start-color="#0b0b0b" draw:end-color="#4d4d4d" draw:start-intensity="100%" draw:end-intensity="100%"/>
    <draw:gradient draw:name="a753" draw:style="axial" draw:angle="0" draw:start-color="#0b0b0b" draw:end-color="#4d4d4d" draw:start-intensity="100%" draw:end-intensity="100%"/>
    <draw:gradient draw:name="a948" draw:style="axial" draw:angle="0" draw:start-color="#0b0b0b" draw:end-color="#4d4d4d" draw:start-intensity="100%" draw:end-intensity="100%"/>
    <draw:marker draw:name="a1231" svg:viewBox="0 0 20 30" svg:d="m10 0-10 30h20z"/>
    <draw:marker draw:name="a1373" svg:viewBox="0 0 20 30" svg:d="m10 0-10 30h20z"/>
    <draw:marker draw:name="a1281" svg:viewBox="0 0 20 30" svg:d="m10 0-10 30h20z"/>
    <draw:marker draw:name="a1377" svg:viewBox="0 0 20 30" svg:d="m10 0-10 30h20z"/>
    <draw:marker draw:name="a1285" svg:viewBox="0 0 20 30" svg:d="m10 0-10 30h20z"/>
    <draw:marker draw:name="a1405" svg:viewBox="0 0 20 30" svg:d="m10 0-10 30h20z"/>
    <draw:marker draw:name="a1394" svg:viewBox="0 0 20 30" svg:d="m10 0-10 30h20z"/>
    <draw:marker draw:name="a1220" svg:viewBox="0 0 20 30" svg:d="m10 0-10 30h20z"/>
    <draw:marker draw:name="a1163" svg:viewBox="0 0 20 30" svg:d="m10 0-10 30h20z"/>
    <draw:marker draw:name="a1221" svg:viewBox="0 0 20 30" svg:d="m10 0-10 30h20z"/>
    <draw:marker draw:name="a1409" svg:viewBox="0 0 20 30" svg:d="m10 0-10 30h20z"/>
    <draw:marker draw:name="a1398" svg:viewBox="0 0 20 30" svg:d="m10 0-10 30h20z"/>
    <draw:marker draw:name="a1167" svg:viewBox="0 0 20 30" svg:d="m10 0-10 30h20z"/>
    <draw:marker draw:name="a1277" svg:viewBox="0 0 20 30" svg:d="m10 0-10 30h20z"/>
    <draw:marker draw:name="a1384" svg:viewBox="0 0 20 30" svg:d="m10 0-10 30h20z"/>
    <draw:marker draw:name="a1155" svg:viewBox="0 0 20 30" svg:d="m10 0-10 30h20z"/>
    <draw:marker draw:name="a1214" svg:viewBox="0 0 20 30" svg:d="m10 0-10 30h20z"/>
    <draw:marker draw:name="a1352" svg:viewBox="0 0 20 30" svg:d="m10 0-10 30h20z"/>
    <draw:marker draw:name="a1215" svg:viewBox="0 0 20 30" svg:d="m10 0-10 30h20z"/>
    <draw:marker draw:name="a1410" svg:viewBox="0 0 20 30" svg:d="m10 0-10 30h20z"/>
    <draw:marker draw:name="a1159" svg:viewBox="0 0 20 30" svg:d="m10 0-10 30h20z"/>
    <draw:marker draw:name="a1356" svg:viewBox="0 0 20 30" svg:d="m10 0-10 30h20z"/>
    <draw:marker draw:name="a1230" svg:viewBox="0 0 20 30" svg:d="m10 0-10 30h20z"/>
    <draw:stroke-dash draw:name="a1229" draw:style="rect" draw:dots1="1" draw:dots1-length="0.11102in" draw:distance="0.11102in"/>
    <draw:stroke-dash draw:name="a1206" draw:style="rect" draw:dots1="1" draw:dots1-length="0.01378in" draw:distance="0.01378in"/>
    <draw:stroke-dash draw:name="a1360" draw:style="rect" draw:dots1="1" draw:dots1-length="0.04134in" draw:distance="0.04134in"/>
    <draw:stroke-dash draw:name="a1309" draw:style="rect" draw:dots1="1" draw:dots1-length="0.11102in" draw:distance="0.11102in"/>
    <draw:stroke-dash draw:name="a1219" draw:style="rect" draw:dots1="1" draw:dots1-length="0.11102in" draw:distance="0.11102in"/>
    <draw:stroke-dash draw:name="a1213" draw:style="rect" draw:dots1="1" draw:dots1-length="0.11102in" draw:distance="0.11102in"/>
    <draw:stroke-dash draw:name="a1225" draw:style="rect" draw:dots1="1" draw:dots1-length="0.11102in" draw:distance="0.11102in"/>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37326in" fo:page-height="10.79167in" style:print-orientation="portrait" style:register-truth-ref-style-name=""/>
    </style:page-layout>
    <style:page-layout style:name="pageLayout3">
      <style:page-layout-properties fo:page-width="7.37326in" fo:page-height="10.79167in" style:print-orientation="portrait" style:register-truth-ref-style-name=""/>
    </style:page-layout>
    <style:style style:family="presentation" style:name="a7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9">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draw:fill="none" draw:stroke="non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tb-rl"/>
    </style:style>
    <style:style style:family="paragraph" style:name="a78">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1">
      <style:drawing-page-properties draw:fill="gradient" draw:fill-gradient-name="a3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1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6">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gradient" draw:fill-gradient-name="a4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
      <style:drawing-page-properties draw:fill="gradient" draw:fill-gradient-name="a8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118in" fo:padding-bottom="0.05118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2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118in" fo:padding-bottom="0.05118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220">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227">
      <style:graphic-properties draw:fill="none" draw:stroke="non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33">
      <style:graphic-properties draw:fill="none" draw:stroke="non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draw:fill="none" draw:stroke="non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draw:fill="none" draw:stroke="none"/>
    </style:style>
    <style:style style:family="presentation" style:name="a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9">
      <style:drawing-page-properties draw:fill="gradient" draw:fill-gradient-name="a23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2">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5">
      <style:drawing-page-properties draw:fill="gradient" draw:fill-gradient-name="a34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paragraph" style:name="a560">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
      <style:drawing-page-properties draw:fill="gradient" draw:fill-gradient-name="a13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0">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569">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38">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4">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118in" fo:padding-bottom="0.05118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72">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42">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57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draw:fill="none" draw:stroke="non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0">
      <style:drawing-page-properties draw:fill="gradient" draw:fill-gradient-name="a4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5">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581">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3">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7">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6">
      <style:drawing-page-properties draw:fill="gradient" draw:fill-gradient-name="a37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118in" fo:padding-bottom="0.05118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118in" fo:padding-bottom="0.05118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draw:fill="none" draw:stroke="non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5">
      <style:drawing-page-properties draw:fill="gradient" draw:fill-gradient-name="a1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6">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299">
      <style:graphic-properties draw:fill="none" draw:stroke="non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5">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
      <style:drawing-page-properties draw:fill="gradient" draw:fill-gradient-name="a5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118in" fo:padding-bottom="0.05118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01">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56">
      <style:paragraph-properties fo:line-height="100%" fo:text-align="center" style:tab-stop-distance="1in" fo:margin-left="0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508">
      <style:graphic-properties draw:fill="none" draw:stroke="non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40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407">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graphic" style:name="a69">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graphic" style:name="a410">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drawing-page" style:name="a3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AvantGarde"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draw:fill="none" draw:stroke="non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gradient" draw:fill-gradient-name="a5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1">
      <draw:frame draw:id="id0" presentation:style-name="a4" draw:name="Espace réservé du titre 1" svg:x="0.75in" svg:y="0.66614in" svg:width="8.5in" svg:height="1.25in" presentation:class="title" presentation:placeholder="false">
        <draw:text-box>
          <text:p text:style-name="a3" text:class-names="" text:cond-style-name=""><text:span text:style-name="a2" text:class-names=""/></text:p>
        </draw:text-box>
        <svg:title/>
        <svg:desc/>
      </draw:frame>
      <draw:frame draw:id="id1" presentation:style-name="a20" draw:name="Espace réservé du texte 2" svg:x="0.75in" svg:y="2.16654in" svg:width="8.5in" svg:height="4.5in" presentation:class="outline" presentation:placeholder="false">
        <draw:text-box>
          <text:list text:style-name="a7">
            <text:list-item>
              <text:p text:style-name="a6" text:class-names="" text:cond-style-name=""><text:span text:style-name="a5" text:class-names="">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75in" svg:y="6.83346in" svg:width="2.08346in" svg:height="0.5in" presentation:class="date-time" presentation:placeholder="false">
        <draw:text-box>
          <text:p text:style-name="a22" text:class-names="" text:cond-style-name=""><text:span text:style-name="a21" text:class-names=""/></text:p>
        </draw:text-box>
        <svg:title/>
        <svg:desc/>
      </draw:frame>
      <draw:frame draw:id="id3" presentation:style-name="a26" draw:name="Espace réservé du pied de page 4" svg:x="3.41653in" svg:y="6.83346in" svg:width="3.16693in" svg:height="0.5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7.16654in" svg:y="6.83346in" svg:width="2.08346in" svg:height="0.5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9">
        <draw:custom-shape svg:x="0in" svg:y="0in" svg:width="7.37402in" svg:height="10.79134in" draw:id="id5" draw:style-name="a32" draw:name="Rectangle 1">
          <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draw:frame draw:id="id6" presentation:style-name="a35" draw:name="Espace réservé de l'en-tête 2" svg:x="-0.00039in" svg:y="0in" svg:width="3.16653in" svg:height="0.5in" presentation:class="header" presentation:placeholder="false">
          <draw:text-box>
            <text:p text:style-name="a34" text:class-names="" text:cond-style-name=""><text:span text:style-name="a33" text:class-names=""/></text:p>
          </draw:text-box>
          <svg:title/>
          <svg:desc/>
        </draw:frame>
        <draw:frame draw:id="id7" presentation:style-name="a38" draw:name="Espace réservé de la date 3" svg:x="4.16654in" svg:y="0in" svg:width="3.16693in" svg:height="0.5in" presentation:class="date-time" presentation:placeholder="false">
          <draw:text-box>
            <text:p text:style-name="a37" text:class-names="" text:cond-style-name=""><text:span text:style-name="a36" text:class-names=""/></text:p>
          </draw:text-box>
          <svg:title/>
          <svg:desc/>
        </draw:frame>
        <draw:page-thumbnail svg:x="1.04134in" svg:y="0.83346in" svg:width="5.33346in" svg:height="4in" presentation:class="page" draw:id="id8" presentation:style-name="a39" draw:name="Espace réservé de l'image des diapositives 4">
          <svg:title/>
          <svg:desc/>
        </draw:page-thumbnail>
        <draw:frame draw:id="id9" presentation:style-name="a42" draw:name="Espace réservé des notes 5" svg:x="1in" svg:y="5.16614in" svg:width="5.41654in" svg:height="4.83346in" presentation:class="notes" presentation:placeholder="false">
          <draw:text-box>
            <text:p text:style-name="a41" text:class-names="" text:cond-style-name=""><text:span text:style-name="a40" text:class-names=""/></text:p>
          </draw:text-box>
          <svg:title/>
          <svg:desc/>
        </draw:frame>
        <draw:frame draw:id="id10" presentation:style-name="a45" draw:name="Espace réservé du pied de page 6" svg:x="-0.00039in" svg:y="10.25in" svg:width="3.16653in" svg:height="0.5in" presentation:class="footer" presentation:placeholder="false">
          <draw:text-box>
            <text:p text:style-name="a44" text:class-names="" text:cond-style-name=""><text:span text:style-name="a43" text:class-names=""/></text:p>
          </draw:text-box>
          <svg:title/>
          <svg:desc/>
        </draw:frame>
        <draw:frame draw:id="id11" presentation:style-name="a48" draw:name="Espace réservé du numéro de diapositive 7" svg:x="4.16654in" svg:y="10.25in" svg:width="3.16693in" svg:height="0.5in" presentation:class="page-number" presentation:placeholder="false">
          <draw:text-box>
            <text:p text:style-name="a47" text:class-names="" text:cond-style-name=""><text:span text:style-name="a46" text:class-names=""><text:page-number style:num-format="1" text:fixed="false"/></text:span></text:p>
          </draw:text-box>
          <svg:title/>
          <svg:desc/>
        </draw:frame>
      </presentation:notes>
    </style:master-page>
    <style:master-page style:name="Master1-Layout1-title-Diapositive-de-titre" style:page-layout-name="pageLayout1" draw:style-name="a51">
      <draw:frame draw:id="id12" presentation:style-name="a54" draw:name="Titre 1" svg:x="1.25in" svg:y="1.22743in" svg:width="7.5in" svg:height="2.61111in" presentation:class="title" presentation:placeholder="false">
        <draw:text-box>
          <text:p text:style-name="a53" text:class-names="" text:cond-style-name=""><text:span text:style-name="a52" text:class-names="">Modifiez le style du titre</text:span></text:p>
        </draw:text-box>
        <svg:title/>
        <svg:desc/>
      </draw:frame>
      <draw:frame draw:id="id13" presentation:style-name="a57" draw:name="Sous-titre 2" svg:x="1.25in" svg:y="3.93924in" svg:width="7.5in" svg:height="1.81076in" presentation:class="subtitle" presentation:placeholder="false">
        <draw:text-box>
          <text:p text:style-name="a56" text:class-names="" text:cond-style-name=""><text:span text:style-name="a55" text:class-names="">Modifiez le style des sous-titres du masque</text:span></text:p>
        </draw:text-box>
        <svg:title/>
        <svg:desc/>
      </draw:frame>
      <draw:frame draw:id="id14" presentation:style-name="a60" draw:name="Espace réservé de la date 3" svg:x="0.75in" svg:y="6.83346in" svg:width="2.08346in" svg:height="0.5in" presentation:class="date-time" presentation:placeholder="false">
        <draw:text-box>
          <text:p text:style-name="a59" text:class-names="" text:cond-style-name=""><text:span text:style-name="a58" text:class-names=""/></text:p>
        </draw:text-box>
        <svg:title/>
        <svg:desc/>
      </draw:frame>
      <draw:frame draw:id="id15" presentation:style-name="a63" draw:name="Espace réservé du pied de page 4" svg:x="3.41653in" svg:y="6.83346in" svg:width="3.16693in" svg:height="0.5in" presentation:class="footer" presentation:placeholder="false">
        <draw:text-box>
          <text:p text:style-name="a62" text:class-names="" text:cond-style-name=""><text:span text:style-name="a61" text:class-names=""/></text:p>
        </draw:text-box>
        <svg:title/>
        <svg:desc/>
      </draw:frame>
      <draw:frame draw:id="id16" presentation:style-name="a66" draw:name="Espace réservé du numéro de diapositive 5" svg:x="7.16654in" svg:y="6.83346in" svg:width="2.08346in" svg:height="0.5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page-layout-name="pageLayout2" draw:style-name="a86">
        <draw:custom-shape svg:x="0in" svg:y="0in" svg:width="7.37402in" svg:height="10.79134in" draw:id="id5" draw:style-name="a69" draw:name="Rectangle 1">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frame draw:id="id6" presentation:style-name="a72" draw:name="Espace réservé de l'en-tête 2" svg:x="-0.00039in" svg:y="0in" svg:width="3.16653in" svg:height="0.5in" presentation:class="header" presentation:placeholder="false">
          <draw:text-box>
            <text:p text:style-name="a71" text:class-names="" text:cond-style-name=""><text:span text:style-name="a70" text:class-names=""/></text:p>
          </draw:text-box>
          <svg:title/>
          <svg:desc/>
        </draw:frame>
        <draw:frame draw:id="id7" presentation:style-name="a75" draw:name="Espace réservé de la date 3" svg:x="4.16654in" svg:y="0in" svg:width="3.16693in" svg:height="0.5in" presentation:class="date-time" presentation:placeholder="false">
          <draw:text-box>
            <text:p text:style-name="a74" text:class-names="" text:cond-style-name=""><text:span text:style-name="a73" text:class-names=""/></text:p>
          </draw:text-box>
          <svg:title/>
          <svg:desc/>
        </draw:frame>
        <draw:page-thumbnail svg:x="1.04134in" svg:y="0.83346in" svg:width="5.33346in" svg:height="4in" presentation:class="page" draw:id="id8" presentation:style-name="a76" draw:name="Espace réservé de l'image des diapositives 4">
          <svg:title/>
          <svg:desc/>
        </draw:page-thumbnail>
        <draw:frame draw:id="id9" presentation:style-name="a79" draw:name="Espace réservé des notes 5" svg:x="1in" svg:y="5.16614in" svg:width="5.41654in" svg:height="4.83346in" presentation:class="notes" presentation:placeholder="false">
          <draw:text-box>
            <text:p text:style-name="a78" text:class-names="" text:cond-style-name=""><text:span text:style-name="a77" text:class-names=""/></text:p>
          </draw:text-box>
          <svg:title/>
          <svg:desc/>
        </draw:frame>
        <draw:frame draw:id="id10" presentation:style-name="a82" draw:name="Espace réservé du pied de page 6" svg:x="-0.00039in" svg:y="10.25in" svg:width="3.16653in" svg:height="0.5in" presentation:class="footer" presentation:placeholder="false">
          <draw:text-box>
            <text:p text:style-name="a81" text:class-names="" text:cond-style-name=""><text:span text:style-name="a80" text:class-names=""/></text:p>
          </draw:text-box>
          <svg:title/>
          <svg:desc/>
        </draw:frame>
        <draw:frame draw:id="id11" presentation:style-name="a85" draw:name="Espace réservé du numéro de diapositive 7" svg:x="4.16654in" svg:y="10.25in" svg:width="3.16693in" svg:height="0.5in" presentation:class="page-number" presentation:placeholder="false">
          <draw:text-box>
            <text:p text:style-name="a84" text:class-names="" text:cond-style-name=""><text:span text:style-name="a83" text:class-names=""><text:page-number style:num-format="1" text:fixed="false"/></text:span></text:p>
          </draw:text-box>
          <svg:title/>
          <svg:desc/>
        </draw:frame>
      </presentation:notes>
    </style:master-page>
    <style:master-page style:name="Master1-Layout2-obj-Titre-et-contenu" style:page-layout-name="pageLayout1" draw:style-name="a88">
      <draw:frame draw:id="id17" presentation:style-name="a91" draw:name="Titre 1" svg:x="0.75in" svg:y="0.66614in" svg:width="8.5in" svg:height="1.25in" presentation:class="title" presentation:placeholder="false">
        <draw:text-box>
          <text:p text:style-name="a90" text:class-names="" text:cond-style-name=""><text:span text:style-name="a89" text:class-names="">Modifiez le style du titre</text:span></text:p>
        </draw:text-box>
        <svg:title/>
        <svg:desc/>
      </draw:frame>
      <draw:frame draw:id="id18" presentation:style-name="a106" draw:name="Espace réservé du contenu 2" svg:x="0.75in" svg:y="2.16654in" svg:width="8.5in" svg:height="4.5in" presentation:class="object" presentation:placeholder="false">
        <draw:text-box>
          <text:p text:style-name="a93" text:class-names="" text:cond-style-name=""><text:span text:style-name="a92" text:class-names="">Modifier les styles du texte du masque</text:span></text:p>
          <text:list text:style-name="a96">
            <text:list-item>
              <text:list text:style-name="a96">
                <text:list-item>
                  <text:p text:style-name="a95" text:class-names="" text:cond-style-name=""><text:span text:style-name="a94" text:class-names="">Deuxième niveau</text:span></text:p>
                </text:list-item>
              </text:list>
            </text:list-item>
          </text:list>
          <text:list text:style-name="a99">
            <text:list-item>
              <text:list text:style-name="a99">
                <text:list-item>
                  <text:list text:style-name="a99">
                    <text:list-item>
                      <text:p text:style-name="a98" text:class-names="" text:cond-style-name=""><text:span text:style-name="a97" text:class-names="">Troisième niveau</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Quatrième niveau</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Cinquième niveau</text:span></text:p>
                            </text:list-item>
                          </text:list>
                        </text:list-item>
                      </text:list>
                    </text:list-item>
                  </text:list>
                </text:list-item>
              </text:list>
            </text:list-item>
          </text:list>
        </draw:text-box>
        <svg:title/>
        <svg:desc/>
      </draw:frame>
      <draw:frame draw:id="id19" presentation:style-name="a109" draw:name="Espace réservé de la date 3" svg:x="0.75in" svg:y="6.83346in" svg:width="2.08346in" svg:height="0.5in" presentation:class="date-time" presentation:placeholder="false">
        <draw:text-box>
          <text:p text:style-name="a108" text:class-names="" text:cond-style-name=""><text:span text:style-name="a107" text:class-names=""/></text:p>
        </draw:text-box>
        <svg:title/>
        <svg:desc/>
      </draw:frame>
      <draw:frame draw:id="id20" presentation:style-name="a112" draw:name="Espace réservé du pied de page 4" svg:x="3.41653in" svg:y="6.83346in" svg:width="3.16693in" svg:height="0.5in" presentation:class="footer" presentation:placeholder="false">
        <draw:text-box>
          <text:p text:style-name="a111" text:class-names="" text:cond-style-name=""><text:span text:style-name="a110" text:class-names=""/></text:p>
        </draw:text-box>
        <svg:title/>
        <svg:desc/>
      </draw:frame>
      <draw:frame draw:id="id21" presentation:style-name="a115" draw:name="Espace réservé du numéro de diapositive 5" svg:x="7.16654in" svg:y="6.83346in" svg:width="2.08346in" svg:height="0.5in" presentation:class="page-number" presentation:placeholder="false">
        <draw:text-box>
          <text:p text:style-name="a114" text:class-names="" text:cond-style-name=""><text:span text:style-name="a113" text:class-names=""><text:page-number style:num-format="1" text:fixed="false"/></text:span></text:p>
        </draw:text-box>
        <svg:title/>
        <svg:desc/>
      </draw:frame>
      <presentation:notes style:page-layout-name="pageLayout2" draw:style-name="a135">
        <draw:custom-shape svg:x="0in" svg:y="0in" svg:width="7.37402in" svg:height="10.79134in" draw:id="id5" draw:style-name="a118" draw:name="Rectangle 1">
          <svg:title/>
          <svg:desc/>
          <text:p text:style-name="a117" text:class-names="" text:cond-style-name=""><text:span text:style-name="a116" text:class-names=""/></text:p>
          <draw:enhanced-geometry xmlns:dr3d="urn:oasis:names:tc:opendocument:xmlns:dr3d:1.0" draw:type="non-primitive" svg:viewBox="0 0 21600 21600" draw:enhanced-path="M 0 0 L 21600 0 21600 21600 0 21600 Z N"/>
        </draw:custom-shape>
        <draw:frame draw:id="id6" presentation:style-name="a121" draw:name="Espace réservé de l'en-tête 2" svg:x="-0.00039in" svg:y="0in" svg:width="3.16653in" svg:height="0.5in" presentation:class="header" presentation:placeholder="false">
          <draw:text-box>
            <text:p text:style-name="a120" text:class-names="" text:cond-style-name=""><text:span text:style-name="a119" text:class-names=""/></text:p>
          </draw:text-box>
          <svg:title/>
          <svg:desc/>
        </draw:frame>
        <draw:frame draw:id="id7" presentation:style-name="a124" draw:name="Espace réservé de la date 3" svg:x="4.16654in" svg:y="0in" svg:width="3.16693in" svg:height="0.5in" presentation:class="date-time" presentation:placeholder="false">
          <draw:text-box>
            <text:p text:style-name="a123" text:class-names="" text:cond-style-name=""><text:span text:style-name="a122" text:class-names=""/></text:p>
          </draw:text-box>
          <svg:title/>
          <svg:desc/>
        </draw:frame>
        <draw:page-thumbnail svg:x="1.04134in" svg:y="0.83346in" svg:width="5.33346in" svg:height="4in" presentation:class="page" draw:id="id8" presentation:style-name="a125" draw:name="Espace réservé de l'image des diapositives 4">
          <svg:title/>
          <svg:desc/>
        </draw:page-thumbnail>
        <draw:frame draw:id="id9" presentation:style-name="a128" draw:name="Espace réservé des notes 5" svg:x="1in" svg:y="5.16614in" svg:width="5.41654in" svg:height="4.83346in" presentation:class="notes" presentation:placeholder="false">
          <draw:text-box>
            <text:p text:style-name="a127" text:class-names="" text:cond-style-name=""><text:span text:style-name="a126" text:class-names=""/></text:p>
          </draw:text-box>
          <svg:title/>
          <svg:desc/>
        </draw:frame>
        <draw:frame draw:id="id10" presentation:style-name="a131" draw:name="Espace réservé du pied de page 6" svg:x="-0.00039in" svg:y="10.25in" svg:width="3.16653in" svg:height="0.5in" presentation:class="footer" presentation:placeholder="false">
          <draw:text-box>
            <text:p text:style-name="a130" text:class-names="" text:cond-style-name=""><text:span text:style-name="a129" text:class-names=""/></text:p>
          </draw:text-box>
          <svg:title/>
          <svg:desc/>
        </draw:frame>
        <draw:frame draw:id="id11" presentation:style-name="a134" draw:name="Espace réservé du numéro de diapositive 7" svg:x="4.16654in" svg:y="10.25in" svg:width="3.16693in" svg:height="0.5in" presentation:class="page-number" presentation:placeholder="false">
          <draw:text-box>
            <text:p text:style-name="a133" text:class-names="" text:cond-style-name=""><text:span text:style-name="a132" text:class-names=""><text:page-number style:num-format="1" text:fixed="false"/></text:span></text:p>
          </draw:text-box>
          <svg:title/>
          <svg:desc/>
        </draw:frame>
      </presentation:notes>
    </style:master-page>
    <style:master-page style:name="Master1-Layout3-secHead-Titre-de-section" style:page-layout-name="pageLayout1" draw:style-name="a137">
      <draw:frame draw:id="id22" presentation:style-name="a140" draw:name="Titre 1" svg:x="0.68229in" svg:y="1.86979in" svg:width="8.625in" svg:height="3.11979in" presentation:class="title" presentation:placeholder="false">
        <draw:text-box>
          <text:p text:style-name="a139" text:class-names="" text:cond-style-name=""><text:span text:style-name="a138" text:class-names="">Modifiez le style du titre</text:span></text:p>
        </draw:text-box>
        <svg:title/>
        <svg:desc/>
      </draw:frame>
      <draw:frame draw:id="id23" presentation:style-name="a144" draw:name="Espace réservé du texte 2" svg:x="0.68229in" svg:y="5.0191in" svg:width="8.625in" svg:height="1.64062in" presentation:class="outline" presentation:placeholder="false">
        <draw:text-box>
          <text:list text:style-name="a143">
            <text:list-item>
              <text:p text:style-name="a142" text:class-names="" text:cond-style-name=""><text:span text:style-name="a141" text:class-names="">Modifier les styles du texte du masque</text:span></text:p>
            </text:list-item>
          </text:list>
        </draw:text-box>
        <svg:title/>
        <svg:desc/>
      </draw:frame>
      <draw:frame draw:id="id24" presentation:style-name="a147" draw:name="Espace réservé de la date 3" svg:x="0.75in" svg:y="6.83346in" svg:width="2.08346in" svg:height="0.5in" presentation:class="date-time" presentation:placeholder="false">
        <draw:text-box>
          <text:p text:style-name="a146" text:class-names="" text:cond-style-name=""><text:span text:style-name="a145" text:class-names=""/></text:p>
        </draw:text-box>
        <svg:title/>
        <svg:desc/>
      </draw:frame>
      <draw:frame draw:id="id25" presentation:style-name="a150" draw:name="Espace réservé du pied de page 4" svg:x="3.41653in" svg:y="6.83346in" svg:width="3.16693in" svg:height="0.5in" presentation:class="footer" presentation:placeholder="false">
        <draw:text-box>
          <text:p text:style-name="a149" text:class-names="" text:cond-style-name=""><text:span text:style-name="a148" text:class-names=""/></text:p>
        </draw:text-box>
        <svg:title/>
        <svg:desc/>
      </draw:frame>
      <draw:frame draw:id="id26" presentation:style-name="a153" draw:name="Espace réservé du numéro de diapositive 5" svg:x="7.16654in" svg:y="6.83346in" svg:width="2.08346in" svg:height="0.5in" presentation:class="page-number" presentation:placeholder="false">
        <draw:text-box>
          <text:p text:style-name="a152" text:class-names="" text:cond-style-name=""><text:span text:style-name="a151" text:class-names=""><text:page-number style:num-format="1" text:fixed="false"/></text:span></text:p>
        </draw:text-box>
        <svg:title/>
        <svg:desc/>
      </draw:frame>
      <presentation:notes style:page-layout-name="pageLayout2" draw:style-name="a173">
        <draw:custom-shape svg:x="0in" svg:y="0in" svg:width="7.37402in" svg:height="10.79134in" draw:id="id5" draw:style-name="a156" draw:name="Rectangle 1">
          <svg:title/>
          <svg:desc/>
          <text:p text:style-name="a155" text:class-names="" text:cond-style-name=""><text:span text:style-name="a154" text:class-names=""/></text:p>
          <draw:enhanced-geometry xmlns:dr3d="urn:oasis:names:tc:opendocument:xmlns:dr3d:1.0" draw:type="non-primitive" svg:viewBox="0 0 21600 21600" draw:enhanced-path="M 0 0 L 21600 0 21600 21600 0 21600 Z N"/>
        </draw:custom-shape>
        <draw:frame draw:id="id6" presentation:style-name="a159" draw:name="Espace réservé de l'en-tête 2" svg:x="-0.00039in" svg:y="0in" svg:width="3.16653in" svg:height="0.5in" presentation:class="header" presentation:placeholder="false">
          <draw:text-box>
            <text:p text:style-name="a158" text:class-names="" text:cond-style-name=""><text:span text:style-name="a157" text:class-names=""/></text:p>
          </draw:text-box>
          <svg:title/>
          <svg:desc/>
        </draw:frame>
        <draw:frame draw:id="id7" presentation:style-name="a162" draw:name="Espace réservé de la date 3" svg:x="4.16654in" svg:y="0in" svg:width="3.16693in" svg:height="0.5in" presentation:class="date-time" presentation:placeholder="false">
          <draw:text-box>
            <text:p text:style-name="a161" text:class-names="" text:cond-style-name=""><text:span text:style-name="a160" text:class-names=""/></text:p>
          </draw:text-box>
          <svg:title/>
          <svg:desc/>
        </draw:frame>
        <draw:page-thumbnail svg:x="1.04134in" svg:y="0.83346in" svg:width="5.33346in" svg:height="4in" presentation:class="page" draw:id="id8" presentation:style-name="a163" draw:name="Espace réservé de l'image des diapositives 4">
          <svg:title/>
          <svg:desc/>
        </draw:page-thumbnail>
        <draw:frame draw:id="id9" presentation:style-name="a166" draw:name="Espace réservé des notes 5" svg:x="1in" svg:y="5.16614in" svg:width="5.41654in" svg:height="4.83346in" presentation:class="notes" presentation:placeholder="false">
          <draw:text-box>
            <text:p text:style-name="a165" text:class-names="" text:cond-style-name=""><text:span text:style-name="a164" text:class-names=""/></text:p>
          </draw:text-box>
          <svg:title/>
          <svg:desc/>
        </draw:frame>
        <draw:frame draw:id="id10" presentation:style-name="a169" draw:name="Espace réservé du pied de page 6" svg:x="-0.00039in" svg:y="10.25in" svg:width="3.16653in" svg:height="0.5in" presentation:class="footer" presentation:placeholder="false">
          <draw:text-box>
            <text:p text:style-name="a168" text:class-names="" text:cond-style-name=""><text:span text:style-name="a167" text:class-names=""/></text:p>
          </draw:text-box>
          <svg:title/>
          <svg:desc/>
        </draw:frame>
        <draw:frame draw:id="id11" presentation:style-name="a172" draw:name="Espace réservé du numéro de diapositive 7" svg:x="4.16654in" svg:y="10.25in" svg:width="3.16693in" svg:height="0.5in" presentation:class="page-number" presentation:placeholder="false">
          <draw:text-box>
            <text:p text:style-name="a171" text:class-names="" text:cond-style-name=""><text:span text:style-name="a170" text:class-names=""><text:page-number style:num-format="1" text:fixed="false"/></text:span></text:p>
          </draw:text-box>
          <svg:title/>
          <svg:desc/>
        </draw:frame>
      </presentation:notes>
    </style:master-page>
    <style:master-page style:name="Master1-Layout4-twoObj-Deux-contenus" style:page-layout-name="pageLayout1" draw:style-name="a175">
      <draw:frame draw:id="id27" presentation:style-name="a178" draw:name="Titre 1" svg:x="0.75in" svg:y="0.66614in" svg:width="8.5in" svg:height="1.25in" presentation:class="title" presentation:placeholder="false">
        <draw:text-box>
          <text:p text:style-name="a177" text:class-names="" text:cond-style-name=""><text:span text:style-name="a176" text:class-names="">Modifiez le style du titre</text:span></text:p>
        </draw:text-box>
        <svg:title/>
        <svg:desc/>
      </draw:frame>
      <draw:frame draw:id="id28" presentation:style-name="a193" draw:name="Espace réservé du contenu 2" svg:x="0.75in" svg:y="2.16667in" svg:width="4.16667in" svg:height="4.5in" presentation:class="object" presentation:placeholder="false">
        <draw:text-box>
          <text:p text:style-name="a180" text:class-names="" text:cond-style-name=""><text:span text:style-name="a179" text:class-names="">Modifier les styles du texte du masque</text:span></text:p>
          <text:list text:style-name="a183">
            <text:list-item>
              <text:list text:style-name="a183">
                <text:list-item>
                  <text:p text:style-name="a182" text:class-names="" text:cond-style-name=""><text:span text:style-name="a181" text:class-names="">Deuxième niveau</text:span></text:p>
                </text:list-item>
              </text:list>
            </text:list-item>
          </text:list>
          <text:list text:style-name="a186">
            <text:list-item>
              <text:list text:style-name="a186">
                <text:list-item>
                  <text:list text:style-name="a186">
                    <text:list-item>
                      <text:p text:style-name="a185" text:class-names="" text:cond-style-name=""><text:span text:style-name="a184" text:class-names="">Troisième niveau</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Quatrième niveau</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90" text:class-names="">Cinquième niveau</text:span></text:p>
                            </text:list-item>
                          </text:list>
                        </text:list-item>
                      </text:list>
                    </text:list-item>
                  </text:list>
                </text:list-item>
              </text:list>
            </text:list-item>
          </text:list>
        </draw:text-box>
        <svg:title/>
        <svg:desc/>
      </draw:frame>
      <draw:frame draw:id="id29" presentation:style-name="a208" draw:name="Espace réservé du contenu 3" svg:x="5.08333in" svg:y="2.16667in" svg:width="4.16667in" svg:height="4.5in" presentation:class="object" presentation:placeholder="false">
        <draw:text-box>
          <text:p text:style-name="a195" text:class-names="" text:cond-style-name=""><text:span text:style-name="a194" text:class-names="">Modifier les styles du texte du masque</text:span></text:p>
          <text:list text:style-name="a198">
            <text:list-item>
              <text:list text:style-name="a198">
                <text:list-item>
                  <text:p text:style-name="a197" text:class-names="" text:cond-style-name=""><text:span text:style-name="a196" text:class-names="">Deuxième niveau</text:span></text:p>
                </text:list-item>
              </text:list>
            </text:list-item>
          </text:list>
          <text:list text:style-name="a201">
            <text:list-item>
              <text:list text:style-name="a201">
                <text:list-item>
                  <text:list text:style-name="a201">
                    <text:list-item>
                      <text:p text:style-name="a200" text:class-names="" text:cond-style-name=""><text:span text:style-name="a199" text:class-names="">Troisième niveau</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Quatrième niveau</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5" text:class-names="">Cinquième niveau</text:span></text:p>
                            </text:list-item>
                          </text:list>
                        </text:list-item>
                      </text:list>
                    </text:list-item>
                  </text:list>
                </text:list-item>
              </text:list>
            </text:list-item>
          </text:list>
        </draw:text-box>
        <svg:title/>
        <svg:desc/>
      </draw:frame>
      <draw:frame draw:id="id30" presentation:style-name="a211" draw:name="Espace réservé de la date 4" svg:x="0.75in" svg:y="6.83346in" svg:width="2.08346in" svg:height="0.5in" presentation:class="date-time" presentation:placeholder="false">
        <draw:text-box>
          <text:p text:style-name="a210" text:class-names="" text:cond-style-name=""><text:span text:style-name="a209" text:class-names=""/></text:p>
        </draw:text-box>
        <svg:title/>
        <svg:desc/>
      </draw:frame>
      <draw:frame draw:id="id31" presentation:style-name="a214" draw:name="Espace réservé du pied de page 5" svg:x="3.41653in" svg:y="6.83346in" svg:width="3.16693in" svg:height="0.5in" presentation:class="footer" presentation:placeholder="false">
        <draw:text-box>
          <text:p text:style-name="a213" text:class-names="" text:cond-style-name=""><text:span text:style-name="a212" text:class-names=""/></text:p>
        </draw:text-box>
        <svg:title/>
        <svg:desc/>
      </draw:frame>
      <draw:frame draw:id="id32" presentation:style-name="a217" draw:name="Espace réservé du numéro de diapositive 6" svg:x="7.16654in" svg:y="6.83346in" svg:width="2.08346in" svg:height="0.5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page-layout-name="pageLayout2" draw:style-name="a237">
        <draw:custom-shape svg:x="0in" svg:y="0in" svg:width="7.37402in" svg:height="10.79134in" draw:id="id5" draw:style-name="a220" draw:name="Rectangle 1">
          <svg:title/>
          <svg:desc/>
          <text:p text:style-name="a219" text:class-names="" text:cond-style-name=""><text:span text:style-name="a218" text:class-names=""/></text:p>
          <draw:enhanced-geometry xmlns:dr3d="urn:oasis:names:tc:opendocument:xmlns:dr3d:1.0" draw:type="non-primitive" svg:viewBox="0 0 21600 21600" draw:enhanced-path="M 0 0 L 21600 0 21600 21600 0 21600 Z N"/>
        </draw:custom-shape>
        <draw:frame draw:id="id6" presentation:style-name="a223" draw:name="Espace réservé de l'en-tête 2" svg:x="-0.00039in" svg:y="0in" svg:width="3.16653in" svg:height="0.5in" presentation:class="header" presentation:placeholder="false">
          <draw:text-box>
            <text:p text:style-name="a222" text:class-names="" text:cond-style-name=""><text:span text:style-name="a221" text:class-names=""/></text:p>
          </draw:text-box>
          <svg:title/>
          <svg:desc/>
        </draw:frame>
        <draw:frame draw:id="id7" presentation:style-name="a226" draw:name="Espace réservé de la date 3" svg:x="4.16654in" svg:y="0in" svg:width="3.16693in" svg:height="0.5in" presentation:class="date-time" presentation:placeholder="false">
          <draw:text-box>
            <text:p text:style-name="a225" text:class-names="" text:cond-style-name=""><text:span text:style-name="a224" text:class-names=""/></text:p>
          </draw:text-box>
          <svg:title/>
          <svg:desc/>
        </draw:frame>
        <draw:page-thumbnail svg:x="1.04134in" svg:y="0.83346in" svg:width="5.33346in" svg:height="4in" presentation:class="page" draw:id="id8" presentation:style-name="a227" draw:name="Espace réservé de l'image des diapositives 4">
          <svg:title/>
          <svg:desc/>
        </draw:page-thumbnail>
        <draw:frame draw:id="id9" presentation:style-name="a230" draw:name="Espace réservé des notes 5" svg:x="1in" svg:y="5.16614in" svg:width="5.41654in" svg:height="4.83346in" presentation:class="notes" presentation:placeholder="false">
          <draw:text-box>
            <text:p text:style-name="a229" text:class-names="" text:cond-style-name=""><text:span text:style-name="a228" text:class-names=""/></text:p>
          </draw:text-box>
          <svg:title/>
          <svg:desc/>
        </draw:frame>
        <draw:frame draw:id="id10" presentation:style-name="a233" draw:name="Espace réservé du pied de page 6" svg:x="-0.00039in" svg:y="10.25in" svg:width="3.16653in" svg:height="0.5in" presentation:class="footer" presentation:placeholder="false">
          <draw:text-box>
            <text:p text:style-name="a232" text:class-names="" text:cond-style-name=""><text:span text:style-name="a231" text:class-names=""/></text:p>
          </draw:text-box>
          <svg:title/>
          <svg:desc/>
        </draw:frame>
        <draw:frame draw:id="id11" presentation:style-name="a236" draw:name="Espace réservé du numéro de diapositive 7" svg:x="4.16654in" svg:y="10.25in" svg:width="3.16693in" svg:height="0.5in" presentation:class="page-number" presentation:placeholder="false">
          <draw:text-box>
            <text:p text:style-name="a235" text:class-names="" text:cond-style-name=""><text:span text:style-name="a234" text:class-names=""><text:page-number style:num-format="1" text:fixed="false"/></text:span></text:p>
          </draw:text-box>
          <svg:title/>
          <svg:desc/>
        </draw:frame>
      </presentation:notes>
    </style:master-page>
    <style:master-page style:name="Master1-Layout5-twoTxTwoObj-Comparaison" style:page-layout-name="pageLayout1" draw:style-name="a239">
      <draw:frame draw:id="id33" presentation:style-name="a242" draw:name="Titre 1" svg:x="0.68924in" svg:y="0.39931in" svg:width="8.625in" svg:height="1.44965in" presentation:class="title" presentation:placeholder="false">
        <draw:text-box>
          <text:p text:style-name="a241" text:class-names="" text:cond-style-name=""><text:span text:style-name="a240" text:class-names="">Modifiez le style du titre</text:span></text:p>
        </draw:text-box>
        <svg:title/>
        <svg:desc/>
      </draw:frame>
      <draw:frame draw:id="id34" presentation:style-name="a246" draw:name="Espace réservé du texte 2" svg:x="0.68924in" svg:y="1.83854in" svg:width="4.2309in" svg:height="0.90104in" presentation:class="outline" presentation:placeholder="false">
        <draw:text-box>
          <text:list text:style-name="a245">
            <text:list-item>
              <text:p text:style-name="a244" text:class-names="" text:cond-style-name=""><text:span text:style-name="a243" text:class-names="">Modifier les styles du texte du masque</text:span></text:p>
            </text:list-item>
          </text:list>
        </draw:text-box>
        <svg:title/>
        <svg:desc/>
      </draw:frame>
      <draw:frame draw:id="id35" presentation:style-name="a261" draw:name="Espace réservé du contenu 3" svg:x="0.68924in" svg:y="2.73958in" svg:width="4.2309in" svg:height="4.02951in" presentation:class="object" presentation:placeholder="false">
        <draw:text-box>
          <text:p text:style-name="a248" text:class-names="" text:cond-style-name=""><text:span text:style-name="a247" text:class-names="">Modifier les styles du texte du masque</text:span></text:p>
          <text:list text:style-name="a251">
            <text:list-item>
              <text:list text:style-name="a251">
                <text:list-item>
                  <text:p text:style-name="a250" text:class-names="" text:cond-style-name=""><text:span text:style-name="a249" text:class-names="">Deuxième niveau</text:span></text:p>
                </text:list-item>
              </text:list>
            </text:list-item>
          </text:list>
          <text:list text:style-name="a254">
            <text:list-item>
              <text:list text:style-name="a254">
                <text:list-item>
                  <text:list text:style-name="a254">
                    <text:list-item>
                      <text:p text:style-name="a253" text:class-names="" text:cond-style-name=""><text:span text:style-name="a252" text:class-names="">Troisième niveau</text:span></text:p>
                    </text:list-item>
                  </text:list>
                </text:list-item>
              </text:list>
            </text:list-item>
          </text:list>
          <text:list text:style-name="a257">
            <text:list-item>
              <text:list text:style-name="a257">
                <text:list-item>
                  <text:list text:style-name="a257">
                    <text:list-item>
                      <text:list text:style-name="a257">
                        <text:list-item>
                          <text:p text:style-name="a256" text:class-names="" text:cond-style-name=""><text:span text:style-name="a255" text:class-names="">Quatrième niveau</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8" text:class-names="">Cinquième niveau</text:span></text:p>
                            </text:list-item>
                          </text:list>
                        </text:list-item>
                      </text:list>
                    </text:list-item>
                  </text:list>
                </text:list-item>
              </text:list>
            </text:list-item>
          </text:list>
        </draw:text-box>
        <svg:title/>
        <svg:desc/>
      </draw:frame>
      <draw:frame draw:id="id36" presentation:style-name="a265" draw:name="Espace réservé du texte 4" svg:x="5.0625in" svg:y="1.83854in" svg:width="4.25174in" svg:height="0.90104in" presentation:class="outline" presentation:placeholder="false">
        <draw:text-box>
          <text:list text:style-name="a264">
            <text:list-item>
              <text:p text:style-name="a263" text:class-names="" text:cond-style-name=""><text:span text:style-name="a262" text:class-names="">Modifier les styles du texte du masque</text:span></text:p>
            </text:list-item>
          </text:list>
        </draw:text-box>
        <svg:title/>
        <svg:desc/>
      </draw:frame>
      <draw:frame draw:id="id37" presentation:style-name="a280" draw:name="Espace réservé du contenu 5" svg:x="5.0625in" svg:y="2.73958in" svg:width="4.25174in" svg:height="4.02951in" presentation:class="object" presentation:placeholder="false">
        <draw:text-box>
          <text:p text:style-name="a267" text:class-names="" text:cond-style-name=""><text:span text:style-name="a266" text:class-names="">Modifier les styles du texte du masque</text:span></text:p>
          <text:list text:style-name="a270">
            <text:list-item>
              <text:list text:style-name="a270">
                <text:list-item>
                  <text:p text:style-name="a269" text:class-names="" text:cond-style-name=""><text:span text:style-name="a268" text:class-names="">Deuxième niveau</text:span></text:p>
                </text:list-item>
              </text:list>
            </text:list-item>
          </text:list>
          <text:list text:style-name="a273">
            <text:list-item>
              <text:list text:style-name="a273">
                <text:list-item>
                  <text:list text:style-name="a273">
                    <text:list-item>
                      <text:p text:style-name="a272" text:class-names="" text:cond-style-name=""><text:span text:style-name="a271" text:class-names="">Troisième niveau</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Quatrième niveau</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7" text:class-names="">Cinquième niveau</text:span></text:p>
                            </text:list-item>
                          </text:list>
                        </text:list-item>
                      </text:list>
                    </text:list-item>
                  </text:list>
                </text:list-item>
              </text:list>
            </text:list-item>
          </text:list>
        </draw:text-box>
        <svg:title/>
        <svg:desc/>
      </draw:frame>
      <draw:frame draw:id="id38" presentation:style-name="a283" draw:name="Espace réservé de la date 6" svg:x="0.75in" svg:y="6.83346in" svg:width="2.08346in" svg:height="0.5in" presentation:class="date-time" presentation:placeholder="false">
        <draw:text-box>
          <text:p text:style-name="a282" text:class-names="" text:cond-style-name=""><text:span text:style-name="a281" text:class-names=""/></text:p>
        </draw:text-box>
        <svg:title/>
        <svg:desc/>
      </draw:frame>
      <draw:frame draw:id="id39" presentation:style-name="a286" draw:name="Espace réservé du pied de page 7" svg:x="3.41653in" svg:y="6.83346in" svg:width="3.16693in" svg:height="0.5in" presentation:class="footer" presentation:placeholder="false">
        <draw:text-box>
          <text:p text:style-name="a285" text:class-names="" text:cond-style-name=""><text:span text:style-name="a284" text:class-names=""/></text:p>
        </draw:text-box>
        <svg:title/>
        <svg:desc/>
      </draw:frame>
      <draw:frame draw:id="id40" presentation:style-name="a289" draw:name="Espace réservé du numéro de diapositive 8" svg:x="7.16654in" svg:y="6.83346in" svg:width="2.08346in" svg:height="0.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page-layout-name="pageLayout2" draw:style-name="a309">
        <draw:custom-shape svg:x="0in" svg:y="0in" svg:width="7.37402in" svg:height="10.79134in" draw:id="id5" draw:style-name="a292" draw:name="Rectangle 1">
          <svg:title/>
          <svg:desc/>
          <text:p text:style-name="a291" text:class-names="" text:cond-style-name=""><text:span text:style-name="a290" text:class-names=""/></text:p>
          <draw:enhanced-geometry xmlns:dr3d="urn:oasis:names:tc:opendocument:xmlns:dr3d:1.0" draw:type="non-primitive" svg:viewBox="0 0 21600 21600" draw:enhanced-path="M 0 0 L 21600 0 21600 21600 0 21600 Z N"/>
        </draw:custom-shape>
        <draw:frame draw:id="id6" presentation:style-name="a295" draw:name="Espace réservé de l'en-tête 2" svg:x="-0.00039in" svg:y="0in" svg:width="3.16653in" svg:height="0.5in" presentation:class="header" presentation:placeholder="false">
          <draw:text-box>
            <text:p text:style-name="a294" text:class-names="" text:cond-style-name=""><text:span text:style-name="a293" text:class-names=""/></text:p>
          </draw:text-box>
          <svg:title/>
          <svg:desc/>
        </draw:frame>
        <draw:frame draw:id="id7" presentation:style-name="a298" draw:name="Espace réservé de la date 3" svg:x="4.16654in" svg:y="0in" svg:width="3.16693in" svg:height="0.5in" presentation:class="date-time" presentation:placeholder="false">
          <draw:text-box>
            <text:p text:style-name="a297" text:class-names="" text:cond-style-name=""><text:span text:style-name="a296" text:class-names=""/></text:p>
          </draw:text-box>
          <svg:title/>
          <svg:desc/>
        </draw:frame>
        <draw:page-thumbnail svg:x="1.04134in" svg:y="0.83346in" svg:width="5.33346in" svg:height="4in" presentation:class="page" draw:id="id8" presentation:style-name="a299" draw:name="Espace réservé de l'image des diapositives 4">
          <svg:title/>
          <svg:desc/>
        </draw:page-thumbnail>
        <draw:frame draw:id="id9" presentation:style-name="a302" draw:name="Espace réservé des notes 5" svg:x="1in" svg:y="5.16614in" svg:width="5.41654in" svg:height="4.83346in" presentation:class="notes" presentation:placeholder="false">
          <draw:text-box>
            <text:p text:style-name="a301" text:class-names="" text:cond-style-name=""><text:span text:style-name="a300" text:class-names=""/></text:p>
          </draw:text-box>
          <svg:title/>
          <svg:desc/>
        </draw:frame>
        <draw:frame draw:id="id10" presentation:style-name="a305" draw:name="Espace réservé du pied de page 6" svg:x="-0.00039in" svg:y="10.25in" svg:width="3.16653in" svg:height="0.5in" presentation:class="footer" presentation:placeholder="false">
          <draw:text-box>
            <text:p text:style-name="a304" text:class-names="" text:cond-style-name=""><text:span text:style-name="a303" text:class-names=""/></text:p>
          </draw:text-box>
          <svg:title/>
          <svg:desc/>
        </draw:frame>
        <draw:frame draw:id="id11" presentation:style-name="a308" draw:name="Espace réservé du numéro de diapositive 7" svg:x="4.16654in" svg:y="10.25in" svg:width="3.16693in" svg:height="0.5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master-page>
    <style:master-page style:name="Master1-Layout6-titleOnly-Titre-seul" style:page-layout-name="pageLayout1" draw:style-name="a311">
      <draw:frame draw:id="id41" presentation:style-name="a314" draw:name="Titre 1" svg:x="0.75in" svg:y="0.66614in" svg:width="8.5in" svg:height="1.25in" presentation:class="title" presentation:placeholder="false">
        <draw:text-box>
          <text:p text:style-name="a313" text:class-names="" text:cond-style-name=""><text:span text:style-name="a312" text:class-names="">Modifiez le style du titre</text:span></text:p>
        </draw:text-box>
        <svg:title/>
        <svg:desc/>
      </draw:frame>
      <draw:frame draw:id="id42" presentation:style-name="a317" draw:name="Espace réservé de la date 2" svg:x="0.75in" svg:y="6.83346in" svg:width="2.08346in" svg:height="0.5in" presentation:class="date-time" presentation:placeholder="false">
        <draw:text-box>
          <text:p text:style-name="a316" text:class-names="" text:cond-style-name=""><text:span text:style-name="a315" text:class-names=""/></text:p>
        </draw:text-box>
        <svg:title/>
        <svg:desc/>
      </draw:frame>
      <draw:frame draw:id="id43" presentation:style-name="a320" draw:name="Espace réservé du pied de page 3" svg:x="3.41653in" svg:y="6.83346in" svg:width="3.16693in" svg:height="0.5in" presentation:class="footer" presentation:placeholder="false">
        <draw:text-box>
          <text:p text:style-name="a319" text:class-names="" text:cond-style-name=""><text:span text:style-name="a318" text:class-names=""/></text:p>
        </draw:text-box>
        <svg:title/>
        <svg:desc/>
      </draw:frame>
      <draw:frame draw:id="id44" presentation:style-name="a323" draw:name="Espace réservé du numéro de diapositive 4" svg:x="7.16654in" svg:y="6.83346in" svg:width="2.08346in" svg:height="0.5in" presentation:class="page-number" presentation:placeholder="false">
        <draw:text-box>
          <text:p text:style-name="a322" text:class-names="" text:cond-style-name=""><text:span text:style-name="a321" text:class-names=""><text:page-number style:num-format="1" text:fixed="false"/></text:span></text:p>
        </draw:text-box>
        <svg:title/>
        <svg:desc/>
      </draw:frame>
      <presentation:notes style:page-layout-name="pageLayout2" draw:style-name="a343">
        <draw:custom-shape svg:x="0in" svg:y="0in" svg:width="7.37402in" svg:height="10.79134in" draw:id="id5" draw:style-name="a326" draw:name="Rectangle 1">
          <svg:title/>
          <svg:desc/>
          <text:p text:style-name="a325" text:class-names="" text:cond-style-name=""><text:span text:style-name="a324" text:class-names=""/></text:p>
          <draw:enhanced-geometry xmlns:dr3d="urn:oasis:names:tc:opendocument:xmlns:dr3d:1.0" draw:type="non-primitive" svg:viewBox="0 0 21600 21600" draw:enhanced-path="M 0 0 L 21600 0 21600 21600 0 21600 Z N"/>
        </draw:custom-shape>
        <draw:frame draw:id="id6" presentation:style-name="a329" draw:name="Espace réservé de l'en-tête 2" svg:x="-0.00039in" svg:y="0in" svg:width="3.16653in" svg:height="0.5in" presentation:class="header" presentation:placeholder="false">
          <draw:text-box>
            <text:p text:style-name="a328" text:class-names="" text:cond-style-name=""><text:span text:style-name="a327" text:class-names=""/></text:p>
          </draw:text-box>
          <svg:title/>
          <svg:desc/>
        </draw:frame>
        <draw:frame draw:id="id7" presentation:style-name="a332" draw:name="Espace réservé de la date 3" svg:x="4.16654in" svg:y="0in" svg:width="3.16693in" svg:height="0.5in" presentation:class="date-time" presentation:placeholder="false">
          <draw:text-box>
            <text:p text:style-name="a331" text:class-names="" text:cond-style-name=""><text:span text:style-name="a330" text:class-names=""/></text:p>
          </draw:text-box>
          <svg:title/>
          <svg:desc/>
        </draw:frame>
        <draw:page-thumbnail svg:x="1.04134in" svg:y="0.83346in" svg:width="5.33346in" svg:height="4in" presentation:class="page" draw:id="id8" presentation:style-name="a333" draw:name="Espace réservé de l'image des diapositives 4">
          <svg:title/>
          <svg:desc/>
        </draw:page-thumbnail>
        <draw:frame draw:id="id9" presentation:style-name="a336" draw:name="Espace réservé des notes 5" svg:x="1in" svg:y="5.16614in" svg:width="5.41654in" svg:height="4.83346in" presentation:class="notes" presentation:placeholder="false">
          <draw:text-box>
            <text:p text:style-name="a335" text:class-names="" text:cond-style-name=""><text:span text:style-name="a334" text:class-names=""/></text:p>
          </draw:text-box>
          <svg:title/>
          <svg:desc/>
        </draw:frame>
        <draw:frame draw:id="id10" presentation:style-name="a339" draw:name="Espace réservé du pied de page 6" svg:x="-0.00039in" svg:y="10.25in" svg:width="3.16653in" svg:height="0.5in" presentation:class="footer" presentation:placeholder="false">
          <draw:text-box>
            <text:p text:style-name="a338" text:class-names="" text:cond-style-name=""><text:span text:style-name="a337" text:class-names=""/></text:p>
          </draw:text-box>
          <svg:title/>
          <svg:desc/>
        </draw:frame>
        <draw:frame draw:id="id11" presentation:style-name="a342" draw:name="Espace réservé du numéro de diapositive 7" svg:x="4.16654in" svg:y="10.25in" svg:width="3.16693in" svg:height="0.5in" presentation:class="page-number" presentation:placeholder="false">
          <draw:text-box>
            <text:p text:style-name="a341" text:class-names="" text:cond-style-name=""><text:span text:style-name="a340" text:class-names=""><text:page-number style:num-format="1" text:fixed="false"/></text:span></text:p>
          </draw:text-box>
          <svg:title/>
          <svg:desc/>
        </draw:frame>
      </presentation:notes>
    </style:master-page>
    <style:master-page style:name="Master1-Layout7-blank-Vide" style:page-layout-name="pageLayout1" draw:style-name="a345">
      <draw:frame draw:id="id45" presentation:style-name="a348" draw:name="Espace réservé de la date 1" svg:x="0.75in" svg:y="6.83346in" svg:width="2.08346in" svg:height="0.5in" presentation:class="date-time" presentation:placeholder="false">
        <draw:text-box>
          <text:p text:style-name="a347" text:class-names="" text:cond-style-name=""><text:span text:style-name="a346" text:class-names=""/></text:p>
        </draw:text-box>
        <svg:title/>
        <svg:desc/>
      </draw:frame>
      <draw:frame draw:id="id46" presentation:style-name="a351" draw:name="Espace réservé du pied de page 2" svg:x="3.41653in" svg:y="6.83346in" svg:width="3.16693in" svg:height="0.5in" presentation:class="footer" presentation:placeholder="false">
        <draw:text-box>
          <text:p text:style-name="a350" text:class-names="" text:cond-style-name=""><text:span text:style-name="a349" text:class-names=""/></text:p>
        </draw:text-box>
        <svg:title/>
        <svg:desc/>
      </draw:frame>
      <draw:frame draw:id="id47" presentation:style-name="a354" draw:name="Espace réservé du numéro de diapositive 3" svg:x="7.16654in" svg:y="6.83346in" svg:width="2.08346in" svg:height="0.5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page-layout-name="pageLayout2" draw:style-name="a374">
        <draw:custom-shape svg:x="0in" svg:y="0in" svg:width="7.37402in" svg:height="10.79134in" draw:id="id5" draw:style-name="a357" draw:name="Rectangle 1">
          <svg:title/>
          <svg:desc/>
          <text:p text:style-name="a356" text:class-names="" text:cond-style-name=""><text:span text:style-name="a355" text:class-names=""/></text:p>
          <draw:enhanced-geometry xmlns:dr3d="urn:oasis:names:tc:opendocument:xmlns:dr3d:1.0" draw:type="non-primitive" svg:viewBox="0 0 21600 21600" draw:enhanced-path="M 0 0 L 21600 0 21600 21600 0 21600 Z N"/>
        </draw:custom-shape>
        <draw:frame draw:id="id6" presentation:style-name="a360" draw:name="Espace réservé de l'en-tête 2" svg:x="-0.00039in" svg:y="0in" svg:width="3.16653in" svg:height="0.5in" presentation:class="header" presentation:placeholder="false">
          <draw:text-box>
            <text:p text:style-name="a359" text:class-names="" text:cond-style-name=""><text:span text:style-name="a358" text:class-names=""/></text:p>
          </draw:text-box>
          <svg:title/>
          <svg:desc/>
        </draw:frame>
        <draw:frame draw:id="id7" presentation:style-name="a363" draw:name="Espace réservé de la date 3" svg:x="4.16654in" svg:y="0in" svg:width="3.16693in" svg:height="0.5in" presentation:class="date-time" presentation:placeholder="false">
          <draw:text-box>
            <text:p text:style-name="a362" text:class-names="" text:cond-style-name=""><text:span text:style-name="a361" text:class-names=""/></text:p>
          </draw:text-box>
          <svg:title/>
          <svg:desc/>
        </draw:frame>
        <draw:page-thumbnail svg:x="1.04134in" svg:y="0.83346in" svg:width="5.33346in" svg:height="4in" presentation:class="page" draw:id="id8" presentation:style-name="a364" draw:name="Espace réservé de l'image des diapositives 4">
          <svg:title/>
          <svg:desc/>
        </draw:page-thumbnail>
        <draw:frame draw:id="id9" presentation:style-name="a367" draw:name="Espace réservé des notes 5" svg:x="1in" svg:y="5.16614in" svg:width="5.41654in" svg:height="4.83346in" presentation:class="notes" presentation:placeholder="false">
          <draw:text-box>
            <text:p text:style-name="a366" text:class-names="" text:cond-style-name=""><text:span text:style-name="a365" text:class-names=""/></text:p>
          </draw:text-box>
          <svg:title/>
          <svg:desc/>
        </draw:frame>
        <draw:frame draw:id="id10" presentation:style-name="a370" draw:name="Espace réservé du pied de page 6" svg:x="-0.00039in" svg:y="10.25in" svg:width="3.16653in" svg:height="0.5in" presentation:class="footer" presentation:placeholder="false">
          <draw:text-box>
            <text:p text:style-name="a369" text:class-names="" text:cond-style-name=""><text:span text:style-name="a368" text:class-names=""/></text:p>
          </draw:text-box>
          <svg:title/>
          <svg:desc/>
        </draw:frame>
        <draw:frame draw:id="id11" presentation:style-name="a373" draw:name="Espace réservé du numéro de diapositive 7" svg:x="4.16654in" svg:y="10.25in" svg:width="3.16693in" svg:height="0.5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8-objTx-Contenu-avec-légende" style:page-layout-name="pageLayout1" draw:style-name="a376">
      <draw:frame draw:id="id48" presentation:style-name="a379" draw:name="Titre 1" svg:x="0.68924in" svg:y="0.5in" svg:width="3.22569in" svg:height="1.75in" presentation:class="title" presentation:placeholder="false">
        <draw:text-box>
          <text:p text:style-name="a378" text:class-names="" text:cond-style-name=""><text:span text:style-name="a377" text:class-names="">Modifiez le style du titre</text:span></text:p>
        </draw:text-box>
        <svg:title/>
        <svg:desc/>
      </draw:frame>
      <draw:frame draw:id="id49" presentation:style-name="a394" draw:name="Espace réservé du contenu 2" svg:x="4.25174in" svg:y="1.07986in" svg:width="5.0625in" svg:height="5.32986in" presentation:class="object" presentation:placeholder="false">
        <draw:text-box>
          <text:p text:style-name="a381" text:class-names="" text:cond-style-name=""><text:span text:style-name="a380" text:class-names="">Modifier les styles du texte du masque</text:span></text:p>
          <text:list text:style-name="a384">
            <text:list-item>
              <text:list text:style-name="a384">
                <text:list-item>
                  <text:p text:style-name="a383" text:class-names="" text:cond-style-name=""><text:span text:style-name="a382" text:class-names="">Deuxième niveau</text:span></text:p>
                </text:list-item>
              </text:list>
            </text:list-item>
          </text:list>
          <text:list text:style-name="a387">
            <text:list-item>
              <text:list text:style-name="a387">
                <text:list-item>
                  <text:list text:style-name="a387">
                    <text:list-item>
                      <text:p text:style-name="a386" text:class-names="" text:cond-style-name=""><text:span text:style-name="a385" text:class-names="">Troisième niveau</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Quatrième niveau</text:span></text:p>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1" text:class-names="">Cinquième niveau</text:span></text:p>
                            </text:list-item>
                          </text:list>
                        </text:list-item>
                      </text:list>
                    </text:list-item>
                  </text:list>
                </text:list-item>
              </text:list>
            </text:list-item>
          </text:list>
        </draw:text-box>
        <svg:title/>
        <svg:desc/>
      </draw:frame>
      <draw:frame draw:id="id50" presentation:style-name="a398" draw:name="Espace réservé du texte 3" svg:x="0.68924in" svg:y="2.25in" svg:width="3.22569in" svg:height="4.1684in" presentation:class="outline" presentation:placeholder="false">
        <draw:text-box>
          <text:list text:style-name="a397">
            <text:list-item>
              <text:p text:style-name="a396" text:class-names="" text:cond-style-name=""><text:span text:style-name="a395" text:class-names="">Modifier les styles du texte du masque</text:span></text:p>
            </text:list-item>
          </text:list>
        </draw:text-box>
        <svg:title/>
        <svg:desc/>
      </draw:frame>
      <draw:frame draw:id="id51" presentation:style-name="a401" draw:name="Espace réservé de la date 4" svg:x="0.75in" svg:y="6.83346in" svg:width="2.08346in" svg:height="0.5in" presentation:class="date-time" presentation:placeholder="false">
        <draw:text-box>
          <text:p text:style-name="a400" text:class-names="" text:cond-style-name=""><text:span text:style-name="a399" text:class-names=""/></text:p>
        </draw:text-box>
        <svg:title/>
        <svg:desc/>
      </draw:frame>
      <draw:frame draw:id="id52" presentation:style-name="a404" draw:name="Espace réservé du pied de page 5" svg:x="3.41653in" svg:y="6.83346in" svg:width="3.16693in" svg:height="0.5in" presentation:class="footer" presentation:placeholder="false">
        <draw:text-box>
          <text:p text:style-name="a403" text:class-names="" text:cond-style-name=""><text:span text:style-name="a402" text:class-names=""/></text:p>
        </draw:text-box>
        <svg:title/>
        <svg:desc/>
      </draw:frame>
      <draw:frame draw:id="id53" presentation:style-name="a407" draw:name="Espace réservé du numéro de diapositive 6" svg:x="7.16654in" svg:y="6.83346in" svg:width="2.08346in" svg:height="0.5in" presentation:class="page-number" presentation:placeholder="false">
        <draw:text-box>
          <text:p text:style-name="a406" text:class-names="" text:cond-style-name=""><text:span text:style-name="a405" text:class-names=""><text:page-number style:num-format="1" text:fixed="false"/></text:span></text:p>
        </draw:text-box>
        <svg:title/>
        <svg:desc/>
      </draw:frame>
      <presentation:notes style:page-layout-name="pageLayout2" draw:style-name="a427">
        <draw:custom-shape svg:x="0in" svg:y="0in" svg:width="7.37402in" svg:height="10.79134in" draw:id="id5" draw:style-name="a410" draw:name="Rectangle 1">
          <svg:title/>
          <svg:desc/>
          <text:p text:style-name="a409" text:class-names="" text:cond-style-name=""><text:span text:style-name="a408" text:class-names=""/></text:p>
          <draw:enhanced-geometry xmlns:dr3d="urn:oasis:names:tc:opendocument:xmlns:dr3d:1.0" draw:type="non-primitive" svg:viewBox="0 0 21600 21600" draw:enhanced-path="M 0 0 L 21600 0 21600 21600 0 21600 Z N"/>
        </draw:custom-shape>
        <draw:frame draw:id="id6" presentation:style-name="a413" draw:name="Espace réservé de l'en-tête 2" svg:x="-0.00039in" svg:y="0in" svg:width="3.16653in" svg:height="0.5in" presentation:class="header" presentation:placeholder="false">
          <draw:text-box>
            <text:p text:style-name="a412" text:class-names="" text:cond-style-name=""><text:span text:style-name="a411" text:class-names=""/></text:p>
          </draw:text-box>
          <svg:title/>
          <svg:desc/>
        </draw:frame>
        <draw:frame draw:id="id7" presentation:style-name="a416" draw:name="Espace réservé de la date 3" svg:x="4.16654in" svg:y="0in" svg:width="3.16693in" svg:height="0.5in" presentation:class="date-time" presentation:placeholder="false">
          <draw:text-box>
            <text:p text:style-name="a415" text:class-names="" text:cond-style-name=""><text:span text:style-name="a414" text:class-names=""/></text:p>
          </draw:text-box>
          <svg:title/>
          <svg:desc/>
        </draw:frame>
        <draw:page-thumbnail svg:x="1.04134in" svg:y="0.83346in" svg:width="5.33346in" svg:height="4in" presentation:class="page" draw:id="id8" presentation:style-name="a417" draw:name="Espace réservé de l'image des diapositives 4">
          <svg:title/>
          <svg:desc/>
        </draw:page-thumbnail>
        <draw:frame draw:id="id9" presentation:style-name="a420" draw:name="Espace réservé des notes 5" svg:x="1in" svg:y="5.16614in" svg:width="5.41654in" svg:height="4.83346in" presentation:class="notes" presentation:placeholder="false">
          <draw:text-box>
            <text:p text:style-name="a419" text:class-names="" text:cond-style-name=""><text:span text:style-name="a418" text:class-names=""/></text:p>
          </draw:text-box>
          <svg:title/>
          <svg:desc/>
        </draw:frame>
        <draw:frame draw:id="id10" presentation:style-name="a423" draw:name="Espace réservé du pied de page 6" svg:x="-0.00039in" svg:y="10.25in" svg:width="3.16653in" svg:height="0.5in" presentation:class="footer" presentation:placeholder="false">
          <draw:text-box>
            <text:p text:style-name="a422" text:class-names="" text:cond-style-name=""><text:span text:style-name="a421" text:class-names=""/></text:p>
          </draw:text-box>
          <svg:title/>
          <svg:desc/>
        </draw:frame>
        <draw:frame draw:id="id11" presentation:style-name="a426" draw:name="Espace réservé du numéro de diapositive 7" svg:x="4.16654in" svg:y="10.25in" svg:width="3.16693in" svg:height="0.5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9-picTx-Image-avec-légende" style:page-layout-name="pageLayout1" draw:style-name="a429">
      <draw:frame draw:id="id54" presentation:style-name="a432" draw:name="Titre 1" svg:x="0.68924in" svg:y="0.5in" svg:width="3.22569in" svg:height="1.75in" presentation:class="title" presentation:placeholder="false">
        <draw:text-box>
          <text:p text:style-name="a431" text:class-names="" text:cond-style-name=""><text:span text:style-name="a430" text:class-names="">Modifiez le style du titre</text:span></text:p>
        </draw:text-box>
        <svg:title/>
        <svg:desc/>
      </draw:frame>
      <draw:frame draw:id="id55" presentation:style-name="a435" draw:name="Espace réservé pour une image  2" svg:x="4.25174in" svg:y="1.07986in" svg:width="5.0625in" svg:height="5.32986in" presentation:class="graphic" presentation:placeholder="false">
        <draw:text-box>
          <text:p text:style-name="a434" text:class-names="" text:cond-style-name=""><text:span text:style-name="a433" text:class-names=""/></text:p>
        </draw:text-box>
        <svg:title/>
        <svg:desc/>
      </draw:frame>
      <draw:frame draw:id="id56" presentation:style-name="a439" draw:name="Espace réservé du texte 3" svg:x="0.68924in" svg:y="2.25in" svg:width="3.22569in" svg:height="4.1684in" presentation:class="outline" presentation:placeholder="false">
        <draw:text-box>
          <text:list text:style-name="a438">
            <text:list-item>
              <text:p text:style-name="a437" text:class-names="" text:cond-style-name=""><text:span text:style-name="a436" text:class-names="">Modifier les styles du texte du masque</text:span></text:p>
            </text:list-item>
          </text:list>
        </draw:text-box>
        <svg:title/>
        <svg:desc/>
      </draw:frame>
      <draw:frame draw:id="id57" presentation:style-name="a442" draw:name="Espace réservé de la date 4" svg:x="0.75in" svg:y="6.83346in" svg:width="2.08346in" svg:height="0.5in" presentation:class="date-time" presentation:placeholder="false">
        <draw:text-box>
          <text:p text:style-name="a441" text:class-names="" text:cond-style-name=""><text:span text:style-name="a440" text:class-names=""/></text:p>
        </draw:text-box>
        <svg:title/>
        <svg:desc/>
      </draw:frame>
      <draw:frame draw:id="id58" presentation:style-name="a445" draw:name="Espace réservé du pied de page 5" svg:x="3.41653in" svg:y="6.83346in" svg:width="3.16693in" svg:height="0.5in" presentation:class="footer" presentation:placeholder="false">
        <draw:text-box>
          <text:p text:style-name="a444" text:class-names="" text:cond-style-name=""><text:span text:style-name="a443" text:class-names=""/></text:p>
        </draw:text-box>
        <svg:title/>
        <svg:desc/>
      </draw:frame>
      <draw:frame draw:id="id59" presentation:style-name="a448" draw:name="Espace réservé du numéro de diapositive 6" svg:x="7.16654in" svg:y="6.83346in" svg:width="2.08346in" svg:height="0.5in" presentation:class="page-number" presentation:placeholder="false">
        <draw:text-box>
          <text:p text:style-name="a447" text:class-names="" text:cond-style-name=""><text:span text:style-name="a446" text:class-names=""><text:page-number style:num-format="1" text:fixed="false"/></text:span></text:p>
        </draw:text-box>
        <svg:title/>
        <svg:desc/>
      </draw:frame>
      <presentation:notes style:page-layout-name="pageLayout2" draw:style-name="a468">
        <draw:custom-shape svg:x="0in" svg:y="0in" svg:width="7.37402in" svg:height="10.79134in" draw:id="id5" draw:style-name="a451" draw:name="Rectangle 1">
          <svg:title/>
          <svg:desc/>
          <text:p text:style-name="a450" text:class-names="" text:cond-style-name=""><text:span text:style-name="a449" text:class-names=""/></text:p>
          <draw:enhanced-geometry xmlns:dr3d="urn:oasis:names:tc:opendocument:xmlns:dr3d:1.0" draw:type="non-primitive" svg:viewBox="0 0 21600 21600" draw:enhanced-path="M 0 0 L 21600 0 21600 21600 0 21600 Z N"/>
        </draw:custom-shape>
        <draw:frame draw:id="id6" presentation:style-name="a454" draw:name="Espace réservé de l'en-tête 2" svg:x="-0.00039in" svg:y="0in" svg:width="3.16653in" svg:height="0.5in" presentation:class="header" presentation:placeholder="false">
          <draw:text-box>
            <text:p text:style-name="a453" text:class-names="" text:cond-style-name=""><text:span text:style-name="a452" text:class-names=""/></text:p>
          </draw:text-box>
          <svg:title/>
          <svg:desc/>
        </draw:frame>
        <draw:frame draw:id="id7" presentation:style-name="a457" draw:name="Espace réservé de la date 3" svg:x="4.16654in" svg:y="0in" svg:width="3.16693in" svg:height="0.5in" presentation:class="date-time" presentation:placeholder="false">
          <draw:text-box>
            <text:p text:style-name="a456" text:class-names="" text:cond-style-name=""><text:span text:style-name="a455" text:class-names=""/></text:p>
          </draw:text-box>
          <svg:title/>
          <svg:desc/>
        </draw:frame>
        <draw:page-thumbnail svg:x="1.04134in" svg:y="0.83346in" svg:width="5.33346in" svg:height="4in" presentation:class="page" draw:id="id8" presentation:style-name="a458" draw:name="Espace réservé de l'image des diapositives 4">
          <svg:title/>
          <svg:desc/>
        </draw:page-thumbnail>
        <draw:frame draw:id="id9" presentation:style-name="a461" draw:name="Espace réservé des notes 5" svg:x="1in" svg:y="5.16614in" svg:width="5.41654in" svg:height="4.83346in" presentation:class="notes" presentation:placeholder="false">
          <draw:text-box>
            <text:p text:style-name="a460" text:class-names="" text:cond-style-name=""><text:span text:style-name="a459" text:class-names=""/></text:p>
          </draw:text-box>
          <svg:title/>
          <svg:desc/>
        </draw:frame>
        <draw:frame draw:id="id10" presentation:style-name="a464" draw:name="Espace réservé du pied de page 6" svg:x="-0.00039in" svg:y="10.25in" svg:width="3.16653in" svg:height="0.5in" presentation:class="footer" presentation:placeholder="false">
          <draw:text-box>
            <text:p text:style-name="a463" text:class-names="" text:cond-style-name=""><text:span text:style-name="a462" text:class-names=""/></text:p>
          </draw:text-box>
          <svg:title/>
          <svg:desc/>
        </draw:frame>
        <draw:frame draw:id="id11" presentation:style-name="a467" draw:name="Espace réservé du numéro de diapositive 7" svg:x="4.16654in" svg:y="10.25in" svg:width="3.16693in" svg:height="0.5in" presentation:class="page-number" presentation:placeholder="false">
          <draw:text-box>
            <text:p text:style-name="a466" text:class-names="" text:cond-style-name=""><text:span text:style-name="a465" text:class-names=""><text:page-number style:num-format="1" text:fixed="false"/></text:span></text:p>
          </draw:text-box>
          <svg:title/>
          <svg:desc/>
        </draw:frame>
      </presentation:notes>
    </style:master-page>
    <style:master-page style:name="Master1-Layout10-vertTx-Titre-et-texte-vertical" style:page-layout-name="pageLayout1" draw:style-name="a470">
      <draw:frame draw:id="id60" presentation:style-name="a473" draw:name="Titre 1" svg:x="0.75in" svg:y="0.66614in" svg:width="8.5in" svg:height="1.25in" presentation:class="title" presentation:placeholder="false">
        <draw:text-box>
          <text:p text:style-name="a472" text:class-names="" text:cond-style-name=""><text:span text:style-name="a471" text:class-names="">Modifiez le style du titre</text:span></text:p>
        </draw:text-box>
        <svg:title/>
        <svg:desc/>
      </draw:frame>
      <draw:frame draw:id="id61" presentation:style-name="a489" draw:name="Espace réservé du texte vertical 2" svg:x="0.75in" svg:y="2.16654in" svg:width="8.5in" svg:height="4.5in" presentation:class="outline" presentation:placeholder="false">
        <draw:text-box>
          <text:list text:style-name="a476">
            <text:list-item>
              <text:p text:style-name="a475" text:class-names="" text:cond-style-name=""><text:span text:style-name="a474" text:class-names="">Modifier les styles du texte du masque</text:span></text:p>
            </text:list-item>
          </text:list>
          <text:list text:style-name="a479">
            <text:list-item>
              <text:list text:style-name="a479">
                <text:list-item>
                  <text:p text:style-name="a478" text:class-names="" text:cond-style-name=""><text:span text:style-name="a477" text:class-names="">Deuxième niveau</text:span></text:p>
                </text:list-item>
              </text:list>
            </text:list-item>
          </text:list>
          <text:list text:style-name="a482">
            <text:list-item>
              <text:list text:style-name="a482">
                <text:list-item>
                  <text:list text:style-name="a482">
                    <text:list-item>
                      <text:p text:style-name="a481" text:class-names="" text:cond-style-name=""><text:span text:style-name="a480" text:class-names="">Troisième niveau</text:span></text:p>
                    </text:list-item>
                  </text:list>
                </text:list-item>
              </text:list>
            </text:list-item>
          </text:list>
          <text:list text:style-name="a485">
            <text:list-item>
              <text:list text:style-name="a485">
                <text:list-item>
                  <text:list text:style-name="a485">
                    <text:list-item>
                      <text:list text:style-name="a485">
                        <text:list-item>
                          <text:p text:style-name="a484" text:class-names="" text:cond-style-name=""><text:span text:style-name="a483" text:class-names="">Quatrième niveau</text:span></text:p>
                        </text:list-item>
                      </text:list>
                    </text:list-item>
                  </text:list>
                </text:list-item>
              </text:list>
            </text:list-item>
          </text:list>
          <text:list text:style-name="a488">
            <text:list-item>
              <text:list text:style-name="a488">
                <text:list-item>
                  <text:list text:style-name="a488">
                    <text:list-item>
                      <text:list text:style-name="a488">
                        <text:list-item>
                          <text:list text:style-name="a488">
                            <text:list-item>
                              <text:p text:style-name="a487" text:class-names="" text:cond-style-name=""><text:span text:style-name="a486" text:class-names="">Cinquième niveau</text:span></text:p>
                            </text:list-item>
                          </text:list>
                        </text:list-item>
                      </text:list>
                    </text:list-item>
                  </text:list>
                </text:list-item>
              </text:list>
            </text:list-item>
          </text:list>
        </draw:text-box>
        <svg:title/>
        <svg:desc/>
      </draw:frame>
      <draw:frame draw:id="id62" presentation:style-name="a492" draw:name="Espace réservé de la date 3" svg:x="0.75in" svg:y="6.83346in" svg:width="2.08346in" svg:height="0.5in" presentation:class="date-time" presentation:placeholder="false">
        <draw:text-box>
          <text:p text:style-name="a491" text:class-names="" text:cond-style-name=""><text:span text:style-name="a490" text:class-names=""/></text:p>
        </draw:text-box>
        <svg:title/>
        <svg:desc/>
      </draw:frame>
      <draw:frame draw:id="id63" presentation:style-name="a495" draw:name="Espace réservé du pied de page 4" svg:x="3.41653in" svg:y="6.83346in" svg:width="3.16693in" svg:height="0.5in" presentation:class="footer" presentation:placeholder="false">
        <draw:text-box>
          <text:p text:style-name="a494" text:class-names="" text:cond-style-name=""><text:span text:style-name="a493" text:class-names=""/></text:p>
        </draw:text-box>
        <svg:title/>
        <svg:desc/>
      </draw:frame>
      <draw:frame draw:id="id64" presentation:style-name="a498" draw:name="Espace réservé du numéro de diapositive 5" svg:x="7.16654in" svg:y="6.83346in" svg:width="2.08346in" svg:height="0.5in" presentation:class="page-number" presentation:placeholder="false">
        <draw:text-box>
          <text:p text:style-name="a497" text:class-names="" text:cond-style-name=""><text:span text:style-name="a496" text:class-names=""><text:page-number style:num-format="1" text:fixed="false"/></text:span></text:p>
        </draw:text-box>
        <svg:title/>
        <svg:desc/>
      </draw:frame>
      <presentation:notes style:page-layout-name="pageLayout2" draw:style-name="a518">
        <draw:custom-shape svg:x="0in" svg:y="0in" svg:width="7.37402in" svg:height="10.79134in" draw:id="id5" draw:style-name="a501" draw:name="Rectangle 1">
          <svg:title/>
          <svg:desc/>
          <text:p text:style-name="a500" text:class-names="" text:cond-style-name=""><text:span text:style-name="a499" text:class-names=""/></text:p>
          <draw:enhanced-geometry xmlns:dr3d="urn:oasis:names:tc:opendocument:xmlns:dr3d:1.0" draw:type="non-primitive" svg:viewBox="0 0 21600 21600" draw:enhanced-path="M 0 0 L 21600 0 21600 21600 0 21600 Z N"/>
        </draw:custom-shape>
        <draw:frame draw:id="id6" presentation:style-name="a504" draw:name="Espace réservé de l'en-tête 2" svg:x="-0.00039in" svg:y="0in" svg:width="3.16653in" svg:height="0.5in" presentation:class="header" presentation:placeholder="false">
          <draw:text-box>
            <text:p text:style-name="a503" text:class-names="" text:cond-style-name=""><text:span text:style-name="a502" text:class-names=""/></text:p>
          </draw:text-box>
          <svg:title/>
          <svg:desc/>
        </draw:frame>
        <draw:frame draw:id="id7" presentation:style-name="a507" draw:name="Espace réservé de la date 3" svg:x="4.16654in" svg:y="0in" svg:width="3.16693in" svg:height="0.5in" presentation:class="date-time" presentation:placeholder="false">
          <draw:text-box>
            <text:p text:style-name="a506" text:class-names="" text:cond-style-name=""><text:span text:style-name="a505" text:class-names=""/></text:p>
          </draw:text-box>
          <svg:title/>
          <svg:desc/>
        </draw:frame>
        <draw:page-thumbnail svg:x="1.04134in" svg:y="0.83346in" svg:width="5.33346in" svg:height="4in" presentation:class="page" draw:id="id8" presentation:style-name="a508" draw:name="Espace réservé de l'image des diapositives 4">
          <svg:title/>
          <svg:desc/>
        </draw:page-thumbnail>
        <draw:frame draw:id="id9" presentation:style-name="a511" draw:name="Espace réservé des notes 5" svg:x="1in" svg:y="5.16614in" svg:width="5.41654in" svg:height="4.83346in" presentation:class="notes" presentation:placeholder="false">
          <draw:text-box>
            <text:p text:style-name="a510" text:class-names="" text:cond-style-name=""><text:span text:style-name="a509" text:class-names=""/></text:p>
          </draw:text-box>
          <svg:title/>
          <svg:desc/>
        </draw:frame>
        <draw:frame draw:id="id10" presentation:style-name="a514" draw:name="Espace réservé du pied de page 6" svg:x="-0.00039in" svg:y="10.25in" svg:width="3.16653in" svg:height="0.5in" presentation:class="footer" presentation:placeholder="false">
          <draw:text-box>
            <text:p text:style-name="a513" text:class-names="" text:cond-style-name=""><text:span text:style-name="a512" text:class-names=""/></text:p>
          </draw:text-box>
          <svg:title/>
          <svg:desc/>
        </draw:frame>
        <draw:frame draw:id="id11" presentation:style-name="a517" draw:name="Espace réservé du numéro de diapositive 7" svg:x="4.16654in" svg:y="10.25in" svg:width="3.16693in" svg:height="0.5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11-vertTitleAndTx-Titre-vertical-et-texte" style:page-layout-name="pageLayout1" draw:style-name="a520">
      <draw:frame draw:id="id65" presentation:style-name="a523" draw:name="Titre vertical 1" svg:x="7.125in" svg:y="0.66667in" svg:width="2.125in" svg:height="6in" presentation:class="title" presentation:placeholder="false">
        <draw:text-box>
          <text:p text:style-name="a522" text:class-names="" text:cond-style-name=""><text:span text:style-name="a521" text:class-names="">Modifiez le style du titre</text:span></text:p>
        </draw:text-box>
        <svg:title/>
        <svg:desc/>
      </draw:frame>
      <draw:frame draw:id="id66" presentation:style-name="a539" draw:name="Espace réservé du texte vertical 2" svg:x="0.75in" svg:y="0.66667in" svg:width="6.20833in" svg:height="6in" presentation:class="outline" presentation:placeholder="false">
        <draw:text-box>
          <text:list text:style-name="a526">
            <text:list-item>
              <text:p text:style-name="a525" text:class-names="" text:cond-style-name=""><text:span text:style-name="a524" text:class-names="">Modifier les styles du texte du masque</text:span></text:p>
            </text:list-item>
          </text:list>
          <text:list text:style-name="a529">
            <text:list-item>
              <text:list text:style-name="a529">
                <text:list-item>
                  <text:p text:style-name="a528" text:class-names="" text:cond-style-name=""><text:span text:style-name="a527" text:class-names="">Deuxième niveau</text:span></text:p>
                </text:list-item>
              </text:list>
            </text:list-item>
          </text:list>
          <text:list text:style-name="a532">
            <text:list-item>
              <text:list text:style-name="a532">
                <text:list-item>
                  <text:list text:style-name="a532">
                    <text:list-item>
                      <text:p text:style-name="a531" text:class-names="" text:cond-style-name=""><text:span text:style-name="a530" text:class-names="">Troisième niveau</text:span></text:p>
                    </text:list-item>
                  </text:list>
                </text:list-item>
              </text:list>
            </text:list-item>
          </text:list>
          <text:list text:style-name="a535">
            <text:list-item>
              <text:list text:style-name="a535">
                <text:list-item>
                  <text:list text:style-name="a535">
                    <text:list-item>
                      <text:list text:style-name="a535">
                        <text:list-item>
                          <text:p text:style-name="a534" text:class-names="" text:cond-style-name=""><text:span text:style-name="a533" text:class-names="">Quatrième niveau</text:span></text:p>
                        </text:list-item>
                      </text:list>
                    </text:list-item>
                  </text:list>
                </text:list-item>
              </text:list>
            </text:list-item>
          </text:list>
          <text:list text:style-name="a538">
            <text:list-item>
              <text:list text:style-name="a538">
                <text:list-item>
                  <text:list text:style-name="a538">
                    <text:list-item>
                      <text:list text:style-name="a538">
                        <text:list-item>
                          <text:list text:style-name="a538">
                            <text:list-item>
                              <text:p text:style-name="a537" text:class-names="" text:cond-style-name=""><text:span text:style-name="a536" text:class-names="">Cinquième niveau</text:span></text:p>
                            </text:list-item>
                          </text:list>
                        </text:list-item>
                      </text:list>
                    </text:list-item>
                  </text:list>
                </text:list-item>
              </text:list>
            </text:list-item>
          </text:list>
        </draw:text-box>
        <svg:title/>
        <svg:desc/>
      </draw:frame>
      <draw:frame draw:id="id67" presentation:style-name="a542" draw:name="Espace réservé de la date 3" svg:x="0.75in" svg:y="6.83346in" svg:width="2.08346in" svg:height="0.5in" presentation:class="date-time" presentation:placeholder="false">
        <draw:text-box>
          <text:p text:style-name="a541" text:class-names="" text:cond-style-name=""><text:span text:style-name="a540" text:class-names=""/></text:p>
        </draw:text-box>
        <svg:title/>
        <svg:desc/>
      </draw:frame>
      <draw:frame draw:id="id68" presentation:style-name="a545" draw:name="Espace réservé du pied de page 4" svg:x="3.41653in" svg:y="6.83346in" svg:width="3.16693in" svg:height="0.5in" presentation:class="footer" presentation:placeholder="false">
        <draw:text-box>
          <text:p text:style-name="a544" text:class-names="" text:cond-style-name=""><text:span text:style-name="a543" text:class-names=""/></text:p>
        </draw:text-box>
        <svg:title/>
        <svg:desc/>
      </draw:frame>
      <draw:frame draw:id="id69" presentation:style-name="a548" draw:name="Espace réservé du numéro de diapositive 5" svg:x="7.16654in" svg:y="6.83346in" svg:width="2.08346in" svg:height="0.5in" presentation:class="page-number" presentation:placeholder="false">
        <draw:text-box>
          <text:p text:style-name="a547" text:class-names="" text:cond-style-name=""><text:span text:style-name="a546" text:class-names=""><text:page-number style:num-format="1" text:fixed="false"/></text:span></text:p>
        </draw:text-box>
        <svg:title/>
        <svg:desc/>
      </draw:frame>
      <presentation:notes style:page-layout-name="pageLayout2" draw:style-name="a568">
        <draw:custom-shape svg:x="0in" svg:y="0in" svg:width="7.37402in" svg:height="10.79134in" draw:id="id5" draw:style-name="a551" draw:name="Rectangle 1">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frame draw:id="id6" presentation:style-name="a554" draw:name="Espace réservé de l'en-tête 2" svg:x="-0.00039in" svg:y="0in" svg:width="3.16653in" svg:height="0.5in" presentation:class="header" presentation:placeholder="false">
          <draw:text-box>
            <text:p text:style-name="a553" text:class-names="" text:cond-style-name=""><text:span text:style-name="a552" text:class-names=""/></text:p>
          </draw:text-box>
          <svg:title/>
          <svg:desc/>
        </draw:frame>
        <draw:frame draw:id="id7" presentation:style-name="a557" draw:name="Espace réservé de la date 3" svg:x="4.16654in" svg:y="0in" svg:width="3.16693in" svg:height="0.5in" presentation:class="date-time" presentation:placeholder="false">
          <draw:text-box>
            <text:p text:style-name="a556" text:class-names="" text:cond-style-name=""><text:span text:style-name="a555" text:class-names=""/></text:p>
          </draw:text-box>
          <svg:title/>
          <svg:desc/>
        </draw:frame>
        <draw:page-thumbnail svg:x="1.04134in" svg:y="0.83346in" svg:width="5.33346in" svg:height="4in" presentation:class="page" draw:id="id8" presentation:style-name="a558" draw:name="Espace réservé de l'image des diapositives 4">
          <svg:title/>
          <svg:desc/>
        </draw:page-thumbnail>
        <draw:frame draw:id="id9" presentation:style-name="a561" draw:name="Espace réservé des notes 5" svg:x="1in" svg:y="5.16614in" svg:width="5.41654in" svg:height="4.83346in" presentation:class="notes" presentation:placeholder="false">
          <draw:text-box>
            <text:p text:style-name="a560" text:class-names="" text:cond-style-name=""><text:span text:style-name="a559" text:class-names=""/></text:p>
          </draw:text-box>
          <svg:title/>
          <svg:desc/>
        </draw:frame>
        <draw:frame draw:id="id10" presentation:style-name="a564" draw:name="Espace réservé du pied de page 6" svg:x="-0.00039in" svg:y="10.25in" svg:width="3.16653in" svg:height="0.5in" presentation:class="footer" presentation:placeholder="false">
          <draw:text-box>
            <text:p text:style-name="a563" text:class-names="" text:cond-style-name=""><text:span text:style-name="a562" text:class-names=""/></text:p>
          </draw:text-box>
          <svg:title/>
          <svg:desc/>
        </draw:frame>
        <draw:frame draw:id="id11" presentation:style-name="a567" draw:name="Espace réservé du numéro de diapositive 7" svg:x="4.16654in" svg:y="10.25in" svg:width="3.16693in" svg:height="0.5in" presentation:class="page-number" presentation:placeholder="false">
          <draw:text-box>
            <text:p text:style-name="a566" text:class-names="" text:cond-style-name=""><text:span text:style-name="a565" text:class-names=""><text:page-number style:num-format="1" text:fixed="false"/></text:span></text:p>
          </draw:text-box>
          <svg:title/>
          <svg:desc/>
        </draw:frame>
      </presentation:notes>
    </style:master-page>
    <style:handout-master style:page-layout-name="pageLayout3" draw:style-name="a569">
      <draw:custom-shape svg:x="0in" svg:y="0in" svg:width="7.37402in" svg:height="10.79134in" draw:id="id70" draw:style-name="a572" draw:name="Rectangle 1">
        <svg:title/>
        <svg:desc/>
        <text:p text:style-name="a571" text:class-names="" text:cond-style-name=""><text:span text:style-name="a570" text:class-names=""/></text:p>
        <draw:enhanced-geometry xmlns:dr3d="urn:oasis:names:tc:opendocument:xmlns:dr3d:1.0" draw:type="non-primitive" svg:viewBox="0 0 21600 21600" draw:enhanced-path="M 0 0 L 21600 0 21600 21600 0 21600 Z N"/>
      </draw:custom-shape>
      <draw:frame draw:id="id71" presentation:style-name="a575" draw:name="Espace réservé de l'en-tête 2" svg:x="0in" svg:y="-0.00039in" svg:width="3.19606in" svg:height="0.53976in" presentation:class="header" presentation:placeholder="false">
        <draw:text-box>
          <text:p text:style-name="a574" text:class-names="" text:cond-style-name=""><text:span text:style-name="a573" text:class-names=""/></text:p>
        </draw:text-box>
        <svg:title/>
        <svg:desc/>
      </draw:frame>
      <draw:frame draw:id="id72" presentation:style-name="a578" draw:name="Espace réservé de la date 3" svg:x="4.17835in" svg:y="-0.00039in" svg:width="3.19646in" svg:height="0.53976in" presentation:class="date-time" presentation:placeholder="false">
        <draw:text-box>
          <text:p text:style-name="a577" text:class-names="" text:cond-style-name=""><text:span text:style-name="a576" text:class-names=""/></text:p>
        </draw:text-box>
        <svg:title/>
        <svg:desc/>
      </draw:frame>
      <draw:frame draw:id="id73" presentation:style-name="a581" draw:name="Espace réservé du pied de page 4" svg:x="0in" svg:y="10.25157in" svg:width="3.19606in" svg:height="0.54016in" presentation:class="footer" presentation:placeholder="false">
        <draw:text-box>
          <text:p text:style-name="a580" text:class-names="" text:cond-style-name=""><text:span text:style-name="a579" text:class-names=""/></text:p>
        </draw:text-box>
        <svg:title/>
        <svg:desc/>
      </draw:frame>
      <draw:frame draw:id="id74" presentation:style-name="a584" draw:name="Espace réservé du numéro de diapositive 5" svg:x="4.17835in" svg:y="10.25157in" svg:width="3.19646in" svg:height="0.54016in" presentation:class="page-number" presentation:placeholder="false">
        <draw:text-box>
          <text:p text:style-name="a583" text:class-names="" text:cond-style-name=""><text:span text:style-name="a582" text:class-names=""><text:page-number style:num-format="1" text:fixed="false"/></text:span></text:p>
        </draw:text-box>
        <svg:title/>
        <svg:desc/>
      </draw:frame>
      <draw:page-thumbnail draw:page-number="1" svg:x="0.51563in" svg:y="1.13368in" svg:width="3.02257in" svg:height="2.26563in"/>
      <draw:page-thumbnail draw:page-number="2" svg:x="3.83333in" svg:y="1.13368in" svg:width="3.02257in" svg:height="2.26563in"/>
      <draw:page-thumbnail draw:page-number="3" svg:x="0.51563in" svg:y="4.26215in" svg:width="3.02257in" svg:height="2.26563in"/>
      <draw:page-thumbnail draw:page-number="4" svg:x="3.83333in" svg:y="4.26215in" svg:width="3.02257in" svg:height="2.26563in"/>
      <draw:page-thumbnail draw:page-number="5" svg:x="0.51563in" svg:y="7.39063in" svg:width="3.02257in" svg:height="2.26563in"/>
      <draw:page-thumbnail draw:page-number="6" svg:x="3.83333in" svg:y="7.39063in" svg:width="3.02257in" svg:height="2.26563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OMOGRAPHIE PAR EMISSION DE POSITONS</dc:title>
    <meta:initial-creator>DMG</meta:initial-creator>
    <dc:creator>jf.crouzet@gmail.com</dc:creator>
    <meta:creation-date>2003-03-14T13:40:52Z</meta:creation-date>
    <dc:date>2019-10-16T08:20:32Z</dc:date>
    <meta:editing-cycles>225</meta:editing-cycles>
    <meta:editing-duration>PT439053S</meta:editing-duration>
    <meta:document-statistic meta:paragraph-count="116" meta:word-count="487"/>
  </office:meta>
</office:document-meta>
</file>

<file path=Object 1/content.xml><?xml version="1.0" encoding="utf-8"?>
<mml:math xmlns:mml="http://www.w3.org/1998/Math/MathML" display="block">
  <mml:mtext>p</mml:mtext>
  <mml:mo>=</mml:mo>
  <mml:mtext>−</mml:mtext>
  <mml:mfrac>
    <mml:mn>1</mml:mn>
    <mml:mi>x</mml:mi>
  </mml:mfrac>
  <mml:mtext>ln</mml:mtext>
  <mml:mfenced>
    <mml:mrow>
      <mml:mfrac>
        <mml:mi>I</mml:mi>
        <mml:mrow>
          <mml:msub>
            <mml:mi>I</mml:mi>
            <mml:mn>0</mml:mn>
          </mml:msub>
        </mml:mrow>
      </mml:mfrac>
    </mml:mrow>
  </mml:mfenced>
  <mml:mo>=</mml:mo>
  <mml:munder>
    <mml:mo stretchy="false">∑</mml:mo>
    <mml:mi>i</mml:mi>
  </mml:munder>
  <mml:mrow>
    <mml:msub>
      <mml:mi>𝜇</mml:mi>
      <mml:mi>i</mml:mi>
    </mml:msub>
  </mml:mrow>
</mml:math>
</file>

<file path=Object 2/content.xml><?xml version="1.0" encoding="utf-8"?>
<mml:math xmlns:mml="http://www.w3.org/1998/Math/MathML" display="block">
  <mml:mtext>I</mml:mtext>
  <mml:mo>=</mml:mo>
  <mml:msub>
    <mml:mi mathvariant="normal">I</mml:mi>
    <mml:mn>0</mml:mn>
  </mml:msub>
  <mml:msup>
    <mml:mi mathvariant="normal">e</mml:mi>
    <mml:mrow>
      <mml:mtext>−x</mml:mtext>
      <mml:munder>
        <mml:mo stretchy="false">∑</mml:mo>
        <mml:mi>i</mml:mi>
      </mml:munder>
      <mml:mrow>
        <mml:msub>
          <mml:mi>𝜇</mml:mi>
          <mml:mi>i</mml:mi>
        </mml:msub>
      </mml:mrow>
    </mml:mrow>
  </mml:msup>
</mml:math>
</file>