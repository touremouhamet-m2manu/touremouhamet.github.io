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cm" fo:min-width="4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4.75cm" fo:min-width="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25cm" fo:min-width="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cm" fo:min-width="6cm"/>
      <style:paragraph-properties style:writing-mode="lr-tb"/>
    </style:style>
    <style:style style:name="gr5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6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7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8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9" style:family="graphic" style:parent-style-name="standard">
      <style:graphic-properties draw:fill-color="#00a933" draw:textarea-horizontal-align="justify" draw:textarea-vertical-align="middle" draw:auto-grow-height="false" fo:min-height="2.25cm" fo:min-width="3.75cm"/>
      <style:paragraph-properties style:writing-mode="lr-tb"/>
    </style:style>
    <style:style style:name="gr10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2" style:family="graphic" style:parent-style-name="standard">
      <style:graphic-properties draw:fill-color="#ff8000" draw:textarea-horizontal-align="justify" draw:textarea-vertical-align="middle" draw:auto-grow-height="false" fo:min-height="3.25cm" fo:min-width="6.25cm"/>
      <style:paragraph-properties style:writing-mode="lr-tb"/>
    </style:style>
    <style:style style:name="gr13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ff8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5.25cm" svg:height="3.25cm" svg:x="7.25cm" svg:y="8.25cm">
          <text:p text:style-name="P1">SOL EXACT STA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8.5cm" svg:height="5cm" draw:transform="skewX (-0.000872664625997165) rotate (-0.000698131700797933) translate (0.999cm 13.244cm)">
          <text:p text:style-name="P1">ADRS </text:p>
          <text:p text:style-name="P1">on MESH for N to N+n iterations</text:p>
          <text:p text:style-name="P1">SOL_EXACT_STA + TIME</text:p>
          <text:p text:style-name="P1">RHS</text:p>
          <text:p text:style-name="P1">METRIC IN TIME</text:p>
          <text:p text:style-name="P2">METRIC INTERS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3" draw:id="id3" draw:layer="layout" svg:width="7.5cm" svg:height="3.5cm" svg:x="11.25cm" svg:y="12cm">
          <text:p text:style-name="P1">MESH</text:p>
          <text:p text:style-name="P1">Using METRIC INTERSECT over n iterations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6.5cm" svg:height="3.25cm" svg:x="5.25cm" svg:y="18.75cm">
          <text:p text:style-name="P1">INTERPOL</text:p>
          <text:p text:style-name="P1">(OLD TO NEW MESH OF OLD SOL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curve" svg:x1="8.5cm" svg:y1="22cm" svg:x2="7.25cm" svg:y2="9.875cm" draw:start-shape="id1" draw:start-glue-point="2" draw:end-shape="id2" draw:end-glue-point="3" svg:d="M8500 22000c0 751-1876 626-3126-2593s-1875-9532 1876-9532" svg:viewBox="0 0 4095 12506">
          <text:p/>
        </draw:connector>
        <draw:connector draw:style-name="gr6" draw:text-style-name="P3" draw:layer="layout" draw:type="curve" svg:x1="15cm" svg:y1="15.5cm" svg:x2="8.5cm" svg:y2="18.75cm" draw:start-shape="id3" draw:start-glue-point="2" draw:end-shape="id1" svg:d="M15000 15500c0 2437-6500 813-6500 3250" svg:viewBox="0 0 6501 3251">
          <text:p/>
        </draw:connector>
        <draw:connector draw:style-name="gr7" draw:text-style-name="P3" draw:layer="layout" draw:type="curve" draw:line-skew="0.001cm" svg:x1="9.499cm" svg:y1="15.75cm" svg:x2="11.25cm" svg:y2="13.75cm" draw:start-shape="id4" draw:start-glue-point="1" draw:end-shape="id3" draw:end-glue-point="3" svg:d="M9499 15750c1315 0 440-2000 1751-2000" svg:viewBox="0 0 1752 2001">
          <text:p/>
        </draw:connector>
        <draw:connector draw:style-name="gr8" draw:text-style-name="P3" draw:layer="layout" draw:type="curve" svg:x1="9.875cm" svg:y1="11.5cm" svg:x2="5.249cm" svg:y2="13.247cm" draw:start-shape="id2" draw:end-shape="id4" svg:d="M9875 11500c0 1308-4626 435-4626 1747" svg:viewBox="0 0 4627 1748">
          <text:p/>
        </draw:connector>
        <draw:custom-shape draw:style-name="gr9" draw:text-style-name="P4" xml:id="id5" draw:id="id5" draw:layer="layout" svg:width="4.25cm" svg:height="2.5cm" draw:transform="skewX (-0.00314159265358979) rotate (-0.00331612557878927) translate (1.5cm 8.986cm)">
          <text:p text:style-name="P1">INIT UNIFORM MESH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type="curve" svg:x1="5.862cm" svg:y1="9.301cm" svg:x2="7.25cm" svg:y2="9.875cm" draw:end-shape="id2" svg:d="M5862 9301c666 0-28 574 1388 574" svg:viewBox="0 0 1389 575">
          <text:p/>
        </draw:connector>
        <draw:connector draw:style-name="gr11" draw:text-style-name="P3" draw:layer="layout" draw:type="curve" svg:x1="9.499cm" svg:y1="15.75cm" svg:x2="11.75cm" svg:y2="20.375cm" draw:start-shape="id4" draw:end-shape="id1" svg:d="M9499 15750c4128 0 3002 4625 2251 4625" svg:viewBox="0 0 2982 4626">
          <text:p/>
        </draw:connector>
        <draw:custom-shape draw:style-name="gr12" draw:text-style-name="P5" draw:layer="layout" svg:width="6.75cm" svg:height="3.5cm" svg:x="13.25cm" svg:y="18.25cm">
          <text:p text:style-name="P1">STOP CRITERIA </text:p>
          <text:p text:style-name="P1">N&lt;--N+n 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curve" svg:x1="15.468cm" svg:y1="18.155cm" svg:x2="5.75cm" svg:y2="10.25cm" draw:end-shape="id5" svg:d="M15468 18155c-6912 0-2053-7905-9718-7905" svg:viewBox="0 0 9719 790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14T16:43:13.981975855</meta:creation-date>
    <dc:date>2024-10-14T17:14:55.338370377</dc:date>
    <meta:editing-duration>PT21M18S</meta:editing-duration>
    <meta:editing-cycles>7</meta:editing-cycles>
    <meta:generator>LibreOffice/7.3.7.2$Linux_X86_64 LibreOffice_project/30$Build-2</meta:generator>
    <meta:document-statistic meta:object-count="13"/>
  </office:meta>
</office:document-meta>
</file>